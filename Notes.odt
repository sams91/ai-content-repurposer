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witterChirp" svg:font-family="TwitterChirp, apple-system, BlinkMacSystemFont, 'Segoe UI', Roboto, Helvetica, Arial, sans-serif"/>
    <style:font-face style:name="monospace" svg:font-family="monospace"/>
    <style:font-face style:name="sans-serif" svg:font-family="sans-serif"/>
    <style:font-face style:name="system-ui" svg:font-family="system-ui, 'Segoe UI', Roboto, Helvetica, Arial, sans-serif, 'Apple Color Emoji', 'Segoe UI Emoji'"/>
  </office:font-face-decls>
  <office:automatic-styles>
    <style:style style:name="P1" style:family="paragraph" style:parent-style-name="Heading_20_1" style:list-style-name="L11">
      <style:text-properties fo:font-variant="normal" fo:text-transform="none" fo:color="#000000" loext:opacity="100%" style:font-name="system-ui" fo:font-size="18pt" fo:letter-spacing="normal" fo:font-style="normal" fo:font-weight="normal" officeooo:rsid="00245900" officeooo:paragraph-rsid="00245900" style:font-size-asian="12pt" style:font-weight-asian="normal" style:font-size-complex="12pt" style:font-weight-complex="normal"/>
    </style:style>
    <style:style style:name="P2" style:family="paragraph" style:parent-style-name="Heading_20_2">
      <style:paragraph-properties fo:margin-left="0in" fo:margin-right="0in" fo:margin-top="0in" fo:margin-bottom="0in" style:contextual-spacing="false" style:line-height-at-least="0.5102in" fo:text-align="center" style:justify-single-word="false" fo:orphans="2" fo:widows="2" fo:text-indent="0in" style:auto-text-indent="false" fo:padding="0.0193in" fo:border="0.06pt solid #000000"/>
      <style:text-properties fo:font-variant="normal" fo:text-transform="none" fo:color="#000000" loext:opacity="100%" style:font-name="system-ui" fo:font-size="10.5pt" fo:letter-spacing="normal" fo:font-style="normal" fo:font-weight="normal" loext:padding="0.0193in" loext:border="0.06pt solid #000000"/>
    </style:style>
    <style:style style:name="P3" style:family="paragraph" style:parent-style-name="Standard">
      <style:text-properties officeooo:rsid="00092d79" officeooo:paragraph-rsid="00092d79"/>
    </style:style>
    <style:style style:name="P4" style:family="paragraph" style:parent-style-name="Standard" style:list-style-name="L4">
      <style:text-properties fo:color="#000000" loext:opacity="100%" style:font-name="sans-serif" officeooo:rsid="00092d79" officeooo:paragraph-rsid="00092d79" fo:background-color="transparent"/>
    </style:style>
    <style:style style:name="P5" style:family="paragraph" style:parent-style-name="Standard" style:list-style-name="L4">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0092d79" officeooo:paragraph-rsid="00092d79" fo:background-color="transparent"/>
    </style:style>
    <style:style style:name="P6" style:family="paragraph" style:parent-style-name="Standard" style:list-style-name="L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7" style:family="paragraph" style:parent-style-name="Standard" style:list-style-name="L4">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00b7e7d" officeooo:paragraph-rsid="000b7e7d" fo:background-color="transparent"/>
    </style:style>
    <style:style style:name="P8" style:family="paragraph" style:parent-style-name="Standard" style:list-style-name="L4">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00ab2ec" officeooo:paragraph-rsid="000ab2ec" fo:background-color="transparent"/>
    </style:style>
    <style:style style:name="P9" style:family="paragraph" style:parent-style-name="Standard">
      <style:text-properties fo:color="#000000" loext:opacity="100%" style:font-name="sans-serif" fo:font-size="12pt" fo:font-weight="normal" officeooo:rsid="001c1cbd" officeooo:paragraph-rsid="001c1cbd" fo:background-color="transparent" style:font-size-asian="12pt" style:font-weight-asian="normal" style:font-size-complex="12pt" style:font-weight-complex="normal"/>
    </style:style>
    <style:style style:name="P10" style:family="paragraph" style:parent-style-name="Standard">
      <style:text-properties officeooo:rsid="00108430" officeooo:paragraph-rsid="00108430"/>
    </style:style>
    <style:style style:name="P11" style:family="paragraph" style:parent-style-name="Standard">
      <style:text-properties officeooo:rsid="0010fca4" officeooo:paragraph-rsid="0010fca4"/>
    </style:style>
    <style:style style:name="P12" style:family="paragraph" style:parent-style-name="Standard" style:list-style-name="L5">
      <style:text-properties officeooo:paragraph-rsid="0010fca4"/>
    </style:style>
    <style:style style:name="P13" style:family="paragraph" style:parent-style-name="Standard" style:list-style-name="L5">
      <style:text-properties officeooo:rsid="0012d520" officeooo:paragraph-rsid="0012d520"/>
    </style:style>
    <style:style style:name="P14" style:family="paragraph" style:parent-style-name="Standard">
      <style:text-properties officeooo:rsid="0012d520" officeooo:paragraph-rsid="0012d520"/>
    </style:style>
    <style:style style:name="P15" style:family="paragraph" style:parent-style-name="Standard" style:list-style-name="L6">
      <style:text-properties officeooo:rsid="00135635" officeooo:paragraph-rsid="00135635"/>
    </style:style>
    <style:style style:name="P16" style:family="paragraph" style:parent-style-name="Standard">
      <style:text-properties officeooo:rsid="00142200" officeooo:paragraph-rsid="00142200"/>
    </style:style>
    <style:style style:name="P17" style:family="paragraph" style:parent-style-name="Standard">
      <style:text-properties officeooo:rsid="0015296a" officeooo:paragraph-rsid="0015296a"/>
    </style:style>
    <style:style style:name="P18" style:family="paragraph" style:parent-style-name="Standard">
      <style:text-properties officeooo:rsid="00166a63" officeooo:paragraph-rsid="00166a63"/>
    </style:style>
    <style:style style:name="P19" style:family="paragraph" style:parent-style-name="Standard">
      <style:text-properties officeooo:rsid="00166a63" officeooo:paragraph-rsid="00167a95"/>
    </style:style>
    <style:style style:name="P20" style:family="paragraph" style:parent-style-name="Standard">
      <style:text-properties officeooo:rsid="00167a95" officeooo:paragraph-rsid="00167a95"/>
    </style:style>
    <style:style style:name="P21" style:family="paragraph" style:parent-style-name="Standard">
      <style:text-properties officeooo:rsid="00196eb0" officeooo:paragraph-rsid="00196eb0"/>
    </style:style>
    <style:style style:name="P22" style:family="paragraph" style:parent-style-name="Standard">
      <style:text-properties fo:font-size="12pt" fo:font-weight="normal" officeooo:paragraph-rsid="001b5e92" style:font-size-asian="12pt" style:font-weight-asian="normal" style:font-size-complex="12pt" style:font-weight-complex="normal"/>
    </style:style>
    <style:style style:name="P23" style:family="paragraph" style:parent-style-name="Standard">
      <style:text-properties fo:font-size="12pt" fo:font-weight="normal" officeooo:rsid="001c1cbd" officeooo:paragraph-rsid="001c1cbd" style:font-size-asian="12pt" style:font-weight-asian="normal" style:font-size-complex="12pt" style:font-weight-complex="normal"/>
    </style:style>
    <style:style style:name="P24" style:family="paragraph" style:parent-style-name="Standard">
      <style:text-properties fo:font-size="12pt" fo:font-weight="normal" officeooo:rsid="001d7262" officeooo:paragraph-rsid="001d7262" style:font-size-asian="12pt" style:font-weight-asian="normal" style:font-size-complex="12pt" style:font-weight-complex="normal"/>
    </style:style>
    <style:style style:name="P25" style:family="paragraph" style:parent-style-name="Standard">
      <style:text-properties fo:font-size="12pt" fo:font-weight="normal" officeooo:rsid="0020d8ee" officeooo:paragraph-rsid="0020d8ee" style:font-size-asian="12pt" style:font-weight-asian="normal" style:font-size-complex="12pt" style:font-weight-complex="normal"/>
    </style:style>
    <style:style style:name="P26" style:family="paragraph" style:parent-style-name="Standard">
      <style:text-properties fo:font-size="12pt" fo:font-weight="normal" officeooo:rsid="002214bf" officeooo:paragraph-rsid="002214bf" style:font-size-asian="12pt" style:font-weight-asian="normal" style:font-size-complex="12pt" style:font-weight-complex="normal"/>
    </style:style>
    <style:style style:name="P27" style:family="paragraph" style:parent-style-name="Standard">
      <style:text-properties fo:font-size="12pt" fo:font-weight="normal" officeooo:rsid="00245900" officeooo:paragraph-rsid="00245900" style:font-size-asian="12pt" style:font-weight-asian="normal" style:font-size-complex="12pt" style:font-weight-complex="normal"/>
    </style:style>
    <style:style style:name="P28" style:family="paragraph" style:parent-style-name="Standard">
      <style:text-properties fo:font-variant="normal" fo:text-transform="none" fo:color="#e7e9ea" loext:opacity="100%" style:font-name="TwitterChirp" fo:font-size="11.25pt" fo:letter-spacing="normal" fo:font-style="normal" fo:font-weight="normal" officeooo:rsid="002214bf" officeooo:paragraph-rsid="002214bf" style:font-size-asian="12pt" style:font-weight-asian="normal" style:font-size-complex="12pt" style:font-weight-complex="normal"/>
    </style:style>
    <style:style style:name="P29" style:family="paragraph" style:parent-style-name="Standard">
      <style:text-properties fo:font-variant="normal" fo:text-transform="none" style:use-window-font-color="true" loext:opacity="0%" style:font-name="TwitterChirp" fo:font-size="12pt" fo:letter-spacing="normal" fo:font-style="normal" fo:font-weight="normal" officeooo:rsid="00245900" officeooo:paragraph-rsid="00245900" style:font-size-asian="12pt" style:font-weight-asian="normal" style:font-size-complex="12pt" style:font-weight-complex="normal"/>
    </style:style>
    <style:style style:name="P30" style:family="paragraph" style:parent-style-name="Standard" style:list-style-name="L11">
      <style:text-properties fo:font-variant="normal" fo:text-transform="none" style:use-window-font-color="true" loext:opacity="0%" style:font-name="TwitterChirp" fo:font-size="12pt" fo:letter-spacing="normal" fo:font-style="normal" fo:font-weight="normal" officeooo:rsid="00245900" officeooo:paragraph-rsid="00245900" style:font-size-asian="12pt" style:font-weight-asian="normal" style:font-size-complex="12pt" style:font-weight-complex="normal"/>
    </style:style>
    <style:style style:name="P31" style:family="paragraph" style:parent-style-name="Standard">
      <style:text-properties fo:font-variant="normal" fo:text-transform="none" style:use-window-font-color="true" loext:opacity="0%" style:font-name="TwitterChirp" fo:font-size="11.25pt" fo:letter-spacing="normal" fo:font-style="normal" fo:font-weight="normal" officeooo:rsid="002214bf" officeooo:paragraph-rsid="002214bf" style:font-size-asian="12pt" style:font-weight-asian="normal" style:font-size-complex="12pt" style:font-weight-complex="normal"/>
    </style:style>
    <style:style style:name="P32" style:family="paragraph" style:parent-style-name="Standard">
      <style:text-properties fo:font-variant="normal" fo:text-transform="none" style:use-window-font-color="true" loext:opacity="0%" style:font-name="TwitterChirp" fo:font-size="11.25pt" fo:letter-spacing="normal" fo:font-style="normal" fo:font-weight="normal" officeooo:rsid="00282197" officeooo:paragraph-rsid="00282197" style:font-size-asian="12pt" style:font-weight-asian="normal" style:font-size-complex="12pt" style:font-weight-complex="normal"/>
    </style:style>
    <style:style style:name="P33" style:family="paragraph" style:parent-style-name="Standard">
      <style:text-properties fo:font-variant="normal" fo:text-transform="none" fo:color="#000000" loext:opacity="100%" style:font-name="sans-serif" fo:font-size="11.25pt" fo:letter-spacing="normal" fo:font-style="normal" fo:font-weight="normal" officeooo:rsid="002214bf" officeooo:paragraph-rsid="00282197" fo:background-color="transparent" style:font-size-asian="12pt" style:font-weight-asian="normal" style:font-size-complex="12pt" style:font-weight-complex="normal"/>
    </style:style>
    <style:style style:name="P34" style:family="paragraph" style:parent-style-name="Standard">
      <style:text-properties style:use-window-font-color="true" loext:opacity="0%" style:font-name="TwitterChirp" officeooo:paragraph-rsid="00282197"/>
    </style:style>
    <style:style style:name="P35" style:family="paragraph" style:parent-style-name="Text_20_body">
      <style:text-properties fo:color="#000000" loext:opacity="100%" style:font-name="sans-serif" fo:background-color="transparent"/>
    </style:style>
    <style:style style:name="P36"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7" style:family="paragraph" style:parent-style-name="Text_20_body" style:list-style-name="L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8" style:family="paragraph" style:parent-style-name="Text_20_body" style:list-style-name="L4">
      <style:text-properties fo:color="#000000" loext:opacity="100%" style:font-name="sans-serif" fo:background-color="transparent"/>
    </style:style>
    <style:style style:name="P39" style:family="paragraph" style:parent-style-name="Text_20_body" style:list-style-name="L4">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00ab2ec" officeooo:paragraph-rsid="000ab2ec" fo:background-color="transparent"/>
    </style:style>
    <style:style style:name="P40"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00ab2ec" officeooo:paragraph-rsid="000ab2ec" fo:background-color="transparent"/>
    </style:style>
    <style:style style:name="P41" style:family="paragraph" style:parent-style-name="Text_20_body" style:list-style-name="L4">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00b7e7d" officeooo:paragraph-rsid="000b7e7d" fo:background-color="transparent"/>
    </style:style>
    <style:style style:name="P42"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00b7e7d" officeooo:paragraph-rsid="000b7e7d" fo:background-color="transparent"/>
    </style:style>
    <style:style style:name="P43"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00bfb4d" officeooo:paragraph-rsid="000bfb4d" fo:background-color="transparent"/>
    </style:style>
    <style:style style:name="P44" style:family="paragraph" style:parent-style-name="Text_20_body" style:list-style-name="L4">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00bfb4d" officeooo:paragraph-rsid="000bfb4d" fo:background-color="transparent"/>
    </style:style>
    <style:style style:name="P45"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officeooo:paragraph-rsid="000bfb4d" fo:background-color="transparent"/>
    </style:style>
    <style:style style:name="P46" style:family="paragraph" style:parent-style-name="Text_20_body" style:list-style-name="L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47" style:family="paragraph" style:parent-style-name="Text_20_body" style:list-style-name="L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48" style:family="paragraph" style:parent-style-name="Text_20_body" style:list-style-name="L9">
      <loext:graphic-properties draw:fill="none" draw:fill-color="#ffffff"/>
      <style:paragraph-properties fo:margin-top="0in" fo:margin-bottom="0in" style:contextual-spacing="false" fo:background-color="transparent" style:writing-mode="lr-tb"/>
      <style:text-properties fo:color="#000000" loext:opacity="100%" style:font-name="sans-serif" officeooo:paragraph-rsid="001df50c" fo:background-color="transparent"/>
    </style:style>
    <style:style style:name="P49" style:family="paragraph" style:parent-style-name="Text_20_body" style:list-style-name="L10">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50" style:family="paragraph" style:parent-style-name="Text_20_body">
      <style:text-properties fo:color="#000000" loext:opacity="100%" style:font-name="sans-serif" officeooo:paragraph-rsid="001df50c" fo:background-color="transparent"/>
    </style:style>
    <style:style style:name="P51"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01df50c" officeooo:paragraph-rsid="001df50c" fo:background-color="transparent"/>
    </style:style>
    <style:style style:name="P52"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01ff26b" officeooo:paragraph-rsid="001ff26b" fo:background-color="transparent"/>
    </style:style>
    <style:style style:name="P53" style:family="paragraph" style:parent-style-name="Text_20_body">
      <style:text-properties fo:font-variant="normal" fo:text-transform="none" style:use-window-font-color="true" loext:opacity="0%" style:font-name="sans-serif" fo:font-size="11.25pt" fo:letter-spacing="normal" fo:font-style="normal" fo:font-weight="normal" officeooo:rsid="002214bf" officeooo:paragraph-rsid="002214bf" fo:background-color="transparent" style:font-size-asian="12pt" style:font-weight-asian="normal" style:font-size-complex="12pt" style:font-weight-complex="normal"/>
    </style:style>
    <style:style style:name="P54" style:family="paragraph" style:parent-style-name="Text_20_body">
      <style:text-properties fo:font-variant="normal" fo:text-transform="none" style:use-window-font-color="true" loext:opacity="0%" style:font-name="sans-serif" fo:font-size="11.25pt" fo:letter-spacing="normal" fo:font-style="normal" fo:font-weight="normal" officeooo:rsid="00269177" officeooo:paragraph-rsid="00269177" fo:background-color="transparent" style:font-size-asian="12pt" style:font-weight-asian="normal" style:font-size-complex="12pt" style:font-weight-complex="normal"/>
    </style:style>
    <style:style style:name="P55" style:family="paragraph" style:parent-style-name="Text_20_body" style:list-style-name="L13">
      <loext:graphic-properties draw:fill="none" draw:fill-color="#ffffff"/>
      <style:paragraph-properties fo:margin-top="0in" fo:margin-bottom="0in" style:contextual-spacing="false" fo:background-color="transparent"/>
      <style:text-properties style:use-window-font-color="true" loext:opacity="0%" style:font-name="sans-serif" fo:background-color="transparent"/>
    </style:style>
    <style:style style:name="P56" style:family="paragraph" style:parent-style-name="Text_20_body" style:list-style-name="L14">
      <loext:graphic-properties draw:fill="none" draw:fill-color="#ffffff"/>
      <style:paragraph-properties fo:margin-top="0in" fo:margin-bottom="0in" style:contextual-spacing="false" fo:background-color="transparent"/>
      <style:text-properties style:use-window-font-color="true" loext:opacity="0%" style:font-name="sans-serif" fo:background-color="transparent"/>
    </style:style>
    <style:style style:name="P57" style:family="paragraph" style:parent-style-name="Text_20_body">
      <loext:graphic-properties draw:fill="none" draw:fill-color="#ffffff"/>
      <style:paragraph-properties fo:margin-top="0in" fo:margin-bottom="0in" style:contextual-spacing="false" fo:background-color="transparent"/>
      <style:text-properties style:use-window-font-color="true" loext:opacity="0%" style:font-name="sans-serif" fo:background-color="transparent"/>
    </style:style>
    <style:style style:name="P58" style:family="paragraph" style:parent-style-name="Text_20_body" style:list-style-name="L13">
      <loext:graphic-properties draw:fill="none" draw:fill-color="#ffffff"/>
      <style:paragraph-properties fo:margin-top="0in" fo:margin-bottom="0in" style:contextual-spacing="false" fo:background-color="transparent"/>
      <style:text-properties style:use-window-font-color="true" loext:opacity="0%" style:font-name="sans-serif" officeooo:rsid="00269177" officeooo:paragraph-rsid="00269177" fo:background-color="transparent"/>
    </style:style>
    <style:style style:name="P59" style:family="paragraph" style:parent-style-name="Text_20_body" style:list-style-name="L14">
      <loext:graphic-properties draw:fill="none" draw:fill-color="#ffffff"/>
      <style:paragraph-properties fo:margin-top="0in" fo:margin-bottom="0in" style:contextual-spacing="false" fo:background-color="transparent"/>
      <style:text-properties style:use-window-font-color="true" loext:opacity="0%" style:font-name="sans-serif" officeooo:rsid="00269177" officeooo:paragraph-rsid="00269177" fo:background-color="transparent"/>
    </style:style>
    <style:style style:name="T1" style:family="text">
      <style:text-properties officeooo:rsid="000bfb4d"/>
    </style:style>
    <style:style style:name="T2" style:family="text">
      <style:text-properties officeooo:rsid="000d1d40"/>
    </style:style>
    <style:style style:name="T3" style:family="text">
      <style:text-properties fo:font-variant="normal" fo:text-transform="none" style:font-name="Arial" fo:font-size="10.5pt" fo:letter-spacing="normal" fo:font-style="normal" fo:font-weight="normal"/>
    </style:style>
    <style:style style:name="T4" style:family="text">
      <style:text-properties fo:font-variant="normal" fo:text-transform="none" style:font-name="Arial" fo:font-size="10.5pt" fo:letter-spacing="normal" fo:font-style="normal" fo:font-weight="normal" officeooo:rsid="0010fca4"/>
    </style:style>
    <style:style style:name="T5" style:family="text">
      <style:text-properties fo:font-variant="normal" fo:text-transform="none" fo:font-size="11.25pt" fo:letter-spacing="normal" fo:font-style="normal" fo:font-weight="normal" officeooo:rsid="00282197" style:font-size-asian="12pt" style:font-weight-asian="normal" style:font-size-complex="12pt" style:font-weight-complex="normal"/>
    </style:style>
    <style:style style:name="T6" style:family="text">
      <style:text-properties officeooo:rsid="001b5e92"/>
    </style:style>
    <style:style style:name="T7" style:family="text">
      <style:text-properties fo:color="#000000" loext:opacity="100%" style:font-name="sans-serif" fo:background-color="transparent" loext:char-shading-value="0"/>
    </style:style>
    <style:style style:name="T8" style:family="text">
      <style:text-properties fo:color="#000000" loext:opacity="100%" style:font-name="sans-serif" officeooo:rsid="00282197" fo:background-color="transparent" loext:char-shading-value="0"/>
    </style:style>
    <style:style style:name="T9" style:family="text">
      <style:text-properties officeooo:rsid="001d7262"/>
    </style:style>
    <style:style style:name="T10" style:family="text">
      <style:text-properties officeooo:rsid="001df50c"/>
    </style:style>
    <style:style style:name="T11" style:family="text">
      <style:text-properties officeooo:rsid="001ff26b"/>
    </style:style>
    <style:style style:name="T12" style:family="text">
      <style:text-properties officeooo:rsid="002214bf"/>
    </style:style>
    <style:style style:name="T13" style:family="text">
      <style:text-properties style:font-name="monospace" fo:font-size="10pt"/>
    </style:style>
    <style:style style:name="T14" style:family="text">
      <style:text-properties officeooo:rsid="0028219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3">I want to save the deployment for later. I’d like to add as much polish and functionality as possible first, add the payment part, then deploy…..roughly in that order. Here is what I believe is the next order of business:</text:p>
      <text:p text:style-name="P3"/>
      <text:list xml:id="list3033206147" text:style-name="L4">
        <text:list-item>
          <text:p text:style-name="P4">UI/UX Polish</text:p>
          <text:list>
            <text:list-item>
              <text:p text:style-name="P37">Add "Regenerate" button for individual platforms</text:p>
            </text:list-item>
            <text:list-item>
              <text:p text:style-name="P37">"Copy All" button</text:p>
            </text:list-item>
            <text:list-item>
              <text:p text:style-name="P37">Better loading animations</text:p>
            </text:list-item>
            <text:list-item>
              <text:p text:style-name="P37">Darker/more premium look</text:p>
            </text:list-item>
            <text:list-item>
              <text:p text:style-name="P6">Character count / token usage display</text:p>
            </text:list-item>
            <text:list-item>
              <text:p text:style-name="P5">How complicated would it be to add functionality to allow users to customize the look and feel of the app? What I mean is giving users the ability to change the color, or make the UI modular so users can move things around, or maybe the only want to see the blog and X output sections and want to remove the other output sections? If this is too complex, then I want to stay away from it. I have a good app now and I don’t want to break it by adding too many layers of complexity too early in the process.</text:p>
            </text:list-item>
            <text:list-item>
              <text:p text:style-name="P7">Would it be possible to allow users to choose a theme or wall paper? I’m thinking there could be different theme options like sci/fi, corporate, space, etc. but I’d like to keep it conservative, I’d don’t want anything too crazy.</text:p>
            </text:list-item>
          </text:list>
        </text:list-item>
      </text:list>
      <text:p text:style-name="P36"/>
      <text:list xml:id="list124721467590467" text:continue-numbering="true" text:style-name="L4">
        <text:list-item>
          <text:p text:style-name="P38">More Platforms</text:p>
          <text:list>
            <text:list-item>
              <text:p text:style-name="P37">Instagram captions + hashtags</text:p>
            </text:list-item>
            <text:list-item>
              <text:p text:style-name="P37">YouTube titles + descriptions</text:p>
            </text:list-item>
            <text:list-item>
              <text:p text:style-name="P37">Threads</text:p>
            </text:list-item>
            <text:list-item>
              <text:p text:style-name="P37">Newsletter style</text:p>
            </text:list-item>
            <text:list-item>
              <text:p text:style-name="P39">How complicated would it be to give users the ability to add a platform? Let’s say the app currently has You Tube listed as an available platform, but a user would like to add Rumble, could we provide users with the ability to add it? I think this would be a good idea. I’m guessing there would need to be some kind of instructions for doing this, maybe a user admin section? </text:p>
            </text:list-item>
          </text:list>
        </text:list-item>
      </text:list>
      <text:p text:style-name="P40"/>
      <text:list xml:id="list124721522465486" text:continue-numbering="true" text:style-name="L4">
        <text:list-item>
          <text:p text:style-name="P39">PDF</text:p>
          <text:list>
            <text:list-item>
              <text:p text:style-name="P39">Given all the trouble PDF has given us, I’m thinking it may be a good idea to just stay away from trying to let users upload PDFs. I may be wrong, but if a user has content saved to a document, the chances of that document being a PDF are probably small. Do you agree? On the other hand, allowing users to export to a PDF may be useful. That being said, I don’t want to endure 4 hours of debugging again just to add that functionality. I like the idea of allowing users to export the content, but would it be easier to limit this to word docs and txt? I admit, I’m looking for the easy button here.</text:p>
            </text:list-item>
          </text:list>
        </text:list-item>
      </text:list>
      <text:p text:style-name="P40"/>
      <text:p text:style-name="P40"><text:soft-page-break/></text:p>
      <text:list xml:id="list124721394802699" text:continue-numbering="true" text:style-name="L4">
        <text:list-item>
          <text:p text:style-name="P8">Monetization Path</text:p>
          <text:list>
            <text:list-item>
              <text:p text:style-name="P41">I’d like this to be the last thing we wire up before deployment, but we could probably work on the UI part with a pricing page.</text:p>
            </text:list-item>
            <text:list-item>
              <text:p text:style-name="P41">We also need to discuss what the price should be. Should there be one plan, or multiple? I’m kind of a fan of the multi tiered plan, with a basic free option. If we go this route, we need to discuss what functionality to offer at each tier. I’m guessing token usage would be a part of this as well. What would be considered reasonable? Do services like this already exist? If so, what do they charge and how difficult would it be to to offer this app at a cheaper rate?</text:p>
            </text:list-item>
          </text:list>
        </text:list-item>
      </text:list>
      <text:p text:style-name="P42"/>
      <text:list xml:id="list124721956079331" text:continue-numbering="true" text:style-name="L4">
        <text:list-item>
          <text:p text:style-name="P44">Functionality</text:p>
          <text:list>
            <text:list-item>
              <text:p text:style-name="P44">Is there any other functionality that would make this app more robust, feel more premium, and stand out among other apps?</text:p>
            </text:list-item>
            <text:list-item>
              <text:p text:style-name="P44">What could this app offer that isn’t already offered by 100 other apps?</text:p>
            </text:list-item>
            <text:list-item>
              <text:p text:style-name="P44">What would make users chose this app over 100 other apps with similar functionality?</text:p>
            </text:list-item>
          </text:list>
        </text:list-item>
      </text:list>
      <text:p text:style-name="P43"/>
      <text:p text:style-name="P45"><text:span text:style-name="T1">What are your thoughts on the above? Once we get all of this sorted out, I think we’ll be ready to integrate with </text:span>Lemon Squeezy, <text:span text:style-name="T1">then deploy. </text:span><text:span text:style-name="T2">I’d like to do as much of this at once as possible. What I mean is, I understand some things may need to be tested before we can move on to the next thing, but I’d rather not have to change the code each thing I’ve listed above. I’d like to combine as much as we can. Tell me your thoughts first, then I’ll tell you what I’d like to start with. </text:span></text:p>
      <text:p text:style-name="P40"/>
      <text:p text:style-name="P36"/>
      <text:p text:style-name="P36"/>
      <text:p text:style-name="P36"/>
      <text:p text:style-name="P36"/>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On this Kentucky Derby day, here’s your reminder that Secretariat was faster than any horse who has ever lived. The year is 1973 and this is his track record run. Untouched for 53 years. The GOAT.</text:p>
      <text:p text:style-name="P3"/>
      <text:p text:style-name="P3"/>
      <text:p text:style-name="P3"/>
      <text:p text:style-name="P3">On this Kentucky Derby day, here’s your reminder that Secretariat was faster than any horse who has ever lived. The year is 1973 and this is his track record run. Untouched for 53 years. The GOAT.</text:p>
      <text:p text:style-name="P3"/>
      <text:p text:style-name="P3"/>
      <text:p text:style-name="P3"/>
      <text:p text:style-name="P10">I’m not sure if You Tube and Rumble are working correctly. Here is the input I used:</text:p>
      <text:p text:style-name="P10"/>
      <text:p text:style-name="P10">Roger Moore was 45 when he debuted as Bond in Live and Let Die (1973), the oldest actor to take the role at the time. He played 007 across 7 films over 12 years, ending with A View to a Kill (1985) at age 57. He remains the longest serving Bond.</text:p>
      <text:p text:style-name="P10"/>
      <text:p text:style-name="P10">Here is the out put for You Tube:</text:p>
      <text:p text:style-name="P10"><text:span text:style-name="T3">[object Object]</text:span> </text:p>
      <text:p text:style-name="P10"/>
      <text:p text:style-name="P10">Here is the out put for Rumble:</text:p>
      <text:p text:style-name="P10"><text:span text:style-name="T3">[object Object]</text:span></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1"><text:span text:style-name="T3">Ok here is somethings that may need some tweaking: </text:span></text:p>
      <text:p text:style-name="P11"><text:span text:style-name="T3"/></text:p>
      <text:list xml:id="list3882129004" text:style-name="L5">
        <text:list-item>
          <text:p text:style-name="P12"><text:span text:style-name="T4">When I add text to the “Input Content” box, then click “Amplify Content” it adds the content to each platform section. If I then drop a document with new content, it will “Amplify” it in each of the platform fields, but “Input Content” box won’t change, it will have the same content from the previous job. I’m thinking in this scenario, the text in the “Input Content” box should change to what was in the document that was dropped.</text:span></text:p>
        </text:list-item>
        <text:list-item>
          <text:p text:style-name="P13"><text:span text:style-name="T4">I</text:span><text:span text:style-name="T3">f I drop a word doc, the output in the Newsletter field is [object Object]</text:span></text:p>
        </text:list-item>
        <text:list-item>
          <text:p text:style-name="P13"><text:span text:style-name="T3">The first time I droped a txt, the output in the Newsletter field appears to be an email. The second time I dropped a txt, the output in the Newsletter field is [object Object]</text:span></text:p>
        </text:list-item>
        <text:list-item>
          <text:p text:style-name="P13"><text:span text:style-name="T4">When I add text to the “Input Content” box, then click “Amplify Content”, </text:span><text:span text:style-name="T3">the output in the Newsletter field is [object Object]</text:span></text:p>
        </text:list-item>
        <text:list-item>
          <text:p text:style-name="P13"><text:span text:style-name="T3">another time I dropped a word doc and this was the output for every platform field:</text:span></text:p>
        </text:list-item>
      </text:list>
      <text:p text:style-name="P14"><text:span text:style-name="T3">```json</text:span></text:p>
      <text:p text:style-name="P14"><text:span text:style-name="T3">{</text:span></text:p>
      <text:p text:style-name="P14"><text:span text:style-name="T3"><text:s text:c="2"/>"linkedin": "📚 Preparing for your online exam on Genesis? Check out our comprehensive study guide covering key topics from Genesis 27:1 – 37:1! Dive deep into the reasons behind Isaac’s actions, Jacob’s deceptions, and the significant events surrounding the lives of Isaac, Jacob, and Esau. Remember, this guide is for studying purposes only. Good luck! #Genesis #StudyGuide #OnlineExam #BiblicalStudies",</text:span></text:p>
      <text:p text:style-name="P14"><text:span text:style-name="T3"><text:s text:c="2"/>"twitter": "📖 Ready for the Genesis exam? Our study guide covers key questions from chapters 27-37! Dive in and prepare! Good luck! #Genesis #ExamPrep",</text:span></text:p>
      <text:p text:style-name="P14"><text:soft-page-break/><text:span text:style-name="T3"><text:s text:c="2"/>"instagram": "🚀 Get ready to ace your online exam on Genesis! 📝 Our study guide will help you tackle key questions from chapters 27:1 - 37:1. Remember, this guide is just for your preparation! Swipe for tips and good luck! #Genesis #ExamPrep #BibleStudy #FaithJourney",</text:span></text:p>
      <text:p text:style-name="P14"><text:span text:style-name="T3"><text:s text:c="2"/>"youtube": "Mastering Genesis: Your Ultimate Study Guide for Online Exams! | Genesis 27:1 - 37:1 Overview\n\nIn this video, we break down key questions from Genesis chapters 27 to 37, designed to help you prepare for your online exam. From Isaac’s choices to Jacob’s family dynamics, we cover it all! \n\nTimestamps:\n0:00 Introduction\n1:30 Isaac and Esau’s Story\n3:45 Jacob’s Deceit\n6:10 Jacob’s Vision\n8:40 Meet the Family: Jacob’s Wives\n12:00 The Twelve Sons of Jacob\n15:00 Conclusion\n\nGood luck on your exam! Don’t forget to like and subscribe for more biblical study content!",</text:span></text:p>
      <text:p text:style-name="P14"><text:span text:style-name="T3"><text:s text:c="2"/>"rumble": "Ace Your Genesis Exam with This Study Guide!\n\nPrepare yourself for the online exam covering Genesis 27:1 - 37:1 with our detailed study guide! Uncover the secrets behind Isaac’s motivations and Jacob’s cunning strategies. This guide is essential for anyone looking to deepen their understanding of these pivotal biblical narratives. Don’t just memorize—understand!",</text:span></text:p>
      <text:p text:style-name="P14"><text:span text:style-name="T3"><text:s text:c="2"/>"threads": "Hey everyone! 🌟 If you're gearing up for the online exam on Genesis, we've got a handy study guide for you! It covers all the major points from chapters 27 to 37. Remember, it's just a study tool, so dive in and prepare well! What are you most excited to learn? #Genesis #ExamPrep",</text:span></text:p>
      <text:p text:style-name="P14"><text:span text:style-name="T3"><text:s text:c="2"/>"newsletter": {</text:span></text:p>
      <text:p text:style-name="P14"><text:span text:style-name="T3"><text:s text:c="4"/>"subject": "Your Genesis Study Guide is Here!",</text:span></text:p>
      <text:p text:style-name="P14"><text:span text:style-name="T3"><text:s text:c="4"/>"body": "Hello there!\n\nAre you ready for your upcoming online exam on Genesis? We’ve prepared a comprehensive study guide that covers the essential questions from Genesis 27:1 - 37:1. This guide will help you navigate through the intricate stories of Isaac, Jacob, and Esau. \n\nRemember, this guide is for your preparation only, not to be submitted as the exam itself. Dive into it and best of luck!\n\nHappy studying,\n[Your Name]"</text:span></text:p>
      <text:p text:style-name="P14"><text:span text:style-name="T3"><text:s text:c="2"/>},</text:span></text:p>
      <text:p text:style-name="P14"><text:span text:style-name="T3"><text:s text:c="2"/>"odysee": "Prepare for Your Genesis Exam! | Study Guide Overview\n\nJoin us as we explore a detailed study guide for the online exam on Genesis chapters 27-37. This guide is packed with essential questions and insights to help you ace your exam. Remember, it’s for study purposes only! Let’s dive deep into the fascinating stories of Isaac, Jacob, and Esau."</text:span></text:p>
      <text:p text:style-name="P14"><text:span text:style-name="T3">}</text:span></text:p>
      <text:p text:style-name="P14"><text:span text:style-name="T3">```</text:span></text:p>
      <text:list xml:id="list3681110324" text:style-name="L6">
        <text:list-item>
          <text:p text:style-name="P15"><text:span text:style-name="T3">The Copy All button no longer requires users to click OK in the alert box before the content is copied to the clipboard, but the copy function in each individual platform field still requires users to click OK in the alert box before the content is copied to the clipboard. This will need to be fixed for every individual platform field.</text:span></text:p>
        </text:list-item>
      </text:list>
      <text:p text:style-name="P11"><text:span text:style-name="T3"/></text:p>
      <text:p text:style-name="P11"><text:span text:style-name="T3"/></text:p>
      <text:p text:style-name="P11"><text:span text:style-name="T3">I no longer see email as an available platform field. It looks like email content is being generated in the “Newsletter” field. </text:span></text:p>
      <text:p text:style-name="P11"><text:span text:style-name="T3"/></text:p>
      <text:p text:style-name="P14"><text:span text:style-name="T3">There seeme to be </text:span></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oft-page-break/><text:span text:style-name="T3"/></text:p>
      <text:p text:style-name="P14"><text:span text:style-name="T3"/></text:p>
      <text:p text:style-name="P14"><text:span text:style-name="T3"/></text:p>
      <text:p text:style-name="P14"/>
      <text:p text:style-name="P14"/>
      <text:p text:style-name="P14"/>
      <text:p text:style-name="P14"/>
      <text:p text:style-name="P16"><text:span text:style-name="T4">When I add text to the “Input Content” box:</text:span></text:p>
      <text:p text:style-name="P16"><text:span text:style-name="T4"/></text:p>
      <text:p text:style-name="P16">This is the output for newsletter:</text:p>
      <text:p text:style-name="P14"/>
      <text:p text:style-name="P16">[output Output]</text:p>
      <text:p text:style-name="P16"/>
      <text:p text:style-name="P16"/>
      <text:p text:style-name="P16">This is the output for You Tube:</text:p>
      <text:p text:style-name="P16">How James Cameron Sold 'Aliens' in Seconds! | The Power of Visual Communication in Film</text:p>
      <text:p text:style-name="P16"/>
      <text:p text:style-name="P16"/>
      <text:p text:style-name="P17">I don’t think that is the correct content for you tube, I think it’s supposed to have more information than that.</text:p>
      <text:p text:style-name="P17"/>
      <text:p text:style-name="P17">When I drop a word doc, the text is pasted into the Input Content box, which is good, but the output in every platform field is this:</text:p>
      <text:p text:style-name="P17"/>
      <text:p text:style-name="P17"><text:span text:style-name="T3">```json { "linkedin": "📚 Preparing for your online exam on Genesis? Check out our comprehensive study guide covering chapters 1-11! 💡 From the order of creation to the attributes of God, we've got you covered. Remember, this guide is for study purposes only—don't submit it as your exam! #Genesis #StudyGuide #OnlineExam #Education #BiblicalStudies", "twitter": "🚀 Ready for your Genesis exam? Our study guide covers everything from creation to Old Testament history! 📖 #Genesis #StudyGuide #OnlineExam", "instagram": "🌟 Get ready for your Genesis online exam with our handy study guide covering chapters 1-11! From creation to Old Testament history, we’ve got it all mapped out for you. Remember, this is for study purposes only! 📖✨ #Genesis #BibleStudy #OnlineExam #Faith #Education", "youtube": "Unlock the Secrets of Genesis: Study Guide for Online Exam | Chapters 1-11! | Detailed Overview &amp; Tips", "rumble": "Master Your Genesis Exam with This Study Guide! | Chapters 1-11 Insights", "threads": "Hey everyone! 🎓 Are you prepping for the Genesis online exam? We’ve put together a study guide to help you ace those chapters 1-11! Let’s dive into creation, the attributes of God, and more. What are you most excited to study?", "newsletter": { "subject": "Prepare for Your Genesis Online Exam with Our Study Guide!", "body": "Dear Students,\n\nAs you prepare for your upcoming online exam on Genesis, we are pleased to provide you with a comprehensive study guide covering chapters 1-11. Please remember that this guide is intended for study purposes only and should not be submitted as your exam.\n\nFrom the order of creation to the attributes of God, this guide will help reinforce your understanding of the material. Best of luck in your studies!\n\nSincerely,\n[Your Name/Organization]" }, "email": "Subject: Get Ready for Your Genesis Exam! \nBody: Hi there! Don’t forget to check out our Genesis study guide for chapters 1-11 before your online exam. It’s packed with everything you need to know! Good luck!", "odysee": { "title": "Genesis Study Guide: Prepare for Your Online Exam", "description": "Join us as we explore the essential elements of Genesis chapters 1-11! This study guide will help you understand the creation, the life of Noah, and much more. Ideal for anyone preparing for their online exam. Don’t miss out!" } }</text:span> </text:p>
      <text:p text:style-name="P17"/>
      <text:p text:style-name="P17"/>
      <text:p text:style-name="P17"/>
      <text:p text:style-name="P17">When I drop a txt, everything appears to be correct except the output in the Newsletter is [output Output]</text:p>
      <text:p text:style-name="P17"><text:soft-page-break/></text:p>
      <text:p text:style-name="P17"/>
      <text:p text:style-name="P17"/>
      <text:p text:style-name="P17">The copy function for each individual platform field still requires me to click OK in the alert box before anything is copied to the clipboard. </text:p>
      <text:p text:style-name="P17"/>
      <text:p text:style-name="P17"/>
      <text:p text:style-name="P17">Then I tried pasting text in the Input Content box again, and both Newsletter and Odysee fields have the “[output Output]” as output.</text:p>
      <text:p text:style-name="P17"/>
      <text:p text:style-name="P17"/>
      <text:p text:style-name="P18"/>
      <text:p text:style-name="P18"/>
      <text:p text:style-name="P18">These issues are either completely random and there is something majorly wrong with the code, or these platform fields are input content dependent, meaning the app can’t handle all input and some types of input may cause the output in some of the platform fields to mess up. What are your thoughts? I don’t want to spend the rest of my natural life debugging this.</text:p>
      <text:p text:style-name="P18"/>
      <text:p text:style-name="P18"/>
      <text:p text:style-name="P18"/>
      <text:p text:style-name="P18">While we are on the subject of making improvements, I’m also thinking we should add something off to the side in the UI the explains what the point of the app is. Something brief, consise, and easy to understand that explains what the app is used for, and how people can benefit from using it. What do you thin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20">I only tested dropping a word doc. I did it once and saw 2 things:</text:p>
      <text:p text:style-name="P20"/>
      <text:p text:style-name="P20">The newsletter field still says [object Object]</text:p>
      <text:p text:style-name="P20"/>
      <text:p text:style-name="P20">There’s a platform field that was just created called “Description” with a decent little description of what was in the word doc. The thing about this field is it wasn’t in our list so I’m not sure how or why it was created. The other thing is it appears randomly, not every time I use the app. I saw it a couple time when I was testing before, but couldn’t get it to appear again after a few additional rounds of testing until just now. I think it’s a good field to have since it seems to summarize the doc I dropped, but it should appear every time I drop a doc, no matter if it is a word or txt, and it shouldn’t just appear randomly.</text:p>
      <text:p text:style-name="P20"/>
      <text:p text:style-name="P20"/>
      <text:p text:style-name="P20">The individual copy function still doesn’t work until I click ok in the alert box.</text:p>
      <text:p text:style-name="P20"/>
      <text:p text:style-name="P20"/>
      <text:p text:style-name="P20">The other issue is, none of the content in any of the platform fields appear to be correct:</text:p>
      <text:p text:style-name="P20"/>
      <text:p text:style-name="P20">LINKEDIN:</text:p>
      <text:p text:style-name="P20">Thank you for choosing to study with the WVBS Online Bible School! We appreciate your commitment to deepening your knowledge. Enclosed are the study guides for your selected course. Remember, while preparing, it's essential to answer all questions, but during exams, rely solely on your memory. Best of luck! - Russell Haffner, Director, WVBS Online Bible School</text:p>
      <text:p text:style-name="P20"/>
      <text:p text:style-name="P20">X:</text:p>
      <text:p text:style-name="P20">Excited to have you at WVBS Online Bible School! 📚 Remember to prepare with the study guides and take your exams from memory only. Good luck! 🙏 #BibleStudy #WVBS</text:p>
      <text:p text:style-name="P20"/>
      <text:p text:style-name="P20">INSTAGRAM:</text:p>
      <text:p text:style-name="P20">Thank you for being part of the WVBS Online Bible School! 📖✨ Dive into your study guides and prepare for your exams. Just a reminder: during the exams, trust your memory! 🌟 #BibleSchool #StudyHard #FaithJourney</text:p>
      <text:p text:style-name="P20"/>
      <text:p text:style-name="P20">YOUTUBE:</text:p>
      <text:p text:style-name="P20">Mastering Your Knowledge: WVBS Online Bible School Exam Preparation</text:p>
      <text:p text:style-name="P20"/>
      <text:p text:style-name="P20">RUMBLE:</text:p>
      <text:p text:style-name="P20">Prepare for Success with WVBS Online Bible School! Get ready to tackle your exams by studying your guides and relying on your memory during the test. You’ve got this!</text:p>
      <text:p text:style-name="P20"/>
      <text:p text:style-name="P20">THREADS:</text:p>
      <text:p text:style-name="P20">Hey everyone! Just wanted to say a big thank you to our WVBS Online Bible School students! Make sure to check out your study guides and remember to rely on your memory when it’s exam time. You’re all going to do amazing! 🙌</text:p>
      <text:p text:style-name="P20"/>
      <text:p text:style-name="P20">NEWSLETTER:</text:p>
      <text:p text:style-name="P20"><text:soft-page-break/>[object Object]</text:p>
      <text:p text:style-name="P20"/>
      <text:p text:style-name="P20">EMAIL:</text:p>
      <text:p text:style-name="P20">Dear Student, thank you for studying with WVBS Online Bible School! Attached are your study guides. Please prepare thoroughly, but remember to take your exams from memory. Best, Russell Haffner.</text:p>
      <text:p text:style-name="P20"/>
      <text:p text:style-name="P20">ODYSEE:</text:p>
      <text:p text:style-name="P20">WVBS Online Bible School: Essential Study Guide Information</text:p>
      <text:p text:style-name="P20"/>
      <text:p text:style-name="P20">DESCRIPTION:</text:p>
      <text:p text:style-name="P20">Thank you for choosing the WVBS Online Bible School! Attached are your study guides. Prepare for your exams by answering all questions, but remember to trust your memory during the tests. You’ve got this!</text:p>
      <text:p text:style-name="P20"/>
      <text:p text:style-name="P20"/>
      <text:p text:style-name="P20"/>
      <text:p text:style-name="P19">These issues are either completely random and there is something majorly wrong with the code, or these platform fields are input content dependent, meaning the app can’t handle all input and some types of input may cause the output in some of the platform fields to mess up. What are your thoughts? I don’t want to spend the rest of my natural life debugging this.</text:p>
      <text:p text:style-name="P19"/>
      <text:p text:style-name="P19"/>
      <text:p text:style-name="P19"/>
      <text:p text:style-name="P19">While we are on the subject of making improvements, I’m also thinking we should add something off to the side in the UI the explains what the point of the app is. Something brief, consise, and easy to understand that explains what the app is used for, and how people can benefit from using it. What do you think?</text:p>
      <text:p text:style-name="P19"/>
      <text:p text:style-name="P19"/>
      <text:p text:style-name="P19"/>
      <text:p text:style-name="P19"/>
      <text:p text:style-name="P19"/>
      <text:p text:style-name="P19"/>
      <text:p text:style-name="P21"/>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1"><text:soft-page-break/>Well, the copy feature works and I don’t see the [object Object] thing anymore!!!! I’m not 100% sold on the output, but the output may be the way it is because of the input used. I tested using test in the input box, dropping a word doc, and dropping a txt. I’ll post the output from all 3 tests and you tell me what you think. I do see the description field when I dropped the word doc and txt.</text:p>
      <text:p text:style-name="P21"/>
      <text:p text:style-name="P21"/>
      <text:p text:style-name="P21"/>
      <text:p text:style-name="P21">Output from the txt:</text:p>
      <text:p text:style-name="P21"/>
      <text:p text:style-name="P21"/>
      <text:p text:style-name="P21"/>
      <text:p text:style-name="P21"/>
      <text:p text:style-name="P21"/>
      <text:p text:style-name="P21"/>
      <text:p text:style-name="P21"/>
      <text:p text:style-name="P21">Output from the word doc:</text:p>
      <text:p text:style-name="P21"/>
      <text:p text:style-name="P21"/>
      <text:p text:style-name="P21"/>
      <text:p text:style-name="P21"/>
      <text:p text:style-name="P21">Output from typing text in the input box:</text:p>
      <text:p text:style-name="P21"/>
      <text:p text:style-name="P21"/>
      <text:p text:style-name="P21"/>
      <text:p text:style-name="P21"/>
      <text:p text:style-name="P21"/>
      <text:p text:style-name="P21"/>
      <text:p text:style-name="P21"/>
      <text:p text:style-name="P22"><text:span text:style-name="T6">The </text:span>How ContentAmplifier Works <text:span text:style-name="T6">section is pretty good, but I’d like to make these changes:</text:span></text:p>
      <text:p text:style-name="P22"/>
      <text:p text:style-name="P23">step one should say:</text:p>
      <text:p text:style-name="P23">Start by typing or pasting text directly into the input box</text:p>
      <text:p text:style-name="P23">You can also either upload or drop a file in the drop box (DOCX or TXT)</text:p>
      <text:p text:style-name="P23"/>
      <text:p text:style-name="P23"/>
      <text:p text:style-name="P23">Step 2 should say:</text:p>
      <text:p text:style-name="P23">We amplify your text by optimizing it for SEO and 8 major platforms</text:p>
      <text:p text:style-name="P23"/>
      <text:p text:style-name="P23"/>
      <text:p text:style-name="P23">Step 3 should say:</text:p>
      <text:p text:style-name="P23">The result is optimized content, ready for posting.</text:p>
      <text:p text:style-name="P23"/>
      <text:p text:style-name="P23"/>
      <text:p text:style-name="P23">Id like for you to make this better, but what I’ve outlined above is the general direction I’d like to go with the How-To section. What are your thoughts?</text:p>
      <text:p text:style-name="P23"/>
      <text:p text:style-name="P23"/>
      <text:p text:style-name="P23"/>
      <text:p text:style-name="P23"/>
      <text:p text:style-name="P23"><text:soft-page-break/></text:p>
      <text:p text:style-name="P23"/>
      <text:p text:style-name="P24">Here’s what I’m thinking:</text:p>
      <text:p text:style-name="P23"/>
      <text:p text:style-name="P23"/>
      <text:p text:style-name="P23"/>
      <text:p text:style-name="P9">Free Tier</text:p>
      <text:list xml:id="list3728112515" text:style-name="L8">
        <text:list-item>
          <text:p text:style-name="P46">Limited <text:span text:style-name="T9">to 10 </text:span>generations per month</text:p>
        </text:list-item>
        <text:list-item>
          <text:p text:style-name="P46">Basic platforms only</text:p>
        </text:list-item>
        <text:list-item>
          <text:p text:style-name="P46">Good for testing / light users</text:p>
        </text:list-item>
      </text:list>
      <text:p text:style-name="P36"/>
      <text:p text:style-name="P35">Pro Tier (<text:span text:style-name="T9">$</text:span>1<text:span text:style-name="T10">3</text:span>/month)</text:p>
      <text:list xml:id="list3152675697" text:style-name="L9">
        <text:list-item>
          <text:p text:style-name="P47">Unlimited generations</text:p>
        </text:list-item>
        <text:list-item>
          <text:p text:style-name="P47">All platforms</text:p>
        </text:list-item>
        <text:list-item>
          <text:p text:style-name="P47">History storage</text:p>
        </text:list-item>
        <text:list-item>
          <text:p text:style-name="P47">Priority support</text:p>
        </text:list-item>
      </text:list>
      <text:p text:style-name="P36"/>
      <text:p text:style-name="P35">Business Tier ($29-49/month) – <text:span text:style-name="T9">I think this should be a phase 2 item.</text:span></text:p>
      <text:list xml:id="list3704326235" text:style-name="L10">
        <text:list-item>
          <text:p text:style-name="P49">Team accounts</text:p>
        </text:list-item>
        <text:list-item>
          <text:p text:style-name="P49">Custom platforms</text:p>
        </text:list-item>
        <text:list-item>
          <text:p text:style-name="P49">API access</text:p>
        </text:list-item>
        <text:list-item>
          <text:p text:style-name="P49">White label option (future)</text:p>
        </text:list-item>
      </text:list>
      <text:p text:style-name="P36"/>
      <text:p text:style-name="P36"/>
      <text:p text:style-name="P51">We would need to implement easy cancellation functionality so users can cancel anytime. Would we need to provide that logic, or is this something Lemon Squeezy would handle for us? Either way, I’m thinking we’d also need to provide logic that prevents users from using the pro tier if they cancel or didn’t pay for it.</text:p>
      <text:p text:style-name="P36"/>
      <text:p text:style-name="P51">There should be a button at the top of the page, to the left of history, that says “Pricing”. When a user clicks on it, they should be taken to a new page. This new page should have all the pricing details, the cancellation policy, and anything else related to pricing. I’d like for it to have the same look and feel as the home page. The pricing page should have the pricing button that is shown on the home page removed. In it’s place should be a button that says “Home”. <text:span text:style-name="T11">While in the pricing page, if the user clicks on this Home button, they should be taken back to the home page. </text:span></text:p>
      <text:p text:style-name="P51"/>
      <text:p text:style-name="P52">I’d like for there to be another button at the top of the home page, to the left of the Pricing button that says “Why Amplify”. When users click on this button, they should be taken to a new page that explains it means to amplify content, what SEO means, and how users will benefit from both. This Why Amplify page should have the same look and feel as the home <text:soft-page-break/>page. At the top of the page the Why Amplify button should be removed, in it’s place there should be a “Home” button that takes users back to the home page when they click on it. </text:p>
      <text:p text:style-name="P36"/>
      <text:p text:style-name="P36"/>
      <text:p text:style-name="P52">What do you think about all of this, is it doable?</text:p>
      <text:p text:style-name="P36"/>
      <text:p text:style-name="P36"/>
      <text:p text:style-name="P36"/>
      <text:p text:style-name="P36"/>
      <text:p text:style-name="P36"/>
      <text:p text:style-name="P50"><text:span text:style-name="T10">Starter</text:span> Tier (<text:span text:style-name="T9">$</text:span><text:span text:style-name="T10">10</text:span>/month)</text:p>
      <text:list xml:id="list124720933704847" text:continue-list="list3152675697" text:style-name="L9">
        <text:list-item>
          <text:p text:style-name="P48"><text:span text:style-name="T10">200</text:span> generations <text:span text:style-name="T10">per month</text:span></text:p>
        </text:list-item>
        <text:list-item>
          <text:p text:style-name="P48">All platforms</text:p>
        </text:list-item>
        <text:list-item>
          <text:p text:style-name="P48">History storage</text:p>
        </text:list-item>
        <text:list-item>
          <text:p text:style-name="P48">Priority support</text:p>
        </text:list-item>
      </text:list>
      <text:p text:style-name="P23"/>
      <text:p text:style-name="P23"/>
      <text:p text:style-name="P23"/>
      <text:p text:style-name="P23"/>
      <text:p text:style-name="P23"/>
      <text:p text:style-name="P23"/>
      <text:p text:style-name="P25">This is pretty good! On the pricing page, I’d like to remove the Business section for now because it will require adding logic that I don’t want to debug right now. Let’s keep it as a phase 2 item. </text:p>
      <text:p text:style-name="P25"/>
      <text:p text:style-name="P25">I would like to add some logic that provides free Pro access to myself and anyone I choose. I’m not sure how to implement this though, what are your thoughts? I don’t really want to get involved with promo codes, at least not right now. <text:span text:style-name="T12">Does Lemon Squeezy offer some kind of functionality for this?</text:span></text:p>
      <text:p text:style-name="P25"/>
      <text:p text:style-name="P26">During an earlier conversation you mentioned something about “sharing” as possible additional functionality. Id like to explore this more and understand what it would mean. </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7">The good news is clicking the share button did give me a link:</text:p>
      <text:p text:style-name="P26"/>
      <text:p text:style-name="P28"><text:a xlink:type="simple" xlink:href="http://localhost:3000/share/89685b8e-7d27-490d-846f-86f5d8dec5a8" text:style-name="Internet_20_link" text:visited-style-name="Visited_20_Internet_20_Link">http://localhost:3000/share/89685b8e-7d27-490d-846f-86f5d8dec5a8</text:a></text:p>
      <text:p text:style-name="P28"/>
      <text:p text:style-name="P28"/>
      <text:p text:style-name="P29">Now here’s the not so good news:</text:p>
      <text:p text:style-name="P29"/>
      <text:list xml:id="list1112948728" text:style-name="L11">
        <text:list-item>
          <text:p text:style-name="P30">I had to click ok in the alert box before the link was copied to the clipboard.</text:p>
        </text:list-item>
        <text:list-item>
          <text:p text:style-name="P30">The link did not take me to a read only page, instead I got a 404 error:</text:p>
        </text:list-item>
        <text:list-item>
          <text:h text:style-name="P1" text:outline-level="1">404</text:h>
        </text:list-item>
      </text:list>
      <text:h text:style-name="P2" text:outline-level="2">This page could not be found.</text:h>
      <text:list xml:id="list124721217666376" text:continue-numbering="true" text:style-name="L11">
        <text:list-item>
          <text:list>
            <text:list-item>
              <text:p text:style-name="P30">Is this because I’m running it locally, or is there something wrong with the code?</text:p>
            </text:list-item>
          </text:list>
        </text:list-item>
      </text:list>
      <text:p text:style-name="P28"/>
      <text:p text:style-name="P28"/>
      <text:p text:style-name="P28"/>
      <text:p text:style-name="P28"/>
      <text:p text:style-name="P28"/>
      <text:p text:style-name="P28"><text:a xlink:type="simple" xlink:href="http://localhost:3000/share/e538ed9f-fb8c-4be0-b443-822726488d67" text:style-name="Internet_20_link" text:visited-style-name="Visited_20_Internet_20_Link">http://localhost:3000/share/e538ed9f-fb8c-4be0-b443-822726488d67</text:a></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http://localhost:3000/share/3c40c562-fe18-4dd3-b13f-a07b97df2390</text:p>
      <text:p text:style-name="P28"/>
      <text:p text:style-name="P28"/>
      <text:p text:style-name="P28"/>
      <text:p text:style-name="P28"/>
      <text:p text:style-name="P28"/>
      <text:p text:style-name="P31"><text:a xlink:type="simple" xlink:href="http://localhost:3000/share/df7f6100-ff79-4c19-a0f1-f7c696625d62" text:style-name="Internet_20_link" text:visited-style-name="Visited_20_Internet_20_Link">http://localhost:3000/share/df7f6100-ff79-4c19-a0f1-f7c696625d62</text:a></text:p>
      <text:p text:style-name="P31"/>
      <text:p text:style-name="P31"/>
      <text:p text:style-name="P31"/>
      <text:p text:style-name="P31"/>
      <text:p text:style-name="P31"/>
      <text:p text:style-name="P31"/>
      <text:p text:style-name="P31"/>
      <text:p text:style-name="P53">Can you paste the current <text:span text:style-name="T13">app/share/[id]/page.tsx</text:span> and the relevant part of the share logic (probably in <text:span text:style-name="T13">app/api/repurpose/route.ts</text:span> or wherever you generate the shareable record)?</text:p>
      <text:p text:style-name="P54">That is here:</text:p>
      <text:p text:style-name="P54"/>
      <text:p text:style-name="P54"/>
      <text:p text:style-name="P53"/>
      <text:p text:style-name="P53"/>
      <text:list xml:id="list4236688144" text:style-name="L13">
        <text:list-item>
          <text:p text:style-name="P55">Are you storing the repurposed content in Supabase as a JSON column, or separate fields per platform? </text:p>
          <text:list>
            <text:list-item>
              <text:p text:style-name="P58">Yes, I believe so, but I can show you the tables if you need me to. There are 2 total tables, one for the main DB, and one for the read only access link.</text:p>
            </text:list-item>
          </text:list>
        </text:list-item>
      </text:list>
      <text:p text:style-name="P57"/>
      <text:p text:style-name="P57"/>
      <text:p text:style-name="P57"/>
      <text:list xml:id="list3519232239" text:style-name="L14">
        <text:list-item>
          <text:p text:style-name="P56">Do you want the public share page to be read-only (just display + copy buttons) or also allow regeneration for logged-in users who own it?</text:p>
          <text:list>
            <text:list-item>
              <text:p text:style-name="P59">I need this to be read only.</text:p>
            </text:list-item>
          </text:list>
        </text:list-item>
      </text:list>
      <text:p text:style-name="P31"/>
      <text:p text:style-name="P31"/>
      <text:p text:style-name="P33">1. Copy buttons that still show <text:span text:style-name="T13">alert("OK")</text:span> We should replace all those with proper <text:span text:style-name="T13">navigator.clipboard.writeText()</text:span> + a nice toast notification (no blocking alert).</text:p>
      <text:p text:style-name="P33"><text:tab/><text:span text:style-name="T14">Yes please resolve this!!</text:span></text:p>
      <text:p text:style-name="P33"/>
      <text:p text:style-name="P33"><text:soft-page-break/>2. Occasional <text:span text:style-name="T13">[object Object]</text:span> This almost always happens when you do <text:span text:style-name="T13">${someObject}</text:span> in a template literal or pass an object where a string is expected. Usually in the platform output mapping.</text:p>
      <text:p text:style-name="P33"><text:tab/><text:span text:style-name="T14">I think we may have resolved this, but I can provide the code and let you make <text:tab/>improvements.</text:span></text:p>
      <text:p text:style-name="P31"/>
      <text:p text:style-name="P31"/>
      <text:p text:style-name="P31"/>
      <text:p text:style-name="P32">I don’t want to make anymore changes to the UI (color, theme, etc.) until we get these bugs worked out.</text:p>
      <text:p text:style-name="P31"/>
      <text:p text:style-name="P34"><text:span text:style-name="T5">I have changed the code in the </text:span><text:span text:style-name="T7">app/share/[id]/page.tsx </text:span><text:span text:style-name="T8">folder, using the code you provided.</text:span></text:p>
      <text:p text:style-name="P31"/>
      <text:p text:style-name="P32">I’m not sure where that block of code is so I will post the entire code and you can make improvements:</text:p>
      <text:p text:style-name="P32"/>
      <text:p text:style-name="P32"/>
      <text:p text:style-name="P32"/>
      <text:p text:style-name="P32"/>
      <text:p text:style-name="P32"/>
      <text:p text:style-name="P32"/>
      <text:p text:style-name="P34"><text:span text:style-name="T5">I’ll also paste the </text:span><text:span text:style-name="T7">/api/repurpose/route.ts </text:span><text:span text:style-name="T8">code here so you can review and make changes as needed:</text:span></text:p>
      <text:p text:style-name="P34"><text:span text:style-name="T8"/></text:p>
      <text:p text:style-name="P34"><text:span text:style-name="T8"/></text:p>
      <text:p text:style-name="P34"><text:span text:style-name="T8"/></text:p>
      <text:p text:style-name="P34"><text:span text:style-name="T8"/></text:p>
      <text:p text:style-name="P34"><text:span text:style-name="T8"/></text:p>
      <text:p text:style-name="P34"><text:span text:style-name="T8"/></text:p>
      <text:p text:style-name="P3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witterChirp" svg:font-family="TwitterChirp, apple-system, BlinkMacSystemFont, 'Segoe UI', Roboto, Helvetica, Arial, sans-serif"/>
    <style:font-face style:name="monospace" svg:font-family="monospace"/>
    <style:font-face style:name="sans-serif" svg:font-family="sans-serif"/>
    <style:font-face style:name="system-ui" svg:font-family="system-ui, 'Segoe UI', Roboto, Helvetica, Arial, sans-serif, 'Apple Color Emoji', 'Segoe UI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5-03T01:43:24.852000000</meta:creation-date>
    <dc:date>2026-05-03T12:47:18.728000000</dc:date>
    <meta:editing-duration>PT2H3M45S</meta:editing-duration>
    <meta:editing-cycles>2</meta:editing-cycles>
    <meta:generator>LibreOffice/7.3.2.2$Windows_X86_64 LibreOffice_project/49f2b1bff42cfccbd8f788c8dc32c1c309559be0</meta:generator>
    <meta:document-statistic meta:table-count="0" meta:image-count="0" meta:object-count="0" meta:page-count="14" meta:paragraph-count="162" meta:word-count="3863" meta:character-count="21777" meta:non-whitespace-character-count="18086"/>
  </office:meta>
</office:document-meta>
</file>
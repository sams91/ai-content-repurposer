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3ca6"/>
    </style:style>
    <style:style style:name="P2" style:family="paragraph" style:parent-style-name="Standard">
      <style:paragraph-properties style:line-height-at-least="0.198in"/>
      <style:text-properties fo:color="#bbbebf" loext:opacity="100%" style:font-name="Consolas" fo:font-size="10.5pt" fo:font-weight="normal" fo:background-color="#121314"/>
    </style:style>
    <style:style style:name="P3" style:family="paragraph" style:parent-style-name="Standard">
      <style:text-properties fo:color="#bbbebf" loext:opacity="100%" style:font-name="Consolas" fo:font-size="10.5pt" fo:font-weight="normal" officeooo:rsid="001e3ca6" fo:background-color="#121314"/>
    </style:style>
    <style:style style:name="P4" style:family="paragraph" style:parent-style-name="Standard">
      <style:text-properties fo:color="#bbbebf" loext:opacity="100%" style:font-name="Consolas" fo:font-size="10.5pt" fo:font-weight="normal" officeooo:rsid="001ea6d9" officeooo:paragraph-rsid="001ea6d9" fo:background-color="#121314"/>
    </style:style>
    <style:style style:name="P5" style:family="paragraph" style:parent-style-name="Standard">
      <style:text-properties fo:color="#bbbebf" loext:opacity="100%" style:font-name="Consolas" fo:font-size="10.5pt" fo:font-weight="normal" officeooo:rsid="001ea6d9" officeooo:paragraph-rsid="00201254" fo:background-color="#121314"/>
    </style:style>
    <style:style style:name="P6" style:family="paragraph" style:parent-style-name="Standard">
      <style:text-properties fo:color="#bbbebf" loext:opacity="100%" style:font-name="Consolas" fo:font-size="10.5pt" fo:font-weight="normal" officeooo:rsid="00201254" officeooo:paragraph-rsid="00201254" fo:background-color="#121314"/>
    </style:style>
    <style:style style:name="P7" style:family="paragraph" style:parent-style-name="Standard">
      <style:paragraph-properties style:line-height-at-least="0.198in"/>
      <style:text-properties fo:color="#bbbebf" loext:opacity="100%" fo:background-color="#121314"/>
    </style:style>
    <style:style style:name="P8" style:family="paragraph" style:parent-style-name="Standard">
      <style:paragraph-properties style:line-height-at-least="0.198in"/>
      <style:text-properties fo:color="#c9d1d9" loext:opacity="100%" fo:background-color="#121314"/>
    </style:style>
    <style:style style:name="P9" style:family="paragraph" style:parent-style-name="Standard">
      <style:paragraph-properties style:line-height-at-least="0.198in"/>
      <style:text-properties fo:color="#c9d1d9" loext:opacity="100%" style:font-name="Consolas" fo:font-size="10.5pt" fo:font-weight="normal" fo:background-color="#121314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style:line-height-at-least="0.198in"/>
      <style:text-properties fo:color="#8b949e" loext:opacity="100%" style:font-name="Consolas" fo:font-size="10.5pt" fo:font-weight="normal" fo:background-color="#121314"/>
    </style:style>
    <style:style style:name="P12" style:family="paragraph" style:parent-style-name="Standard">
      <style:text-properties fo:color="#8b949e" loext:opacity="100%" style:font-name="Consolas" fo:font-size="10.5pt" fo:font-weight="normal" officeooo:rsid="001e3ca6" officeooo:paragraph-rsid="001ea6d9" fo:background-color="#121314"/>
    </style:style>
    <style:style style:name="P13" style:family="paragraph" style:parent-style-name="Standard">
      <style:text-properties fo:color="#8b949e" loext:opacity="100%" style:font-name="Consolas" fo:font-size="10.5pt" fo:font-weight="normal" officeooo:rsid="001ea6d9" officeooo:paragraph-rsid="001ea6d9" fo:background-color="#121314"/>
    </style:style>
    <style:style style:name="P14" style:family="paragraph" style:parent-style-name="Text_20_body">
      <style:text-properties officeooo:rsid="001e3ca6"/>
    </style:style>
    <style:style style:name="P15" style:family="paragraph" style:parent-style-name="Text_20_body">
      <style:text-properties officeooo:rsid="001e3ca6" officeooo:paragraph-rsid="001ea6d9"/>
    </style:style>
    <style:style style:name="P16" style:family="paragraph" style:parent-style-name="Text_20_body">
      <style:text-properties officeooo:rsid="001ea6d9" officeooo:paragraph-rsid="001ea6d9"/>
    </style:style>
    <style:style style:name="P17" style:family="paragraph" style:parent-style-name="Text_20_body">
      <style:text-properties officeooo:rsid="001ea6d9" officeooo:paragraph-rsid="00201254"/>
    </style:style>
    <style:style style:name="P18" style:family="paragraph" style:parent-style-name="Text_20_body">
      <style:text-properties officeooo:rsid="00201254" officeooo:paragraph-rsid="00201254"/>
    </style:style>
    <style:style style:name="T1" style:family="text">
      <style:text-properties fo:color="#a5d6ff" loext:opacity="100%"/>
    </style:style>
    <style:style style:name="T2" style:family="text">
      <style:text-properties fo:color="#a5d6ff" loext:opacity="100%" style:font-name="Consolas" fo:font-size="10.5pt" fo:font-weight="normal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Consolas" fo:font-size="10.5pt" fo:font-weight="normal"/>
    </style:style>
    <style:style style:name="T5" style:family="text">
      <style:text-properties fo:color="#c9d1d9" loext:opacity="100%"/>
    </style:style>
    <style:style style:name="T6" style:family="text">
      <style:text-properties fo:color="#c9d1d9" loext:opacity="100%" style:font-name="Consolas" fo:font-size="10.5pt" fo:font-weight="normal"/>
    </style:style>
    <style:style style:name="T7" style:family="text">
      <style:text-properties fo:color="#ff7b72" loext:opacity="100%"/>
    </style:style>
    <style:style style:name="T8" style:family="text">
      <style:text-properties fo:color="#ff7b72" loext:opacity="100%" style:font-name="Consolas" fo:font-size="10.5pt" fo:font-weight="normal"/>
    </style:style>
    <style:style style:name="T9" style:family="text">
      <style:text-properties fo:color="#79c0ff" loext:opacity="100%"/>
    </style:style>
    <style:style style:name="T10" style:family="text">
      <style:text-properties fo:color="#79c0ff" loext:opacity="100%" style:font-name="Consolas" fo:font-size="10.5pt" fo:font-weight="normal"/>
    </style:style>
    <style:style style:name="T11" style:family="text">
      <style:text-properties fo:color="#d4d4d4" loext:opacity="100%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d2a8ff" loext:opacity="100%"/>
    </style:style>
    <style:style style:name="T14" style:family="text">
      <style:text-properties fo:color="#d2a8ff" loext:opacity="100%" style:font-name="Consolas" fo:font-size="10.5pt" fo:font-weight="normal"/>
    </style:style>
    <style:style style:name="T15" style:family="text">
      <style:text-properties style:font-name="Consolas" fo:font-size="10.5pt" fo:font-weight="normal"/>
    </style:style>
    <style:style style:name="T16" style:family="text">
      <style:text-properties fo:color="#b5cea8" loext:opacity="100%"/>
    </style:style>
    <style:style style:name="T17" style:family="text">
      <style:text-properties fo:color="#b5cea8" loext:opacity="100%" style:font-name="Consolas" fo:font-size="10.5pt" fo:font-weight="normal"/>
    </style:style>
    <style:style style:name="T18" style:family="text">
      <style:text-properties fo:color="#4ec9b0" loext:opacity="100%"/>
    </style:style>
    <style:style style:name="T19" style:family="text">
      <style:text-properties fo:color="#4ec9b0" loext:opacity="100%" style:font-name="Consolas" fo:font-size="10.5pt" fo:font-weight="normal"/>
    </style:style>
    <style:style style:name="T20" style:family="text">
      <style:text-properties fo:color="#ffa657" loext:opacity="100%"/>
    </style:style>
    <style:style style:name="T21" style:family="text">
      <style:text-properties fo:color="#ffa657" loext:opacity="100%" style:font-name="Consolas" fo:font-size="10.5pt" fo:font-weight="normal"/>
    </style:style>
    <style:style style:name="T22" style:family="text">
      <style:text-properties fo:color="#569cd6" loext:opacity="100%"/>
    </style:style>
    <style:style style:name="T23" style:family="text">
      <style:text-properties fo:color="#569cd6" loext:opacity="100%" style:font-name="Consolas" fo:font-size="10.5pt" fo:font-weight="normal"/>
    </style:style>
    <style:style style:name="T24" style:family="text">
      <style:text-properties fo:color="#9cdcfe" loext:opacity="100%" style:font-name="Consolas" fo:font-size="10.5pt" fo:font-weight="normal"/>
    </style:style>
    <style:style style:name="T25" style:family="text">
      <style:text-properties fo:color="#8b949e" loext:opacity="100%" style:font-name="Consolas" fo:font-size="10.5pt" fo:font-weight="normal"/>
    </style:style>
    <style:style style:name="T26" style:family="text">
      <style:text-properties fo:color="#d7ba7d" loext:opacity="100%" style:font-name="Consolas" fo:font-size="10.5pt" fo:font-weight="normal"/>
    </style:style>
    <style:style style:name="T27" style:family="text">
      <style:text-properties fo:color="#808080" loext:opacity="100%" style:font-name="Consolas" fo:font-size="10.5pt" fo:font-weight="normal"/>
    </style:style>
    <style:style style:name="T28" style:family="text">
      <style:text-properties fo:color="#7ee787" loext:opacity="100%" style:font-name="Consolas" fo:font-size="10.5pt" fo:font-weight="normal"/>
    </style:style>
    <style:style style:name="T29" style:family="text">
      <style:text-properties fo:color="#7ee787" loext:opacity="100%" style:font-name="Consolas" fo:font-size="10.5pt" fo:font-weight="bold"/>
    </style:style>
    <style:style style:name="T30" style:family="text">
      <style:text-properties fo:color="#ce9178" loext:opacity="100%" style:font-name="Consolas" fo:font-size="10.5pt" fo:font-weight="normal"/>
    </style:style>
    <style:style style:name="T31" style:family="text">
      <style:text-properties fo:color="#dcdcaa" loext:opacity="100%" style:font-name="Consolas" fo:font-size="10.5pt" fo:font-weight="normal"/>
    </style:style>
    <style:style style:name="T32" style:family="text">
      <style:text-properties officeooo:rsid="0020125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mponents/VideoRecorder.tsx:</text:p>
      <text:p text:style-name="P1"/>
      <text:p text:style-name="P3"><text:span text:style-name="T1">"use client"</text:span>;</text:p>
      <text:p text:style-name="P10"/>
      <text:p text:style-name="P2"><text:span text:style-name="T3">import</text:span> <text:span text:style-name="T5">React</text:span>, <text:span text:style-name="T5">{ useState, useRef, useCallback, useEffect }</text:span> <text:span text:style-name="T3">from</text:span> <text:span text:style-name="T1">'react'</text:span>;</text:p>
      <text:p text:style-name="P2"><text:span text:style-name="T3">import</text:span> <text:span text:style-name="T5">{ RotateCcw, Copy, Square, Send, Download }</text:span> <text:span text:style-name="T3">from</text:span> <text:span text:style-name="T1">'lucide-react'</text:span>;</text:p>
      <text:p text:style-name="P2"><text:span text:style-name="T3">import</text:span> <text:span text:style-name="T5">{ createClient }</text:span> <text:span text:style-name="T3">from</text:span> <text:span text:style-name="T1">'@supabase/supabase-js'</text:span>;</text:p>
      <text:p text:style-name="P10"/>
      <text:p text:style-name="P2"><text:span text:style-name="T7">const</text:span> <text:span text:style-name="T9">supabase</text:span> <text:span text:style-name="T11">=</text:span> <text:span text:style-name="T13">createClient</text:span>(</text:p>
      <text:p text:style-name="P7">  <text:span text:style-name="T6">process</text:span><text:span text:style-name="T15">.</text:span><text:span text:style-name="T6">env</text:span><text:span text:style-name="T15">.</text:span><text:span text:style-name="T10">NEXT_PUBLIC_SUPABASE_URL</text:span><text:span text:style-name="T12">!</text:span><text:span text:style-name="T15">,</text:span></text:p>
      <text:p text:style-name="P7">  <text:span text:style-name="T6">process</text:span><text:span text:style-name="T15">.</text:span><text:span text:style-name="T6">env</text:span><text:span text:style-name="T15">.</text:span><text:span text:style-name="T10">NEXT_PUBLIC_SUPABASE_ANON_KEY</text:span><text:span text:style-name="T12">!</text:span></text:p>
      <text:p text:style-name="P2">);</text:p>
      <text:p text:style-name="P10"/>
      <text:p text:style-name="P2"><text:span text:style-name="T7">const</text:span> <text:span text:style-name="T9">MAX_SIZE_MB</text:span> <text:span text:style-name="T11">=</text:span> <text:span text:style-name="T16">2048</text:span>;</text:p>
      <text:p text:style-name="P10"/>
      <text:p text:style-name="P2"><text:span text:style-name="T7">interface</text:span> <text:span text:style-name="T18">PlatformResult</text:span> {</text:p>
      <text:p text:style-name="P7">  <text:span text:style-name="T6">platform</text:span><text:span text:style-name="T12">:</text:span><text:span text:style-name="T15"> </text:span><text:span text:style-name="T19">string</text:span><text:span text:style-name="T15">;</text:span></text:p>
      <text:p text:style-name="P7">  <text:span text:style-name="T6">title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description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caption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hashtags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text</text:span><text:span text:style-name="T12">?:</text:span><text:span text:style-name="T15"> </text:span><text:span text:style-name="T19">string</text:span><text:span text:style-name="T15">;</text:span></text:p>
      <text:p text:style-name="P2">}</text:p>
      <text:p text:style-name="P10"/>
      <text:p text:style-name="P2"><text:span text:style-name="T7">interface</text:span> <text:span text:style-name="T18">ConnectedAccount</text:span> {</text:p>
      <text:p text:style-name="P7">  <text:span text:style-name="T6">_id</text:span><text:span text:style-name="T12">:</text:span><text:span text:style-name="T15"> </text:span><text:span text:style-name="T19">string</text:span><text:span text:style-name="T15">;</text:span></text:p>
      <text:p text:style-name="P7">  <text:span text:style-name="T6">platform</text:span><text:span text:style-name="T12">:</text:span><text:span text:style-name="T15"> </text:span><text:span text:style-name="T19">string</text:span><text:span text:style-name="T15">;</text:span></text:p>
      <text:p text:style-name="P7">  <text:span text:style-name="T6">name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username</text:span><text:span text:style-name="T12">?:</text:span><text:span text:style-name="T15"> </text:span><text:span text:style-name="T19">string</text:span><text:span text:style-name="T15">;</text:span></text:p>
      <text:p text:style-name="P2">}</text:p>
      <text:p text:style-name="P10"/>
      <text:p text:style-name="P2"><text:span text:style-name="T3">export</text:span><text:span text:style-name="T20"> </text:span><text:span text:style-name="T3">default</text:span><text:span text:style-name="T20"> </text:span><text:span text:style-name="T7">function</text:span><text:span text:style-name="T20"> </text:span><text:span text:style-name="T13">VideoRecorder</text:span><text:span text:style-name="T20">({ </text:span><text:span text:style-name="T13">onAmplifySuccess</text:span><text:span text:style-name="T20"> }</text:span><text:span text:style-name="T11">:</text:span><text:span text:style-name="T20"> { </text:span><text:span text:style-name="T13">onAmplifySuccess</text:span><text:span text:style-name="T11">?:</text:span><text:span text:style-name="T20"> () </text:span><text:span text:style-name="T7">=&gt;</text:span><text:span text:style-name="T20"> </text:span><text:span text:style-name="T18">void</text:span><text:span text:style-name="T20"> }) </text:span><text:span text:style-name="T5">{</text:span></text:p>
      <text:p text:style-name="P7"><text:span text:style-name="T5">  </text:span><text:span text:style-name="T8">const</text:span><text:span text:style-name="T6"> [</text:span><text:span text:style-name="T10">videoBlob</text:span><text:span text:style-name="T6">, </text:span><text:span text:style-name="T14">setVideoBlob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Blob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videoUrl</text:span><text:span text:style-name="T6">, </text:span><text:span text:style-name="T14">setVideoUrl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videoPublicUrl</text:span><text:span text:style-name="T6">, </text:span><text:span text:style-name="T14">setVideoPublicUrl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Recording</text:span><text:span text:style-name="T6">, </text:span><text:span text:style-name="T14">setIsRecording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recordingTime</text:span><text:span text:style-name="T6">, </text:span><text:span text:style-name="T14">setRecordingTime</text:span><text:span text:style-name="T6">] </text:span><text:span text:style-name="T12">=</text:span><text:span text:style-name="T6"> </text:span><text:span text:style-name="T14">useState</text:span><text:span text:style-name="T6">(</text:span><text:span text:style-name="T17">0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Amplifying</text:span><text:span text:style-name="T6">, </text:span><text:span text:style-name="T14">setIsAmplifying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results</text:span><text:span text:style-name="T6">, </text:span><text:span text:style-name="T14">setResults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PlatformResult</text:span><text:span text:style-name="T6">[]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transcription</text:span><text:span text:style-name="T6">, </text:span><text:span text:style-name="T14">setTranscription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&gt;(</text:span><text:span text:style-name="T2">''</text:span><text:span text:style-name="T6">);</text:span></text:p>
      <text:p text:style-name="P7"><text:span text:style-name="T5">  </text:span><text:span text:style-name="T8">const</text:span><text:span text:style-name="T6"> [</text:span><text:span text:style-name="T10">error</text:span><text:span text:style-name="T6">, </text:span><text:span text:style-name="T14">setError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&gt;(</text:span><text:span text:style-name="T2">''</text:span><text:span text:style-name="T6">);</text:span></text:p>
      <text:p text:style-name="P7"><text:span text:style-name="T5">  </text:span><text:span text:style-name="T8">const</text:span><text:span text:style-name="T6"> [</text:span><text:span text:style-name="T10">selectedFile</text:span><text:span text:style-name="T6">, </text:span><text:span text:style-name="T14">setSelectedFile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File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currentUser</text:span><text:span text:style-name="T6">, </text:span><text:span text:style-name="T10">setCurrentUser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&gt;(</text:span><text:span text:style-name="T23">null</text:span><text:span text:style-name="T6">);</text:span></text:p>
      <text:p text:style-name="P10"/>
      <text:p text:style-name="P7"><text:span text:style-name="T5">  </text:span><text:span text:style-name="T8">const</text:span><text:span text:style-name="T6"> [</text:span><text:span text:style-name="T10">connectedAccounts</text:span><text:span text:style-name="T6">, </text:span><text:span text:style-name="T10">setConnectedAccounts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ConnectedAccount</text:span><text:span text:style-name="T6">[]&gt;([]);</text:span></text:p>
      <text:p text:style-name="P7"><text:span text:style-name="T5">  </text:span><text:span text:style-name="T8">const</text:span><text:span text:style-name="T6"> [</text:span><text:span text:style-name="T10">showZernioModal</text:span><text:span text:style-name="T6">, </text:span><text:span text:style-name="T10">setShowZernioModal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oft-page-break/><text:span text:style-name="T5">  </text:span><text:span text:style-name="T8">const</text:span><text:span text:style-name="T6"> [</text:span><text:span text:style-name="T10">selectedAccountId</text:span><text:span text:style-name="T6">, </text:span><text:span text:style-name="T10">setSelectedAccountId</text:span><text:span text:style-name="T6">] </text:span><text:span text:style-name="T12">=</text:span><text:span text:style-name="T6"> </text:span><text:span text:style-name="T14">useState</text:span><text:span text:style-name="T6">(</text:span><text:span text:style-name="T2">''</text:span><text:span text:style-name="T6">);</text:span></text:p>
      <text:p text:style-name="P10"/>
      <text:p text:style-name="P7"><text:span text:style-name="T5">  </text:span><text:span text:style-name="T8">const</text:span><text:span text:style-name="T6"> [</text:span><text:span text:style-name="T10">showDownloadDropdown</text:span><text:span text:style-name="T6">, </text:span><text:span text:style-name="T10">setShowDownloadDropdown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Optimizing</text:span><text:span text:style-name="T6">, </text:span><text:span text:style-name="T10">setIsOptimizing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10"/>
      <text:p text:style-name="P7"><text:span text:style-name="T5">  </text:span><text:span text:style-name="T8">const</text:span><text:span text:style-name="T6"> </text:span><text:span text:style-name="T10">fileInput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HTMLInputElement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mediaRecorder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MediaRecorder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chunks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Blob</text:span><text:span text:style-name="T6">[]&gt;([]);</text:span></text:p>
      <text:p text:style-name="P7"><text:span text:style-name="T5">  </text:span><text:span text:style-name="T8">const</text:span><text:span text:style-name="T6"> </text:span><text:span text:style-name="T10">stream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MediaStream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timer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NodeJS</text:span><text:span text:style-name="T6">.</text:span><text:span text:style-name="T19">Timeout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liveVideo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HTMLVideoElement</text:span><text:span text:style-name="T6">&gt;(</text:span><text:span text:style-name="T23">null</text:span><text:span text:style-name="T6">);</text:span></text:p>
      <text:p text:style-name="P10"/>
      <text:p text:style-name="P7"><text:span text:style-name="T5">  </text:span><text:span text:style-name="T14">useEffect</text:span><text:span text:style-name="T6">(() </text:span><text:span text:style-name="T8">=&gt;</text:span><text:span text:style-name="T6"> {</text:span></text:p>
      <text:p text:style-name="P7"><text:span text:style-name="T5">    </text:span><text:span text:style-name="T8">const</text:span><text:span text:style-name="T6"> </text:span><text:span text:style-name="T14">getUser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  </text:span><text:span text:style-name="T8">const</text:span><text:span text:style-name="T6"> { </text:span><text:span text:style-name="T21">data</text:span><text:span text:style-name="T6">: { </text:span><text:span text:style-name="T10">user</text:span><text:span text:style-name="T6"> } } </text:span><text:span text:style-name="T12">=</text:span><text:span text:style-name="T6"> </text:span><text:span text:style-name="T4">await</text:span><text:span text:style-name="T6"> supabase.auth.</text:span><text:span text:style-name="T14">getUser</text:span><text:span text:style-name="T6">();</text:span></text:p>
      <text:p text:style-name="P7"><text:span text:style-name="T5">      </text:span><text:span text:style-name="T14">setCurrentUser</text:span><text:span text:style-name="T6">(user);</text:span></text:p>
      <text:p text:style-name="P8">    <text:span text:style-name="T15">};</text:span></text:p>
      <text:p text:style-name="P7"><text:span text:style-name="T5">    </text:span><text:span text:style-name="T14">getUser</text:span><text:span text:style-name="T6">();</text:span></text:p>
      <text:p text:style-name="P10"/>
      <text:p text:style-name="P7"><text:span text:style-name="T5">    </text:span><text:span text:style-name="T8">const</text:span><text:span text:style-name="T6"> { </text:span><text:span text:style-name="T21">data</text:span><text:span text:style-name="T6">: </text:span><text:span text:style-name="T10">listener</text:span><text:span text:style-name="T6"> } </text:span><text:span text:style-name="T12">=</text:span><text:span text:style-name="T6"> supabase.auth.</text:span><text:span text:style-name="T14">onAuthStateChange</text:span><text:span text:style-name="T6">((</text:span><text:span text:style-name="T21">_</text:span><text:span text:style-name="T6">, </text:span><text:span text:style-name="T21">session</text:span><text:span text:style-name="T6">) </text:span><text:span text:style-name="T8">=&gt;</text:span><text:span text:style-name="T6"> {</text:span></text:p>
      <text:p text:style-name="P7"><text:span text:style-name="T5">      </text:span><text:span text:style-name="T14">setCurrentUser</text:span><text:span text:style-name="T6">(session?.user </text:span><text:span text:style-name="T12">||</text:span><text:span text:style-name="T6"> </text:span><text:span text:style-name="T23">null</text:span><text:span text:style-name="T6">);</text:span></text:p>
      <text:p text:style-name="P8">    <text:span text:style-name="T15">});</text:span></text:p>
      <text:p text:style-name="P10"/>
      <text:p text:style-name="P7"><text:span text:style-name="T5">    </text:span><text:span text:style-name="T4">return</text:span><text:span text:style-name="T6"> () </text:span><text:span text:style-name="T8">=&gt;</text:span><text:span text:style-name="T6"> listener.subscription.</text:span><text:span text:style-name="T14">unsubscribe</text:span><text:span text:style-name="T6">();</text:span></text:p>
      <text:p text:style-name="P8">  <text:span text:style-name="T15">}, []);</text:span></text:p>
      <text:p text:style-name="P10"/>
      <text:p text:style-name="P7"><text:span text:style-name="T5">  </text:span><text:span text:style-name="T8">const</text:span><text:span text:style-name="T6"> </text:span><text:span text:style-name="T14">startRecording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6">console.</text:span><text:span text:style-name="T14">log</text:span><text:span text:style-name="T6">(</text:span><text:span text:style-name="T2">"🎥 startRecording called"</text:span><text:span text:style-name="T6">);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RecordingTime</text:span><text:span text:style-name="T6">(</text:span><text:span text:style-name="T17">0</text:span><text:span text:style-name="T6">);</text:span></text:p>
      <text:p text:style-name="P7"><text:span text:style-name="T5">    </text:span><text:span text:style-name="T6">chunksRef.current </text:span><text:span text:style-name="T12">=</text:span><text:span text:style-name="T6"> []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stream</text:span><text:span text:style-name="T6"> </text:span><text:span text:style-name="T12">=</text:span><text:span text:style-name="T6"> </text:span><text:span text:style-name="T4">await</text:span><text:span text:style-name="T6"> navigator.mediaDevices.</text:span><text:span text:style-name="T14">getUserMedia</text:span><text:span text:style-name="T6">({ </text:span><text:span text:style-name="T24">video:</text:span><text:span text:style-name="T6"> { </text:span><text:span text:style-name="T24">facingMode:</text:span><text:span text:style-name="T6"> </text:span><text:span text:style-name="T2">'user'</text:span><text:span text:style-name="T6"> }, </text:span><text:span text:style-name="T24">audio:</text:span><text:span text:style-name="T6"> </text:span><text:span text:style-name="T23">true</text:span><text:span text:style-name="T6"> });</text:span></text:p>
      <text:p text:style-name="P7"><text:span text:style-name="T5">      </text:span><text:span text:style-name="T6">streamRef.current </text:span><text:span text:style-name="T12">=</text:span><text:span text:style-name="T6"> stream;</text:span></text:p>
      <text:p text:style-name="P7"><text:span text:style-name="T5">      </text:span><text:span text:style-name="T6">console.</text:span><text:span text:style-name="T14">log</text:span><text:span text:style-name="T6">(</text:span><text:span text:style-name="T2">"✅ Camera stream obtained"</text:span><text:span text:style-name="T6">);</text:span></text:p>
      <text:p text:style-name="P10"/>
      <text:p text:style-name="P7"><text:span text:style-name="T5">      </text:span><text:span text:style-name="T14">setIsRecording</text:span><text:span text:style-name="T6">(</text:span><text:span text:style-name="T23">true</text:span><text:span text:style-name="T6">);</text:span></text:p>
      <text:p text:style-name="P7"><text:span text:style-name="T5">      </text:span><text:span text:style-name="T4">await</text:span><text:span text:style-name="T6"> </text:span><text:span text:style-name="T23">new</text:span><text:span text:style-name="T6"> </text:span><text:span text:style-name="T19">Promise</text:span><text:span text:style-name="T6">(</text:span><text:span text:style-name="T21">resolve</text:span><text:span text:style-name="T6"> </text:span><text:span text:style-name="T8">=&gt;</text:span><text:span text:style-name="T6"> </text:span><text:span text:style-name="T14">setTimeout</text:span><text:span text:style-name="T6">(resolve, </text:span><text:span text:style-name="T17">10</text:span><text:span text:style-name="T6">));</text:span></text:p>
      <text:p text:style-name="P10"/>
      <text:p text:style-name="P7"><text:span text:style-name="T5">      </text:span><text:span text:style-name="T4">if</text:span><text:span text:style-name="T6"> (liveVideoRef.current) {</text:span></text:p>
      <text:p text:style-name="P7"><text:span text:style-name="T5">        </text:span><text:span text:style-name="T6">liveVideoRef.current.srcObject </text:span><text:span text:style-name="T12">=</text:span><text:span text:style-name="T6"> stream;</text:span></text:p>
      <text:p text:style-name="P7"><text:span text:style-name="T5">        </text:span><text:span text:style-name="T4">await</text:span><text:span text:style-name="T6"> liveVideoRef.current.</text:span><text:span text:style-name="T14">play</text:span><text:span text:style-name="T6">();</text:span></text:p>
      <text:p text:style-name="P7"><text:span text:style-name="T5">        </text:span><text:span text:style-name="T6">console.</text:span><text:span text:style-name="T14">log</text:span><text:span text:style-name="T6">(</text:span><text:span text:style-name="T2">"✅ Live video started playing"</text:span><text:span text:style-name="T6">);</text:span></text:p>
      <text:p text:style-name="P8">      <text:span text:style-name="T15">}</text:span></text:p>
      <text:p text:style-name="P10"/>
      <text:p text:style-name="P7"><text:soft-page-break/><text:span text:style-name="T5">      </text:span><text:span text:style-name="T8">const</text:span><text:span text:style-name="T6"> </text:span><text:span text:style-name="T10">mediaRecorder</text:span><text:span text:style-name="T6"> </text:span><text:span text:style-name="T12">=</text:span><text:span text:style-name="T6"> </text:span><text:span text:style-name="T23">new</text:span><text:span text:style-name="T6"> </text:span><text:span text:style-name="T14">MediaRecorder</text:span><text:span text:style-name="T6">(stream, { </text:span><text:span text:style-name="T24">mimeType:</text:span><text:span text:style-name="T6"> </text:span><text:span text:style-name="T2">'video/webm'</text:span><text:span text:style-name="T6"> });</text:span></text:p>
      <text:p text:style-name="P7"><text:span text:style-name="T5">      </text:span><text:span text:style-name="T6">mediaRecorderRef.current </text:span><text:span text:style-name="T12">=</text:span><text:span text:style-name="T6"> mediaRecorder;</text:span></text:p>
      <text:p text:style-name="P10"/>
      <text:p text:style-name="P7"><text:span text:style-name="T5">      </text:span><text:span text:style-name="T6">mediaRecorder.</text:span><text:span text:style-name="T14">ondataavailable</text:span><text:span text:style-name="T6"> </text:span><text:span text:style-name="T12">=</text:span><text:span text:style-name="T6"> (</text:span><text:span text:style-name="T21">e</text:span><text:span text:style-name="T6">) </text:span><text:span text:style-name="T8">=&gt;</text:span><text:span text:style-name="T6"> {</text:span></text:p>
      <text:p text:style-name="P7"><text:span text:style-name="T5">        </text:span><text:span text:style-name="T4">if</text:span><text:span text:style-name="T6"> (e.data.size </text:span><text:span text:style-name="T12">&gt;</text:span><text:span text:style-name="T6"> </text:span><text:span text:style-name="T17">0</text:span><text:span text:style-name="T6">) chunksRef.current.</text:span><text:span text:style-name="T14">push</text:span><text:span text:style-name="T6">(e.data);</text:span></text:p>
      <text:p text:style-name="P8">      <text:span text:style-name="T15">};</text:span></text:p>
      <text:p text:style-name="P10"/>
      <text:p text:style-name="P7"><text:span text:style-name="T5">      </text:span><text:span text:style-name="T6">mediaRecorder.</text:span><text:span text:style-name="T14">onstop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    </text:span><text:span text:style-name="T8">const</text:span><text:span text:style-name="T6"> </text:span><text:span text:style-name="T10">blob</text:span><text:span text:style-name="T6"> </text:span><text:span text:style-name="T12">=</text:span><text:span text:style-name="T6"> </text:span><text:span text:style-name="T23">new</text:span><text:span text:style-name="T6"> </text:span><text:span text:style-name="T14">Blob</text:span><text:span text:style-name="T6">(chunksRef.current, { </text:span><text:span text:style-name="T24">type:</text:span><text:span text:style-name="T6"> </text:span><text:span text:style-name="T2">'video/webm'</text:span><text:span text:style-name="T6"> });</text:span></text:p>
      <text:p text:style-name="P7"><text:span text:style-name="T5">        </text:span><text:span text:style-name="T8">const</text:span><text:span text:style-name="T6"> </text:span><text:span text:style-name="T10">url</text:span><text:span text:style-name="T6"> </text:span><text:span text:style-name="T12">=</text:span><text:span text:style-name="T6"> </text:span><text:span text:style-name="T10">URL</text:span><text:span text:style-name="T6">.</text:span><text:span text:style-name="T14">createObjectURL</text:span><text:span text:style-name="T6">(blob);</text:span></text:p>
      <text:p text:style-name="P7"><text:span text:style-name="T5">        </text:span><text:span text:style-name="T14">setVideoUrl</text:span><text:span text:style-name="T6">(url);</text:span></text:p>
      <text:p text:style-name="P7"><text:span text:style-name="T5">        </text:span><text:span text:style-name="T14">setVideoBlob</text:span><text:span text:style-name="T6">(blob);</text:span></text:p>
      <text:p text:style-name="P7"><text:span text:style-name="T5">        </text:span><text:span text:style-name="T14">setSelectedFile</text:span><text:span text:style-name="T6">(</text:span><text:span text:style-name="T23">null</text:span><text:span text:style-name="T6">);</text:span></text:p>
      <text:p text:style-name="P7"><text:span text:style-name="T5">        </text:span><text:span text:style-name="T6">console.</text:span><text:span text:style-name="T14">log</text:span><text:span text:style-name="T6">(</text:span><text:span text:style-name="T2">"✅ Recording stopped, blob created"</text:span><text:span text:style-name="T6">);</text:span></text:p>
      <text:p text:style-name="P8">      <text:span text:style-name="T15">};</text:span></text:p>
      <text:p text:style-name="P10"/>
      <text:p text:style-name="P7"><text:span text:style-name="T5">      </text:span><text:span text:style-name="T6">mediaRecorder.</text:span><text:span text:style-name="T14">start</text:span><text:span text:style-name="T6">(</text:span><text:span text:style-name="T17">1000</text:span><text:span text:style-name="T6">);</text:span></text:p>
      <text:p text:style-name="P7"><text:span text:style-name="T5">      </text:span><text:span text:style-name="T6">console.</text:span><text:span text:style-name="T14">log</text:span><text:span text:style-name="T6">(</text:span><text:span text:style-name="T2">"✅ Recording started"</text:span><text:span text:style-name="T6">);</text:span></text:p>
      <text:p text:style-name="P7"><text:span text:style-name="T5">      </text:span><text:span text:style-name="T6">timerRef.current </text:span><text:span text:style-name="T12">=</text:span><text:span text:style-name="T6"> </text:span><text:span text:style-name="T14">setInterval</text:span><text:span text:style-name="T6">(() </text:span><text:span text:style-name="T8">=&gt;</text:span><text:span text:style-name="T6"> </text:span><text:span text:style-name="T14">setRecordingTime</text:span><text:span text:style-name="T6">(</text:span><text:span text:style-name="T21">p</text:span><text:span text:style-name="T6"> </text:span><text:span text:style-name="T8">=&gt;</text:span><text:span text:style-name="T6"> p </text:span><text:span text:style-name="T12">+</text:span><text:span text:style-name="T6"> </text:span><text:span text:style-name="T17">1</text:span><text:span text:style-name="T6">), </text:span><text:span text:style-name="T17">1000</text:span><text:span text:style-name="T6">);</text:span></text:p>
      <text:p text:style-name="P7"><text:span text:style-name="T5">    </text:span><text:span text:style-name="T6">} </text:span><text:span text:style-name="T4">catch</text:span><text:span text:style-name="T6"> (</text:span><text:span text:style-name="T21">err</text:span><text:span text:style-name="T12">:</text:span><text:span text:style-name="T6"> </text:span><text:span text:style-name="T19">any</text:span><text:span text:style-name="T6">) {</text:span></text:p>
      <text:p text:style-name="P7"><text:span text:style-name="T5">      </text:span><text:span text:style-name="T6">console.</text:span><text:span text:style-name="T14">error</text:span><text:span text:style-name="T6">(</text:span><text:span text:style-name="T2">"❌ Camera error:"</text:span><text:span text:style-name="T6">, err);</text:span></text:p>
      <text:p text:style-name="P7"><text:span text:style-name="T5">      </text:span><text:span text:style-name="T14">setError</text:span><text:span text:style-name="T6">(</text:span><text:span text:style-name="T2">'Failed to access camera/microphone.'</text:span><text:span text:style-name="T6">);</text:span></text:p>
      <text:p text:style-name="P7"><text:span text:style-name="T5">      </text:span><text:span text:style-name="T14">setIsRecording</text:span><text:span text:style-name="T6">(</text:span><text:span text:style-name="T23">false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stopRecording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mediaRecorderRef.current) mediaRecorderRef.current.</text:span><text:span text:style-name="T14">stop</text:span><text:span text:style-name="T6">();</text:span></text:p>
      <text:p text:style-name="P7"><text:span text:style-name="T5">    </text:span><text:span text:style-name="T4">if</text:span><text:span text:style-name="T6"> (timerRef.current) </text:span><text:span text:style-name="T14">clearInterval</text:span><text:span text:style-name="T6">(timerRef.current);</text:span></text:p>
      <text:p text:style-name="P7"><text:span text:style-name="T5">    </text:span><text:span text:style-name="T4">if</text:span><text:span text:style-name="T6"> (streamRef.current) streamRef.current.</text:span><text:span text:style-name="T14">getTracks</text:span><text:span text:style-name="T6">().</text:span><text:span text:style-name="T14">forEach</text:span><text:span text:style-name="T6">(</text:span><text:span text:style-name="T21">track</text:span><text:span text:style-name="T6"> </text:span><text:span text:style-name="T8">=&gt;</text:span><text:span text:style-name="T6"> track.</text:span><text:span text:style-name="T14">stop</text:span><text:span text:style-name="T6">());</text:span></text:p>
      <text:p text:style-name="P7"><text:span text:style-name="T5">    </text:span><text:span text:style-name="T14">setIsRecording</text:span><text:span text:style-name="T6">(</text:span><text:span text:style-name="T23">false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triggerFileUpload</text:span><text:span text:style-name="T6"> </text:span><text:span text:style-name="T12">=</text:span><text:span text:style-name="T6"> () </text:span><text:span text:style-name="T8">=&gt;</text:span><text:span text:style-name="T6"> fileInputRef.current?.</text:span><text:span text:style-name="T14">click</text:span><text:span text:style-name="T6">();</text:span></text:p>
      <text:p text:style-name="P10"/>
      <text:p text:style-name="P7"><text:span text:style-name="T5">  </text:span><text:span text:style-name="T8">const</text:span><text:span text:style-name="T6"> </text:span><text:span text:style-name="T10">handleFileSelect</text:span><text:span text:style-name="T6"> </text:span><text:span text:style-name="T12">=</text:span><text:span text:style-name="T6"> </text:span><text:span text:style-name="T14">useCallback</text:span><text:span text:style-name="T6">((</text:span><text:span text:style-name="T21">file</text:span><text:span text:style-name="T12">:</text:span><text:span text:style-name="T6"> </text:span><text:span text:style-name="T19">File</text:span><text:span text:style-name="T6">) </text:span><text:span text:style-name="T8">=&gt;</text:span><text:span text:style-name="T6"> {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Results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Transcription</text:span><text:span text:style-name="T6">(</text:span><text:span text:style-name="T2">''</text:span><text:span text:style-name="T6">);</text:span></text:p>
      <text:p text:style-name="P7"><text:span text:style-name="T5">    </text:span><text:span text:style-name="T8">const</text:span><text:span text:style-name="T6"> </text:span><text:span text:style-name="T10">sizeMB</text:span><text:span text:style-name="T6"> </text:span><text:span text:style-name="T12">=</text:span><text:span text:style-name="T6"> file.size </text:span><text:span text:style-name="T12">/</text:span><text:span text:style-name="T6"> (</text:span><text:span text:style-name="T17">1024</text:span><text:span text:style-name="T6"> </text:span><text:span text:style-name="T12">*</text:span><text:span text:style-name="T6"> </text:span><text:span text:style-name="T17">1024</text:span><text:span text:style-name="T6">);</text:span></text:p>
      <text:p text:style-name="P7"><text:span text:style-name="T5">    </text:span><text:span text:style-name="T4">if</text:span><text:span text:style-name="T6"> (sizeMB </text:span><text:span text:style-name="T12">&gt;</text:span><text:span text:style-name="T6"> </text:span><text:span text:style-name="T10">MAX_SIZE_MB</text:span><text:span text:style-name="T6">) {</text:span></text:p>
      <text:p text:style-name="P7"><text:span text:style-name="T5">      </text:span><text:span text:style-name="T14">setError</text:span><text:span text:style-name="T6">(</text:span><text:span text:style-name="T2">`Video file is too large (max 2GB)`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7"><text:span text:style-name="T5">    </text:span><text:span text:style-name="T14">setSelectedFile</text:span><text:span text:style-name="T6">(file);</text:span></text:p>
      <text:p text:style-name="P7"><text:span text:style-name="T5">    </text:span><text:span text:style-name="T14">setVideoUrl</text:span><text:span text:style-name="T6">(</text:span><text:span text:style-name="T10">URL</text:span><text:span text:style-name="T6">.</text:span><text:span text:style-name="T14">createObjectURL</text:span><text:span text:style-name="T6">(file));</text:span></text:p>
      <text:p text:style-name="P7"><text:span text:style-name="T5">    </text:span><text:span text:style-name="T14">setVideoBlob</text:span><text:span text:style-name="T6">(file);</text:span></text:p>
      <text:p text:style-name="P8"><text:soft-page-break/>  <text:span text:style-name="T15">}, []);</text:span></text:p>
      <text:p text:style-name="P10"/>
      <text:p text:style-name="P7"><text:span text:style-name="T5">  </text:span><text:span text:style-name="T8">const</text:span><text:span text:style-name="T6"> </text:span><text:span text:style-name="T14">amplifyVideo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videoBlob </text:span><text:span text:style-name="T12">||</text:span><text:span text:style-name="T6"> </text:span><text:span text:style-name="T12">!</text:span><text:span text:style-name="T6">currentUser) {</text:span></text:p>
      <text:p text:style-name="P7"><text:span text:style-name="T5">      </text:span><text:span text:style-name="T14">setError</text:span><text:span text:style-name="T6">(</text:span><text:span text:style-name="T12">!</text:span><text:span text:style-name="T6">currentUser </text:span><text:span text:style-name="T12">?</text:span><text:span text:style-name="T6"> </text:span><text:span text:style-name="T2">"Please log in to amplify videos"</text:span><text:span text:style-name="T6"> </text:span><text:span text:style-name="T12">:</text:span><text:span text:style-name="T6"> </text:span><text:span text:style-name="T2">"No video selected"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10"/>
      <text:p text:style-name="P7"><text:span text:style-name="T5">    </text:span><text:span text:style-name="T6">console.</text:span><text:span text:style-name="T14">log</text:span><text:span text:style-name="T6">(</text:span><text:span text:style-name="T2">"🚀 amplifyVideo called"</text:span><text:span text:style-name="T6">);</text:span></text:p>
      <text:p text:style-name="P7"><text:span text:style-name="T5">    </text:span><text:span text:style-name="T14">setIsAmplifying</text:span><text:span text:style-name="T6">(</text:span><text:span text:style-name="T23">true</text:span><text:span text:style-name="T6">);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Results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Transcription</text:span><text:span text:style-name="T6">(</text:span><text:span text:style-name="T2">''</text:span><text:span text:style-name="T6">)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formData</text:span><text:span text:style-name="T6"> </text:span><text:span text:style-name="T12">=</text:span><text:span text:style-name="T6"> </text:span><text:span text:style-name="T23">new</text:span><text:span text:style-name="T6"> </text:span><text:span text:style-name="T14">FormData</text:span><text:span text:style-name="T6">();</text:span></text:p>
      <text:p text:style-name="P7"><text:span text:style-name="T5">      </text:span><text:span text:style-name="T8">const</text:span><text:span text:style-name="T6"> </text:span><text:span text:style-name="T10">fileName</text:span><text:span text:style-name="T6"> </text:span><text:span text:style-name="T12">=</text:span><text:span text:style-name="T6"> selectedFile?.name </text:span><text:span text:style-name="T12">||</text:span><text:span text:style-name="T6"> </text:span><text:span text:style-name="T2">`recording-</text:span><text:span text:style-name="T23">${</text:span><text:span text:style-name="T6">Date</text:span><text:span text:style-name="T12">.</text:span><text:span text:style-name="T14">now</text:span><text:span text:style-name="T12">()</text:span><text:span text:style-name="T23">}</text:span><text:span text:style-name="T2">.webm`</text:span><text:span text:style-name="T6">;</text:span></text:p>
      <text:p text:style-name="P7"><text:span text:style-name="T5">      </text:span><text:span text:style-name="T6">formData.</text:span><text:span text:style-name="T14">append</text:span><text:span text:style-name="T6">(</text:span><text:span text:style-name="T2">'video'</text:span><text:span text:style-name="T6">, videoBlob, fileName);</text:span></text:p>
      <text:p text:style-name="P7"><text:span text:style-name="T5">      </text:span><text:span text:style-name="T6">formData.</text:span><text:span text:style-name="T14">append</text:span><text:span text:style-name="T6">(</text:span><text:span text:style-name="T2">'user_id'</text:span><text:span text:style-name="T6">, currentUser.id);</text:span></text:p>
      <text:p text:style-name="P10"/>
      <text:p text:style-name="P7"><text:span text:style-name="T5">      </text:span><text:span text:style-name="T8">const</text:span><text:span text:style-name="T6"> </text:span><text:span text:style-name="T10">response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'/api/amplify-video'</text:span><text:span text:style-name="T6">, { </text:span><text:span text:style-name="T24">method:</text:span><text:span text:style-name="T6"> </text:span><text:span text:style-name="T2">'POST'</text:span><text:span text:style-name="T6">, </text:span><text:span text:style-name="T24">body:</text:span><text:span text:style-name="T6"> formData });</text:span></text:p>
      <text:p text:style-name="P7"><text:span text:style-name="T5">      </text:span><text:span text:style-name="T8">const</text:span><text:span text:style-name="T6"> </text:span><text:span text:style-name="T10">data</text:span><text:span text:style-name="T6"> </text:span><text:span text:style-name="T12">=</text:span><text:span text:style-name="T6"> </text:span><text:span text:style-name="T4">await</text:span><text:span text:style-name="T6"> response.</text:span><text:span text:style-name="T14">json</text:span><text:span text:style-name="T6">();</text:span></text:p>
      <text:p text:style-name="P10"/>
      <text:p text:style-name="P7"><text:span text:style-name="T5">      </text:span><text:span text:style-name="T4">if</text:span><text:span text:style-name="T6"> (</text:span><text:span text:style-name="T12">!</text:span><text:span text:style-name="T6">response.ok) </text:span><text:span text:style-name="T4">throw</text:span><text:span text:style-name="T6"> </text:span><text:span text:style-name="T23">new</text:span><text:span text:style-name="T6"> </text:span><text:span text:style-name="T14">Error</text:span><text:span text:style-name="T6">(data.error </text:span><text:span text:style-name="T12">||</text:span><text:span text:style-name="T6"> </text:span><text:span text:style-name="T2">'Failed'</text:span><text:span text:style-name="T6">);</text:span></text:p>
      <text:p text:style-name="P10"/>
      <text:p text:style-name="P7"><text:span text:style-name="T5">      </text:span><text:span text:style-name="T14">setTranscription</text:span><text:span text:style-name="T6">(data.transcription </text:span><text:span text:style-name="T12">||</text:span><text:span text:style-name="T6"> </text:span><text:span text:style-name="T2">'No transcription available.'</text:span><text:span text:style-name="T6">);</text:span></text:p>
      <text:p text:style-name="P7"><text:span text:style-name="T5">      </text:span><text:span text:style-name="T14">setResults</text:span><text:span text:style-name="T6">(data.platforms </text:span><text:span text:style-name="T12">||</text:span><text:span text:style-name="T6"> []);</text:span></text:p>
      <text:p text:style-name="P7"><text:span text:style-name="T5">      </text:span><text:span text:style-name="T14">setVideoPublicUrl</text:span><text:span text:style-name="T6">(data.video_url </text:span><text:span text:style-name="T12">||</text:span><text:span text:style-name="T6"> </text:span><text:span text:style-name="T23">null</text:span><text:span text:style-name="T6">);</text:span></text:p>
      <text:p text:style-name="P10"/>
      <text:p text:style-name="P7"><text:span text:style-name="T5">      </text:span><text:span text:style-name="T14">onAmplifySuccess</text:span><text:span text:style-name="T6">?.();</text:span></text:p>
      <text:p text:style-name="P7"><text:span text:style-name="T5">    </text:span><text:span text:style-name="T6">} </text:span><text:span text:style-name="T4">catch</text:span><text:span text:style-name="T6"> (</text:span><text:span text:style-name="T21">err</text:span><text:span text:style-name="T12">:</text:span><text:span text:style-name="T6"> </text:span><text:span text:style-name="T19">any</text:span><text:span text:style-name="T6">) {</text:span></text:p>
      <text:p text:style-name="P7"><text:span text:style-name="T5">      </text:span><text:span text:style-name="T6">console.</text:span><text:span text:style-name="T14">error</text:span><text:span text:style-name="T6">(</text:span><text:span text:style-name="T2">"❌ Amplify error:"</text:span><text:span text:style-name="T6">, err);</text:span></text:p>
      <text:p text:style-name="P7"><text:span text:style-name="T5">      </text:span><text:span text:style-name="T14">setError</text:span><text:span text:style-name="T6">(err.message </text:span><text:span text:style-name="T12">||</text:span><text:span text:style-name="T6"> </text:span><text:span text:style-name="T2">'Failed to amplify video'</text:span><text:span text:style-name="T6">);</text:span></text:p>
      <text:p text:style-name="P7"><text:span text:style-name="T5">    </text:span><text:span text:style-name="T6">} </text:span><text:span text:style-name="T4">finally</text:span><text:span text:style-name="T6"> {</text:span></text:p>
      <text:p text:style-name="P7"><text:span text:style-name="T5">      </text:span><text:span text:style-name="T14">setIsAmplifying</text:span><text:span text:style-name="T6">(</text:span><text:span text:style-name="T23">false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fetchConnectedAccounts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currentUser) </text:span><text:span text:style-name="T4">return</text:span><text:span text:style-name="T6">;</text:span></text:p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res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`/api/zernio/accounts?user_id=</text:span><text:span text:style-name="T23">${</text:span><text:span text:style-name="T6">currentUser</text:span><text:span text:style-name="T12">.</text:span><text:span text:style-name="T6">id</text:span><text:span text:style-name="T23">}</text:span><text:span text:style-name="T2">`</text:span><text:span text:style-name="T6">);</text:span></text:p>
      <text:p text:style-name="P7"><text:span text:style-name="T5">      </text:span><text:span text:style-name="T8">const</text:span><text:span text:style-name="T6"> </text:span><text:span text:style-name="T10">data</text:span><text:span text:style-name="T6"> </text:span><text:span text:style-name="T12">=</text:span><text:span text:style-name="T6"> </text:span><text:span text:style-name="T4">await</text:span><text:span text:style-name="T6"> res.</text:span><text:span text:style-name="T14">json</text:span><text:span text:style-name="T6">();</text:span></text:p>
      <text:p text:style-name="P7"><text:span text:style-name="T5">      </text:span><text:span text:style-name="T4">if</text:span><text:span text:style-name="T6"> (data.accounts) </text:span><text:span text:style-name="T14">setConnectedAccounts</text:span><text:span text:style-name="T6">(data.accounts);</text:span></text:p>
      <text:p text:style-name="P7"><text:span text:style-name="T5">    </text:span><text:span text:style-name="T6">} </text:span><text:span text:style-name="T4">catch</text:span><text:span text:style-name="T6"> (e) {</text:span></text:p>
      <text:p text:style-name="P7"><text:span text:style-name="T5">      </text:span><text:span text:style-name="T6">console.</text:span><text:span text:style-name="T14">error</text:span><text:span text:style-name="T6">(</text:span><text:span text:style-name="T2">"Failed to fetch accounts"</text:span><text:span text:style-name="T6">, e);</text:span></text:p>
      <text:p text:style-name="P8"><text:soft-page-break/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postToZernio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currentUser </text:span><text:span text:style-name="T12">||</text:span><text:span text:style-name="T6"> </text:span><text:span text:style-name="T12">!</text:span><text:span text:style-name="T6">selectedAccountId) {</text:span></text:p>
      <text:p text:style-name="P7"><text:span text:style-name="T5">      </text:span><text:span text:style-name="T14">alert</text:span><text:span text:style-name="T6">(</text:span><text:span text:style-name="T2">'Please select an account'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10"/>
      <text:p text:style-name="P7"><text:span text:style-name="T5">    </text:span><text:span text:style-name="T8">const</text:span><text:span text:style-name="T6"> </text:span><text:span text:style-name="T10">selectedAccount</text:span><text:span text:style-name="T6"> </text:span><text:span text:style-name="T12">=</text:span><text:span text:style-name="T6"> connectedAccounts.</text:span><text:span text:style-name="T14">find</text:span><text:span text:style-name="T6">(</text:span><text:span text:style-name="T21">a</text:span><text:span text:style-name="T6"> </text:span><text:span text:style-name="T8">=&gt;</text:span><text:span text:style-name="T6"> a._id </text:span><text:span text:style-name="T12">===</text:span><text:span text:style-name="T6"> selectedAccountId);</text:span></text:p>
      <text:p text:style-name="P7"><text:span text:style-name="T5">    </text:span><text:span text:style-name="T4">if</text:span><text:span text:style-name="T6"> (</text:span><text:span text:style-name="T12">!</text:span><text:span text:style-name="T6">selectedAccount) </text:span><text:span text:style-name="T4">return</text:span><text:span text:style-name="T6">;</text:span></text:p>
      <text:p text:style-name="P10"/>
      <text:p text:style-name="P7"><text:span text:style-name="T5">    </text:span><text:span text:style-name="T8">const</text:span><text:span text:style-name="T6"> </text:span><text:span text:style-name="T10">firstResult</text:span><text:span text:style-name="T6"> </text:span><text:span text:style-name="T12">=</text:span><text:span text:style-name="T6"> results?.[</text:span><text:span text:style-name="T17">0</text:span><text:span text:style-name="T6">];</text:span></text:p>
      <text:p text:style-name="P7"><text:span text:style-name="T5">    </text:span><text:span text:style-name="T8">const</text:span><text:span text:style-name="T6"> </text:span><text:span text:style-name="T10">postContent</text:span><text:span text:style-name="T6"> </text:span><text:span text:style-name="T12">=</text:span><text:span text:style-name="T6"> firstResult?.caption </text:span><text:span text:style-name="T12">||</text:span><text:span text:style-name="T6"> firstResult?.text </text:span><text:span text:style-name="T12">||</text:span><text:span text:style-name="T6"> transcription </text:span><text:span text:style-name="T12">||</text:span><text:span text:style-name="T6"> </text:span><text:span text:style-name="T2">'Amplified content from ContentAmplifier'</text:span><text:span text:style-name="T6">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res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'/api/zernio/post'</text:span><text:span text:style-name="T6">, {</text:span></text:p>
      <text:p text:style-name="P7"><text:span text:style-name="T5">        </text:span><text:span text:style-name="T24">method:</text:span><text:span text:style-name="T6"> </text:span><text:span text:style-name="T2">'POST'</text:span><text:span text:style-name="T6">,</text:span></text:p>
      <text:p text:style-name="P7"><text:span text:style-name="T5">        </text:span><text:span text:style-name="T24">headers:</text:span><text:span text:style-name="T6"> { </text:span><text:span text:style-name="T2">'Content-Type'</text:span><text:span text:style-name="T24">:</text:span><text:span text:style-name="T6"> </text:span><text:span text:style-name="T2">'application/json'</text:span><text:span text:style-name="T6"> },</text:span></text:p>
      <text:p text:style-name="P7"><text:span text:style-name="T5">        </text:span><text:span text:style-name="T24">body:</text:span><text:span text:style-name="T6"> </text:span><text:span text:style-name="T10">JSON</text:span><text:span text:style-name="T6">.</text:span><text:span text:style-name="T14">stringify</text:span><text:span text:style-name="T6">({</text:span></text:p>
      <text:p text:style-name="P7"><text:span text:style-name="T5">          </text:span><text:span text:style-name="T24">platform_id:</text:span><text:span text:style-name="T6"> selectedAccount._id,</text:span></text:p>
      <text:p text:style-name="P7"><text:span text:style-name="T5">          </text:span><text:span text:style-name="T24">platform:</text:span><text:span text:style-name="T6"> selectedAccount.platform,</text:span></text:p>
      <text:p text:style-name="P7"><text:span text:style-name="T5">          </text:span><text:span text:style-name="T24">content:</text:span><text:span text:style-name="T6"> postContent,</text:span></text:p>
      <text:p text:style-name="P7"><text:span text:style-name="T5">          </text:span><text:span text:style-name="T24">title:</text:span><text:span text:style-name="T6"> firstResult?.title,</text:span></text:p>
      <text:p text:style-name="P7"><text:span text:style-name="T5">          </text:span><text:span text:style-name="T24">caption:</text:span><text:span text:style-name="T6"> firstResult?.caption,</text:span></text:p>
      <text:p text:style-name="P7"><text:span text:style-name="T5">          </text:span><text:span text:style-name="T24">hashtags:</text:span><text:span text:style-name="T6"> firstResult?.hashtags,</text:span></text:p>
      <text:p text:style-name="P7"><text:span text:style-name="T5">          </text:span><text:span text:style-name="T24">video_url:</text:span><text:span text:style-name="T6"> videoPublicUrl,</text:span></text:p>
      <text:p text:style-name="P7"><text:span text:style-name="T5">          </text:span><text:span text:style-name="T24">user_id:</text:span><text:span text:style-name="T6"> currentUser.id,</text:span></text:p>
      <text:p text:style-name="P8">        <text:span text:style-name="T15">}),</text:span></text:p>
      <text:p text:style-name="P8">      <text:span text:style-name="T15">});</text:span></text:p>
      <text:p text:style-name="P10"/>
      <text:p text:style-name="P7"><text:span text:style-name="T5">      </text:span><text:span text:style-name="T8">const</text:span><text:span text:style-name="T6"> </text:span><text:span text:style-name="T10">json</text:span><text:span text:style-name="T6"> </text:span><text:span text:style-name="T12">=</text:span><text:span text:style-name="T6"> </text:span><text:span text:style-name="T4">await</text:span><text:span text:style-name="T6"> res.</text:span><text:span text:style-name="T14">json</text:span><text:span text:style-name="T6">();</text:span></text:p>
      <text:p text:style-name="P7"><text:span text:style-name="T5">      </text:span><text:span text:style-name="T4">if</text:span><text:span text:style-name="T6"> (json.success) {</text:span></text:p>
      <text:p text:style-name="P7"><text:span text:style-name="T5">        </text:span><text:span text:style-name="T14">alert</text:span><text:span text:style-name="T6">(json.message);</text:span></text:p>
      <text:p text:style-name="P7"><text:span text:style-name="T5">        </text:span><text:span text:style-name="T14">setShowZernioModal</text:span><text:span text:style-name="T6">(</text:span><text:span text:style-name="T23">false</text:span><text:span text:style-name="T6">);</text:span></text:p>
      <text:p text:style-name="P7"><text:span text:style-name="T5">        </text:span><text:span text:style-name="T14">setSelectedAccountId</text:span><text:span text:style-name="T6">(</text:span><text:span text:style-name="T2">''</text:span><text:span text:style-name="T6">);</text:span></text:p>
      <text:p text:style-name="P7"><text:span text:style-name="T5">      </text:span><text:span text:style-name="T6">} </text:span><text:span text:style-name="T4">else</text:span><text:span text:style-name="T6"> {</text:span></text:p>
      <text:p text:style-name="P7"><text:span text:style-name="T5">        </text:span><text:span text:style-name="T14">alert</text:span><text:span text:style-name="T6">(</text:span><text:span text:style-name="T2">'Error: '</text:span><text:span text:style-name="T6"> </text:span><text:span text:style-name="T12">+</text:span><text:span text:style-name="T6"> json.error);</text:span></text:p>
      <text:p text:style-name="P8">      <text:span text:style-name="T15">}</text:span></text:p>
      <text:p text:style-name="P7"><text:span text:style-name="T5">    </text:span><text:span text:style-name="T6">} </text:span><text:span text:style-name="T4">catch</text:span><text:span text:style-name="T6"> (e) {</text:span></text:p>
      <text:p text:style-name="P7"><text:span text:style-name="T5">      </text:span><text:span text:style-name="T6">console.</text:span><text:span text:style-name="T14">error</text:span><text:span text:style-name="T6">(e);</text:span></text:p>
      <text:p text:style-name="P7"><text:span text:style-name="T5">      </text:span><text:span text:style-name="T14">alert</text:span><text:span text:style-name="T6">(</text:span><text:span text:style-name="T2">'Failed to call Zernio'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25">// FIXED: Blob-based download forces actual file save (no full-screen video player)</text:span></text:p>
      <text:p text:style-name="P7"><text:soft-page-break/><text:span text:style-name="T5">  </text:span><text:span text:style-name="T8">const</text:span><text:span text:style-name="T6"> </text:span><text:span text:style-name="T14">optimizeAndDownload</text:span><text:span text:style-name="T6"> </text:span><text:span text:style-name="T12">=</text:span><text:span text:style-name="T6"> </text:span><text:span text:style-name="T23">async</text:span><text:span text:style-name="T6"> (</text:span><text:span text:style-name="T21">platform</text:span><text:span text:style-name="T12">:</text:span><text:span text:style-name="T6"> </text:span><text:span text:style-name="T19">string</text:span><text:span text:style-name="T6">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videoPublicUrl) </text:span><text:span text:style-name="T4">return</text:span><text:span text:style-name="T6">;</text:span></text:p>
      <text:p text:style-name="P7"><text:span text:style-name="T5">    </text:span><text:span text:style-name="T14">setIsOptimizing</text:span><text:span text:style-name="T6">(</text:span><text:span text:style-name="T23">true</text:span><text:span text:style-name="T6">);</text:span></text:p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res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'/api/optimize-video'</text:span><text:span text:style-name="T6">, {</text:span></text:p>
      <text:p text:style-name="P7"><text:span text:style-name="T5">        </text:span><text:span text:style-name="T24">method:</text:span><text:span text:style-name="T6"> </text:span><text:span text:style-name="T2">'POST'</text:span><text:span text:style-name="T6">,</text:span></text:p>
      <text:p text:style-name="P7"><text:span text:style-name="T5">        </text:span><text:span text:style-name="T24">headers:</text:span><text:span text:style-name="T6"> { </text:span><text:span text:style-name="T2">'Content-Type'</text:span><text:span text:style-name="T24">:</text:span><text:span text:style-name="T6"> </text:span><text:span text:style-name="T2">'application/json'</text:span><text:span text:style-name="T6"> },</text:span></text:p>
      <text:p text:style-name="P7"><text:span text:style-name="T5">        </text:span><text:span text:style-name="T24">body:</text:span><text:span text:style-name="T6"> </text:span><text:span text:style-name="T10">JSON</text:span><text:span text:style-name="T6">.</text:span><text:span text:style-name="T14">stringify</text:span><text:span text:style-name="T6">({</text:span></text:p>
      <text:p text:style-name="P7"><text:span text:style-name="T5">          </text:span><text:span text:style-name="T24">video_url:</text:span><text:span text:style-name="T6"> videoPublicUrl,</text:span></text:p>
      <text:p text:style-name="P7"><text:span text:style-name="T5">          </text:span><text:span text:style-name="T24">platform:</text:span><text:span text:style-name="T6"> platform.</text:span><text:span text:style-name="T14">toLowerCase</text:span><text:span text:style-name="T6">(),</text:span></text:p>
      <text:p text:style-name="P7"><text:span text:style-name="T5">          </text:span><text:span text:style-name="T24">user_id:</text:span><text:span text:style-name="T6"> currentUser.id,</text:span></text:p>
      <text:p text:style-name="P8">        <text:span text:style-name="T15">}),</text:span></text:p>
      <text:p text:style-name="P8">      <text:span text:style-name="T15">});</text:span></text:p>
      <text:p text:style-name="P10"/>
      <text:p text:style-name="P7"><text:span text:style-name="T5">      </text:span><text:span text:style-name="T8">const</text:span><text:span text:style-name="T6"> </text:span><text:span text:style-name="T10">data</text:span><text:span text:style-name="T6"> </text:span><text:span text:style-name="T12">=</text:span><text:span text:style-name="T6"> </text:span><text:span text:style-name="T4">await</text:span><text:span text:style-name="T6"> res.</text:span><text:span text:style-name="T14">json</text:span><text:span text:style-name="T6">();</text:span></text:p>
      <text:p text:style-name="P7"><text:span text:style-name="T5">      </text:span><text:span text:style-name="T4">if</text:span><text:span text:style-name="T6"> (data.success </text:span><text:span text:style-name="T12">&amp;&amp;</text:span><text:span text:style-name="T6"> data.optimized_url) {</text:span></text:p>
      <text:p text:style-name="P7"><text:span text:style-name="T5">        </text:span><text:span text:style-name="T25">// Fetch as blob → force download</text:span></text:p>
      <text:p text:style-name="P7"><text:span text:style-name="T5">        </text:span><text:span text:style-name="T8">const</text:span><text:span text:style-name="T6"> </text:span><text:span text:style-name="T10">fileRes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data.optimized_url);</text:span></text:p>
      <text:p text:style-name="P7"><text:span text:style-name="T5">        </text:span><text:span text:style-name="T8">const</text:span><text:span text:style-name="T6"> </text:span><text:span text:style-name="T10">blob</text:span><text:span text:style-name="T6"> </text:span><text:span text:style-name="T12">=</text:span><text:span text:style-name="T6"> </text:span><text:span text:style-name="T4">await</text:span><text:span text:style-name="T6"> fileRes.</text:span><text:span text:style-name="T14">blob</text:span><text:span text:style-name="T6">();</text:span></text:p>
      <text:p text:style-name="P7"><text:span text:style-name="T5">        </text:span><text:span text:style-name="T8">const</text:span><text:span text:style-name="T6"> </text:span><text:span text:style-name="T10">blobUrl</text:span><text:span text:style-name="T6"> </text:span><text:span text:style-name="T12">=</text:span><text:span text:style-name="T6"> </text:span><text:span text:style-name="T10">URL</text:span><text:span text:style-name="T6">.</text:span><text:span text:style-name="T14">createObjectURL</text:span><text:span text:style-name="T6">(blob);</text:span></text:p>
      <text:p text:style-name="P10"/>
      <text:p text:style-name="P7"><text:span text:style-name="T5">        </text:span><text:span text:style-name="T8">const</text:span><text:span text:style-name="T6"> </text:span><text:span text:style-name="T10">link</text:span><text:span text:style-name="T6"> </text:span><text:span text:style-name="T12">=</text:span><text:span text:style-name="T6"> document.</text:span><text:span text:style-name="T14">createElement</text:span><text:span text:style-name="T6">(</text:span><text:span text:style-name="T2">'a'</text:span><text:span text:style-name="T6">);</text:span></text:p>
      <text:p text:style-name="P7"><text:span text:style-name="T5">        </text:span><text:span text:style-name="T6">link.href </text:span><text:span text:style-name="T12">=</text:span><text:span text:style-name="T6"> blobUrl;</text:span></text:p>
      <text:p text:style-name="P7"><text:span text:style-name="T5">        </text:span><text:span text:style-name="T6">link.download </text:span><text:span text:style-name="T12">=</text:span><text:span text:style-name="T6"> </text:span><text:span text:style-name="T2">`optimized-</text:span><text:span text:style-name="T23">${</text:span><text:span text:style-name="T6">platform</text:span><text:span text:style-name="T23">}</text:span><text:span text:style-name="T2">.mp4`</text:span><text:span text:style-name="T6">;</text:span></text:p>
      <text:p text:style-name="P7"><text:span text:style-name="T5">        </text:span><text:span text:style-name="T6">link.style.display </text:span><text:span text:style-name="T12">=</text:span><text:span text:style-name="T6"> </text:span><text:span text:style-name="T2">'none'</text:span><text:span text:style-name="T6">;</text:span></text:p>
      <text:p text:style-name="P7"><text:span text:style-name="T5">        </text:span><text:span text:style-name="T6">document.body.</text:span><text:span text:style-name="T14">appendChild</text:span><text:span text:style-name="T6">(link);</text:span></text:p>
      <text:p text:style-name="P7"><text:span text:style-name="T5">        </text:span><text:span text:style-name="T6">link.</text:span><text:span text:style-name="T14">click</text:span><text:span text:style-name="T6">();</text:span></text:p>
      <text:p text:style-name="P7"><text:span text:style-name="T5">        </text:span><text:span text:style-name="T6">document.body.</text:span><text:span text:style-name="T14">removeChild</text:span><text:span text:style-name="T6">(link);</text:span></text:p>
      <text:p text:style-name="P10"/>
      <text:p text:style-name="P7"><text:span text:style-name="T5">        </text:span><text:span text:style-name="T25">// Clean up blob URL</text:span></text:p>
      <text:p text:style-name="P7"><text:span text:style-name="T5">        </text:span><text:span text:style-name="T10">URL</text:span><text:span text:style-name="T6">.</text:span><text:span text:style-name="T14">revokeObjectURL</text:span><text:span text:style-name="T6">(blobUrl);</text:span></text:p>
      <text:p text:style-name="P10"/>
      <text:p text:style-name="P7"><text:span text:style-name="T5">        </text:span><text:span text:style-name="T14">alert</text:span><text:span text:style-name="T6">(data.message </text:span><text:span text:style-name="T12">||</text:span><text:span text:style-name="T6"> </text:span><text:span text:style-name="T2">`✅ Optimized for </text:span><text:span text:style-name="T23">${</text:span><text:span text:style-name="T6">platform</text:span><text:span text:style-name="T12">.</text:span><text:span text:style-name="T14">toUpperCase</text:span><text:span text:style-name="T12">()</text:span><text:span text:style-name="T23">}</text:span><text:span text:style-name="T2">`</text:span><text:span text:style-name="T6">);</text:span></text:p>
      <text:p text:style-name="P7"><text:span text:style-name="T5">      </text:span><text:span text:style-name="T6">} </text:span><text:span text:style-name="T4">else</text:span><text:span text:style-name="T6"> {</text:span></text:p>
      <text:p text:style-name="P7"><text:span text:style-name="T5">        </text:span><text:span text:style-name="T14">alert</text:span><text:span text:style-name="T6">(</text:span><text:span text:style-name="T2">'Optimization failed'</text:span><text:span text:style-name="T6">);</text:span></text:p>
      <text:p text:style-name="P8">      <text:span text:style-name="T15">}</text:span></text:p>
      <text:p text:style-name="P7"><text:span text:style-name="T5">    </text:span><text:span text:style-name="T6">} </text:span><text:span text:style-name="T4">catch</text:span><text:span text:style-name="T6"> (e) {</text:span></text:p>
      <text:p text:style-name="P7"><text:span text:style-name="T5">      </text:span><text:span text:style-name="T6">console.</text:span><text:span text:style-name="T14">error</text:span><text:span text:style-name="T6">(e);</text:span></text:p>
      <text:p text:style-name="P7"><text:span text:style-name="T5">      </text:span><text:span text:style-name="T14">alert</text:span><text:span text:style-name="T6">(</text:span><text:span text:style-name="T2">'Failed to optimize video'</text:span><text:span text:style-name="T6">);</text:span></text:p>
      <text:p text:style-name="P7"><text:span text:style-name="T5">    </text:span><text:span text:style-name="T6">} </text:span><text:span text:style-name="T4">finally</text:span><text:span text:style-name="T6"> {</text:span></text:p>
      <text:p text:style-name="P7"><text:span text:style-name="T5">      </text:span><text:span text:style-name="T14">setIsOptimizing</text:span><text:span text:style-name="T6">(</text:span><text:span text:style-name="T23">false</text:span><text:span text:style-name="T6">);</text:span></text:p>
      <text:p text:style-name="P7"><text:span text:style-name="T5">      </text:span><text:span text:style-name="T14">setShowDownloadDropdown</text:span><text:span text:style-name="T6">(</text:span><text:span text:style-name="T23">false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resetAll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videoUrl) </text:span><text:span text:style-name="T10">URL</text:span><text:span text:style-name="T6">.</text:span><text:span text:style-name="T14">revokeObjectURL</text:span><text:span text:style-name="T6">(videoUrl);</text:span></text:p>
      <text:p text:style-name="P7"><text:soft-page-break/><text:span text:style-name="T5">    </text:span><text:span text:style-name="T4">if</text:span><text:span text:style-name="T6"> (streamRef.current) streamRef.current.</text:span><text:span text:style-name="T14">getTracks</text:span><text:span text:style-name="T6">().</text:span><text:span text:style-name="T14">forEach</text:span><text:span text:style-name="T6">(</text:span><text:span text:style-name="T21">track</text:span><text:span text:style-name="T6"> </text:span><text:span text:style-name="T8">=&gt;</text:span><text:span text:style-name="T6"> track.</text:span><text:span text:style-name="T14">stop</text:span><text:span text:style-name="T6">());</text:span></text:p>
      <text:p text:style-name="P7"><text:span text:style-name="T5">    </text:span><text:span text:style-name="T14">setVideoBlob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VideoUrl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VideoPublicUrl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SelectedFile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Results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Transcription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RecordingTime</text:span><text:span text:style-name="T6">(</text:span><text:span text:style-name="T17">0</text:span><text:span text:style-name="T6">);</text:span></text:p>
      <text:p text:style-name="P7"><text:span text:style-name="T5">    </text:span><text:span text:style-name="T14">setIsRecording</text:span><text:span text:style-name="T6">(</text:span><text:span text:style-name="T23">false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copyAllResults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results </text:span><text:span text:style-name="T12">||</text:span><text:span text:style-name="T6"> results.</text:span><text:span text:style-name="T10">length</text:span><text:span text:style-name="T6"> </text:span><text:span text:style-name="T12">===</text:span><text:span text:style-name="T6"> </text:span><text:span text:style-name="T17">0</text:span><text:span text:style-name="T6">) </text:span><text:span text:style-name="T4">return</text:span><text:span text:style-name="T6">;</text:span></text:p>
      <text:p text:style-name="P7"><text:span text:style-name="T5">    </text:span><text:span text:style-name="T8">let</text:span><text:span text:style-name="T6"> text </text:span><text:span text:style-name="T12">=</text:span><text:span text:style-name="T6"> </text:span><text:span text:style-name="T2">"VIDEO AMPLIFICATION RESULTS</text:span><text:span text:style-name="T26">\n\n</text:span><text:span text:style-name="T2">"</text:span><text:span text:style-name="T6">;</text:span></text:p>
      <text:p text:style-name="P7"><text:span text:style-name="T5">    </text:span><text:span text:style-name="T4">if</text:span><text:span text:style-name="T6"> (transcription) text </text:span><text:span text:style-name="T12">+=</text:span><text:span text:style-name="T6"> </text:span><text:span text:style-name="T2">`TRANSCRIPTION:</text:span><text:span text:style-name="T26">\n</text:span><text:span text:style-name="T23">${</text:span><text:span text:style-name="T6">transcription</text:span><text:span text:style-name="T23">}</text:span><text:span text:style-name="T26">\n\n</text:span><text:span text:style-name="T2">`</text:span><text:span text:style-name="T6">;</text:span></text:p>
      <text:p text:style-name="P7"><text:span text:style-name="T5">    </text:span><text:span text:style-name="T6">results.</text:span><text:span text:style-name="T14">forEach</text:span><text:span text:style-name="T6">(</text:span><text:span text:style-name="T21">r</text:span><text:span text:style-name="T6"> </text:span><text:span text:style-name="T8">=&gt;</text:span><text:span text:style-name="T6"> {</text:span></text:p>
      <text:p text:style-name="P7"><text:span text:style-name="T5">      </text:span><text:span text:style-name="T6">text </text:span><text:span text:style-name="T12">+=</text:span><text:span text:style-name="T6"> </text:span><text:span text:style-name="T2">`</text:span><text:span text:style-name="T23">${</text:span><text:span text:style-name="T6">r</text:span><text:span text:style-name="T12">.</text:span><text:span text:style-name="T6">platform</text:span><text:span text:style-name="T23">}</text:span><text:span text:style-name="T26">\n</text:span><text:span text:style-name="T2">`</text:span><text:span text:style-name="T6">;</text:span></text:p>
      <text:p text:style-name="P7"><text:span text:style-name="T5">      </text:span><text:span text:style-name="T4">if</text:span><text:span text:style-name="T6"> (r.title) text </text:span><text:span text:style-name="T12">+=</text:span><text:span text:style-name="T6"> </text:span><text:span text:style-name="T2">`Title: </text:span><text:span text:style-name="T23">${</text:span><text:span text:style-name="T6">r</text:span><text:span text:style-name="T12">.</text:span><text:span text:style-name="T6">title</text:span><text:span text:style-name="T23">}</text:span><text:span text:style-name="T26">\n</text:span><text:span text:style-name="T2">`</text:span><text:span text:style-name="T6">;</text:span></text:p>
      <text:p text:style-name="P7"><text:span text:style-name="T5">      </text:span><text:span text:style-name="T4">if</text:span><text:span text:style-name="T6"> (r.description) text </text:span><text:span text:style-name="T12">+=</text:span><text:span text:style-name="T6"> </text:span><text:span text:style-name="T2">`Description: </text:span><text:span text:style-name="T23">${</text:span><text:span text:style-name="T6">r</text:span><text:span text:style-name="T12">.</text:span><text:span text:style-name="T6">description</text:span><text:span text:style-name="T23">}</text:span><text:span text:style-name="T26">\n</text:span><text:span text:style-name="T2">`</text:span><text:span text:style-name="T6">;</text:span></text:p>
      <text:p text:style-name="P7"><text:span text:style-name="T5">      </text:span><text:span text:style-name="T4">if</text:span><text:span text:style-name="T6"> (r.caption) text </text:span><text:span text:style-name="T12">+=</text:span><text:span text:style-name="T6"> </text:span><text:span text:style-name="T2">`Caption: </text:span><text:span text:style-name="T23">${</text:span><text:span text:style-name="T6">r</text:span><text:span text:style-name="T12">.</text:span><text:span text:style-name="T6">caption</text:span><text:span text:style-name="T23">}</text:span><text:span text:style-name="T26">\n</text:span><text:span text:style-name="T2">`</text:span><text:span text:style-name="T6">;</text:span></text:p>
      <text:p text:style-name="P7"><text:span text:style-name="T5">      </text:span><text:span text:style-name="T4">if</text:span><text:span text:style-name="T6"> (r.hashtags) text </text:span><text:span text:style-name="T12">+=</text:span><text:span text:style-name="T6"> </text:span><text:span text:style-name="T2">`Hashtags: </text:span><text:span text:style-name="T23">${</text:span><text:span text:style-name="T6">r</text:span><text:span text:style-name="T12">.</text:span><text:span text:style-name="T6">hashtags</text:span><text:span text:style-name="T23">}</text:span><text:span text:style-name="T26">\n</text:span><text:span text:style-name="T2">`</text:span><text:span text:style-name="T6">;</text:span></text:p>
      <text:p text:style-name="P7"><text:span text:style-name="T5">      </text:span><text:span text:style-name="T6">text </text:span><text:span text:style-name="T12">+=</text:span><text:span text:style-name="T6"> </text:span><text:span text:style-name="T2">"</text:span><text:span text:style-name="T26">\n</text:span><text:span text:style-name="T2">"</text:span><text:span text:style-name="T6">;</text:span></text:p>
      <text:p text:style-name="P8">    <text:span text:style-name="T15">});</text:span></text:p>
      <text:p text:style-name="P7"><text:span text:style-name="T5">    </text:span><text:span text:style-name="T6">navigator.clipboard.</text:span><text:span text:style-name="T14">writeText</text:span><text:span text:style-name="T6">(text);</text:span></text:p>
      <text:p text:style-name="P7"><text:span text:style-name="T5">    </text:span><text:span text:style-name="T14">alert</text:span><text:span text:style-name="T6">(</text:span><text:span text:style-name="T2">"✅ All results copied to clipboard!"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copyPlatform</text:span><text:span text:style-name="T6"> </text:span><text:span text:style-name="T12">=</text:span><text:span text:style-name="T6"> (</text:span><text:span text:style-name="T21">result</text:span><text:span text:style-name="T12">:</text:span><text:span text:style-name="T6"> </text:span><text:span text:style-name="T19">PlatformResult</text:span><text:span text:style-name="T6">) </text:span><text:span text:style-name="T8">=&gt;</text:span><text:span text:style-name="T6"> {</text:span></text:p>
      <text:p text:style-name="P7"><text:span text:style-name="T5">    </text:span><text:span text:style-name="T8">const</text:span><text:span text:style-name="T6"> </text:span><text:span text:style-name="T10">text</text:span><text:span text:style-name="T6"> </text:span><text:span text:style-name="T12">=</text:span><text:span text:style-name="T6"> </text:span><text:span text:style-name="T2">`</text:span><text:span text:style-name="T23">${</text:span><text:span text:style-name="T6">result</text:span><text:span text:style-name="T12">.</text:span><text:span text:style-name="T6">platform</text:span><text:span text:style-name="T23">}</text:span><text:span text:style-name="T26">\n</text:span><text:span text:style-name="T2">Title: </text:span><text:span text:style-name="T23">${</text:span><text:span text:style-name="T6">result</text:span><text:span text:style-name="T12">.</text:span><text:span text:style-name="T6">title</text:span><text:span text:style-name="T12"> || </text:span><text:span text:style-name="T2">''</text:span><text:span text:style-name="T23">}</text:span><text:span text:style-name="T26">\n</text:span><text:span text:style-name="T2">Description: </text:span><text:span text:style-name="T23">${</text:span><text:span text:style-name="T6">result</text:span><text:span text:style-name="T12">.</text:span><text:span text:style-name="T6">description</text:span><text:span text:style-name="T12"> || </text:span><text:span text:style-name="T2">''</text:span><text:span text:style-name="T23">}</text:span><text:span text:style-name="T26">\n</text:span><text:span text:style-name="T2">Caption: </text:span><text:span text:style-name="T23">${</text:span><text:span text:style-name="T6">result</text:span><text:span text:style-name="T12">.</text:span><text:span text:style-name="T6">caption</text:span><text:span text:style-name="T12"> || </text:span><text:span text:style-name="T2">''</text:span><text:span text:style-name="T23">}</text:span><text:span text:style-name="T26">\n</text:span><text:span text:style-name="T2">Hashtags: </text:span><text:span text:style-name="T23">${</text:span><text:span text:style-name="T6">result</text:span><text:span text:style-name="T12">.</text:span><text:span text:style-name="T6">hashtags</text:span><text:span text:style-name="T12"> || </text:span><text:span text:style-name="T2">''</text:span><text:span text:style-name="T23">}</text:span><text:span text:style-name="T2">`</text:span><text:span text:style-name="T6">;</text:span></text:p>
      <text:p text:style-name="P7"><text:span text:style-name="T5">    </text:span><text:span text:style-name="T6">navigator.clipboard.</text:span><text:span text:style-name="T14">writeText</text:span><text:span text:style-name="T6">(text);</text:span></text:p>
      <text:p text:style-name="P7"><text:span text:style-name="T5">    </text:span><text:span text:style-name="T14">alert</text:span><text:span text:style-name="T6">(</text:span><text:span text:style-name="T2">`✅ Copied </text:span><text:span text:style-name="T23">${</text:span><text:span text:style-name="T6">result</text:span><text:span text:style-name="T12">.</text:span><text:span text:style-name="T6">platform</text:span><text:span text:style-name="T23">}</text:span><text:span text:style-name="T2">`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14">useEffect</text:span><text:span text:style-name="T6">(() </text:span><text:span text:style-name="T8">=&gt;</text:span><text:span text:style-name="T6"> {</text:span></text:p>
      <text:p text:style-name="P7"><text:span text:style-name="T5">    </text:span><text:span text:style-name="T4">return</text:span><text:span text:style-name="T6"> () </text:span><text:span text:style-name="T8">=&gt;</text:span><text:span text:style-name="T6"> {</text:span></text:p>
      <text:p text:style-name="P7"><text:span text:style-name="T5">      </text:span><text:span text:style-name="T4">if</text:span><text:span text:style-name="T6"> (timerRef.current) </text:span><text:span text:style-name="T14">clearInterval</text:span><text:span text:style-name="T6">(timerRef.current);</text:span></text:p>
      <text:p text:style-name="P7"><text:span text:style-name="T5">      </text:span><text:span text:style-name="T4">if</text:span><text:span text:style-name="T6"> (streamRef.current) streamRef.current.</text:span><text:span text:style-name="T14">getTracks</text:span><text:span text:style-name="T6">().</text:span><text:span text:style-name="T14">forEach</text:span><text:span text:style-name="T6">(</text:span><text:span text:style-name="T21">t</text:span><text:span text:style-name="T6"> </text:span><text:span text:style-name="T8">=&gt;</text:span><text:span text:style-name="T6"> t.</text:span><text:span text:style-name="T14">stop</text:span><text:span text:style-name="T6">());</text:span></text:p>
      <text:p text:style-name="P8">    <text:span text:style-name="T15">};</text:span></text:p>
      <text:p text:style-name="P8">  <text:span text:style-name="T15">}, []);</text:span></text:p>
      <text:p text:style-name="P10"/>
      <text:p text:style-name="P7"><text:span text:style-name="T5">  </text:span><text:span text:style-name="T4">return</text:span><text:span text:style-name="T6"> (</text:span></text:p>
      <text:p text:style-name="P7"><text:span text:style-name="T5">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ax-w-5xl mx-auto p-6 space-y-8"</text:span><text:span text:style-name="T27">&gt;</text:span></text:p>
      <text:p text:style-name="P7"><text:span text:style-name="T5">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center"</text:span><text:span text:style-name="T27">&gt;</text:span></text:p>
      <text:p text:style-name="P7"><text:span text:style-name="T5">        </text:span><text:span text:style-name="T27">&lt;</text:span><text:span text:style-name="T28">h1</text:span><text:span text:style-name="T6"> </text:span><text:span text:style-name="T24">className</text:span><text:span text:style-name="T12">=</text:span><text:span text:style-name="T2">"text-4xl font-bold mb-2"</text:span><text:span text:style-name="T27">&gt;</text:span><text:span text:style-name="T6">Video Amplifier</text:span><text:span text:style-name="T27">&lt;/</text:span><text:span text:style-name="T28">h1</text:span><text:span text:style-name="T27">&gt;</text:span></text:p>
      <text:p text:style-name="P7"><text:soft-page-break/><text:span text:style-name="T5">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zinc-400"</text:span><text:span text:style-name="T27">&gt;</text:span><text:span text:style-name="T6">Record or upload → Optimized content for all platforms</text:span><text:span text:style-name="T27">&lt;/</text:span><text:span text:style-name="T28">p</text:span><text:span text:style-name="T27">&gt;</text:span></text:p>
      <text:p text:style-name="P7"><text:span text:style-name="T5">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emerald-400 text-sm mt-2"</text:span><text:span text:style-name="T27">&gt;</text:span><text:span text:style-name="T6">Your video is formatted for the chosen platform only when you click Post with Zernio (or Download).</text:span><text:span text:style-name="T27">&lt;/</text:span><text:span text:style-name="T28">p</text:span><text:span text:style-name="T27">&gt;</text:span></text:p>
      <text:p text:style-name="P7"><text:span text:style-name="T5">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order border-white/10 bg-zinc-950 rounded-3xl p-8"</text:span><text:span text:style-name="T27">&gt;</text:span></text:p>
      <text:p text:style-name="P7"><text:span text:style-name="T5">        </text:span><text:span text:style-name="T8">{</text:span><text:span text:style-name="T25">/* LIVE PREVIEW */</text:span><text:span text:style-name="T8">}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8">{</text:span><text:span text:style-name="T2">`relative aspect-video bg-black rounded-2xl overflow-hidden mb-6 </text:span><text:span text:style-name="T23">${</text:span><text:span text:style-name="T6">isRecording</text:span><text:span text:style-name="T12"> ? </text:span><text:span text:style-name="T2">'block'</text:span><text:span text:style-name="T12"> : </text:span><text:span text:style-name="T2">'hidden'</text:span><text:span text:style-name="T23">}</text:span><text:span text:style-name="T2">`</text:span><text:span text:style-name="T8">}</text:span><text:span text:style-name="T27">&gt;</text:span></text:p>
      <text:p text:style-name="P7"><text:span text:style-name="T5">          </text:span><text:span text:style-name="T27">&lt;</text:span><text:span text:style-name="T28">video</text:span></text:p>
      <text:p text:style-name="P7"><text:span text:style-name="T5">            </text:span><text:span text:style-name="T24">ref</text:span><text:span text:style-name="T12">=</text:span><text:span text:style-name="T8">{</text:span><text:span text:style-name="T6">liveVideoRef</text:span><text:span text:style-name="T8">}</text:span></text:p>
      <text:p text:style-name="P7"><text:span text:style-name="T5">            </text:span><text:span text:style-name="T24">autoPlay</text:span></text:p>
      <text:p text:style-name="P7"><text:span text:style-name="T5">            </text:span><text:span text:style-name="T24">muted</text:span></text:p>
      <text:p text:style-name="P7"><text:span text:style-name="T5">            </text:span><text:span text:style-name="T24">playsInline</text:span></text:p>
      <text:p text:style-name="P7"><text:span text:style-name="T5">            </text:span><text:span text:style-name="T24">className</text:span><text:span text:style-name="T12">=</text:span><text:span text:style-name="T2">"w-full h-full object-cover"</text:span></text:p>
      <text:p text:style-name="P7"><text:span text:style-name="T5">          </text:span><text:span text:style-name="T27">/&gt;</text:span></text:p>
      <text:p text:style-name="P7"><text:span text:style-name="T5">          </text:span><text:span text:style-name="T8">{</text:span><text:span text:style-name="T6">isRecording </text:span><text:span text:style-name="T12">&amp;&amp;</text:span><text:span text:style-name="T6"> (</text:span></text:p>
      <text:p text:style-name="P7"><text:span text:style-name="T5">            </text:span><text:span text:style-name="T27">&lt;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absolute top-4 right-4 bg-black/80 px-4 py-1 rounded-full text-red-500 font-mono flex items-center gap-2"</text:span><text:span text:style-name="T27">&gt;</text:span></text:p>
      <text:p text:style-name="P7"><text:span text:style-name="T5">                ● </text:span><text:span text:style-name="T6">REC </text:span><text:span text:style-name="T8">{</text:span><text:span text:style-name="T6">Math.</text:span><text:span text:style-name="T14">floor</text:span><text:span text:style-name="T6">(recordingTime </text:span><text:span text:style-name="T12">/</text:span><text:span text:style-name="T6"> </text:span><text:span text:style-name="T17">60</text:span><text:span text:style-name="T6">)</text:span><text:span text:style-name="T8">}</text:span><text:span text:style-name="T6">:</text:span><text:span text:style-name="T8">{</text:span><text:span text:style-name="T6">(recordingTime </text:span><text:span text:style-name="T12">%</text:span><text:span text:style-name="T6"> </text:span><text:span text:style-name="T17">60</text:span><text:span text:style-name="T6">).</text:span><text:span text:style-name="T14">toString</text:span><text:span text:style-name="T6">().</text:span><text:span text:style-name="T14">padStart</text:span><text:span text:style-name="T6">(</text:span><text:span text:style-name="T17">2</text:span><text:span text:style-name="T6">, </text:span><text:span text:style-name="T2">'0'</text:span><text:span text:style-name="T6">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button</text:span></text:p>
      <text:p text:style-name="P7"><text:span text:style-name="T5">                </text:span><text:span text:style-name="T24">onClick</text:span><text:span text:style-name="T12">=</text:span><text:span text:style-name="T8">{</text:span><text:span text:style-name="T6">stopRecording</text:span><text:span text:style-name="T8">}</text:span></text:p>
      <text:p text:style-name="P7"><text:span text:style-name="T5">                </text:span><text:span text:style-name="T24">className</text:span><text:span text:style-name="T12">=</text:span><text:span text:style-name="T2">"absolute bottom-8 left-1/2 -translate-x-1/2 bg-red-600 hover:bg-red-700 text-white px-12 py-5 rounded-3xl text-2xl font-bold flex items-center gap-4 shadow-2xl border-4 border-white/20"</text:span></text:p>
      <text:p text:style-name="P7"><text:span text:style-name="T5">              </text:span><text:span text:style-name="T27">&gt;</text:span></text:p>
      <text:p text:style-name="P7"><text:span text:style-name="T5">                </text:span><text:span text:style-name="T27">&lt;</text:span><text:span text:style-name="T28">Square</text:span><text:span text:style-name="T6"> </text:span><text:span text:style-name="T24">size</text:span><text:span text:style-name="T12">=</text:span><text:span text:style-name="T8">{</text:span><text:span text:style-name="T17">32</text:span><text:span text:style-name="T8">}</text:span><text:span text:style-name="T6"> </text:span><text:span text:style-name="T24">className</text:span><text:span text:style-name="T12">=</text:span><text:span text:style-name="T2">"fill-current"</text:span><text:span text:style-name="T6"> </text:span><text:span text:style-name="T27">/&gt;</text:span><text:span text:style-name="T6"> STOP RECORDING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27">&lt;/&gt;</text:span></text:p>
      <text:p text:style-name="P7"><text:span text:style-name="T5">          </text:span><text:span text:style-name="T6">)</text:span><text:span text:style-name="T8">}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</text:span><text:span text:style-name="T8">{</text:span><text:span text:style-name="T25">/* RECORDED / UPLOADED VIDEO */</text:span><text:span text:style-name="T8">}</text:span></text:p>
      <text:p text:style-name="P7"><text:span text:style-name="T5">        </text:span><text:span text:style-name="T8">{</text:span><text:span text:style-name="T6">videoUrl </text:span><text:span text:style-name="T12">&amp;&amp;</text:span><text:span text:style-name="T6"> </text:span><text:span text:style-name="T12">!</text:span><text:span text:style-name="T6">isRecording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relative aspect-video bg-black rounded-2xl overflow-hidden mb-6"</text:span><text:span text:style-name="T27">&gt;</text:span></text:p>
      <text:p text:style-name="P7"><text:span text:style-name="T5">            </text:span><text:span text:style-name="T27">&lt;</text:span><text:span text:style-name="T28">video</text:span></text:p>
      <text:p text:style-name="P7"><text:span text:style-name="T5">              </text:span><text:span text:style-name="T24">src</text:span><text:span text:style-name="T12">=</text:span><text:span text:style-name="T8">{</text:span><text:span text:style-name="T6">videoUrl</text:span><text:span text:style-name="T8">}</text:span></text:p>
      <text:p text:style-name="P7"><text:span text:style-name="T5">              </text:span><text:span text:style-name="T24">controls</text:span></text:p>
      <text:p text:style-name="P7"><text:span text:style-name="T5">              </text:span><text:span text:style-name="T24">className</text:span><text:span text:style-name="T12">=</text:span><text:span text:style-name="T2">"w-full h-full object-cover"</text:span></text:p>
      <text:p text:style-name="P7"><text:span text:style-name="T5">            </text:span><text:span text:style-name="T27">/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6">)</text:span><text:span text:style-name="T8">}</text:span></text:p>
      <text:p text:style-name="P10"/>
      <text:p text:style-name="P7"><text:soft-page-break/><text:span text:style-name="T5">        </text:span><text:span text:style-name="T8">{</text:span><text:span text:style-name="T25">/* Initial controls */</text:span><text:span text:style-name="T8">}</text:span></text:p>
      <text:p text:style-name="P7"><text:span text:style-name="T5">        </text:span><text:span text:style-name="T8">{</text:span><text:span text:style-name="T12">!</text:span><text:span text:style-name="T6">videoUrl </text:span><text:span text:style-name="T12">&amp;&amp;</text:span><text:span text:style-name="T6"> </text:span><text:span text:style-name="T12">!</text:span><text:span text:style-name="T6">isRecording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flex-col items-center gap-4 py-12"</text:span><text:span text:style-name="T27">&gt;</text:span></text:p>
      <text:p text:style-name="P7"><text:span text:style-name="T5">            </text:span><text:span text:style-name="T27">&lt;</text:span><text:span text:style-name="T28">button</text:span></text:p>
      <text:p text:style-name="P7"><text:span text:style-name="T5">              </text:span><text:span text:style-name="T24">onClick</text:span><text:span text:style-name="T12">=</text:span><text:span text:style-name="T8">{</text:span><text:span text:style-name="T6">startRecording</text:span><text:span text:style-name="T8">}</text:span></text:p>
      <text:p text:style-name="P7"><text:span text:style-name="T5">              </text:span><text:span text:style-name="T24">className</text:span><text:span text:style-name="T12">=</text:span><text:span text:style-name="T2">"w-full max-w-md py-6 bg-red-600 hover:bg-red-700 rounded-3xl text-xl font-semibold flex items-center justify-center gap-3"</text:span></text:p>
      <text:p text:style-name="P7"><text:span text:style-name="T5">            </text:span><text:span text:style-name="T27">&gt;</text:span></text:p>
      <text:p text:style-name="P8">              🎥 <text:span text:style-name="T15">Start Recording</text:span></text:p>
      <text:p text:style-name="P7"><text:span text:style-name="T5">            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zinc-500 my-2"</text:span><text:span text:style-name="T27">&gt;</text:span><text:span text:style-name="T6">— or —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</text:span><text:span text:style-name="T28">button</text:span></text:p>
      <text:p text:style-name="P7"><text:span text:style-name="T5">              </text:span><text:span text:style-name="T24">onClick</text:span><text:span text:style-name="T12">=</text:span><text:span text:style-name="T8">{</text:span><text:span text:style-name="T6">triggerFileUpload</text:span><text:span text:style-name="T8">}</text:span></text:p>
      <text:p text:style-name="P7"><text:span text:style-name="T5">              </text:span><text:span text:style-name="T24">className</text:span><text:span text:style-name="T12">=</text:span><text:span text:style-name="T2">"w-full max-w-md py-6 bg-violet-600 hover:bg-violet-700 rounded-3xl text-xl font-semibold flex items-center justify-center gap-3"</text:span></text:p>
      <text:p text:style-name="P7"><text:span text:style-name="T5">            </text:span><text:span text:style-name="T27">&gt;</text:span></text:p>
      <text:p text:style-name="P8">              📤 <text:span text:style-name="T15">Upload Video File</text:span></text:p>
      <text:p text:style-name="P7"><text:span text:style-name="T5">            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6">)</text:span><text:span text:style-name="T8">}</text:span></text:p>
      <text:p text:style-name="P10"/>
      <text:p text:style-name="P7"><text:span text:style-name="T5">        </text:span><text:span text:style-name="T27">&lt;</text:span><text:span text:style-name="T28">input</text:span></text:p>
      <text:p text:style-name="P7"><text:span text:style-name="T5">          </text:span><text:span text:style-name="T24">ref</text:span><text:span text:style-name="T12">=</text:span><text:span text:style-name="T8">{</text:span><text:span text:style-name="T6">fileInputRef</text:span><text:span text:style-name="T8">}</text:span></text:p>
      <text:p text:style-name="P7"><text:span text:style-name="T5">          </text:span><text:span text:style-name="T24">type</text:span><text:span text:style-name="T12">=</text:span><text:span text:style-name="T2">"file"</text:span></text:p>
      <text:p text:style-name="P7"><text:span text:style-name="T5">          </text:span><text:span text:style-name="T24">accept</text:span><text:span text:style-name="T12">=</text:span><text:span text:style-name="T2">"video/*"</text:span></text:p>
      <text:p text:style-name="P7"><text:span text:style-name="T5">          </text:span><text:span text:style-name="T24">className</text:span><text:span text:style-name="T12">=</text:span><text:span text:style-name="T2">"hidden"</text:span></text:p>
      <text:p text:style-name="P7"><text:span text:style-name="T5">          </text:span><text:span text:style-name="T24">onChange</text:span><text:span text:style-name="T12">=</text:span><text:span text:style-name="T8">{</text:span><text:span text:style-name="T6">(</text:span><text:span text:style-name="T21">e</text:span><text:span text:style-name="T6">) </text:span><text:span text:style-name="T8">=&gt;</text:span><text:span text:style-name="T6"> e.target.files?.[</text:span><text:span text:style-name="T17">0</text:span><text:span text:style-name="T6">] </text:span><text:span text:style-name="T12">&amp;&amp;</text:span><text:span text:style-name="T6"> </text:span><text:span text:style-name="T14">handleFileSelect</text:span><text:span text:style-name="T6">(e.target.files[</text:span><text:span text:style-name="T17">0</text:span><text:span text:style-name="T6">])</text:span><text:span text:style-name="T8">}</text:span></text:p>
      <text:p text:style-name="P7"><text:span text:style-name="T5">        </text:span><text:span text:style-name="T27">/&gt;</text:span></text:p>
      <text:p text:style-name="P10"/>
      <text:p text:style-name="P7"><text:span text:style-name="T5">        </text:span><text:span text:style-name="T8">{</text:span><text:span text:style-name="T25">/* Amplify &amp; Reset */</text:span><text:span text:style-name="T8">}</text:span></text:p>
      <text:p text:style-name="P7"><text:span text:style-name="T5">        </text:span><text:span text:style-name="T8">{</text:span><text:span text:style-name="T6">videoUrl </text:span><text:span text:style-name="T12">&amp;&amp;</text:span><text:span text:style-name="T6"> </text:span><text:span text:style-name="T12">!</text:span><text:span text:style-name="T6">isRecording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6"</text:span><text:span text:style-name="T27">&gt;</text:span></text:p>
      <text:p text:style-name="P7"><text:span text:style-name="T5">            </text:span><text:span text:style-name="T27">&lt;</text:span><text:span text:style-name="T28">button</text:span></text:p>
      <text:p text:style-name="P7"><text:span text:style-name="T5">              </text:span><text:span text:style-name="T24">onClick</text:span><text:span text:style-name="T12">=</text:span><text:span text:style-name="T8">{</text:span><text:span text:style-name="T6">amplifyVideo</text:span><text:span text:style-name="T8">}</text:span></text:p>
      <text:p text:style-name="P7"><text:span text:style-name="T5">              </text:span><text:span text:style-name="T24">disabled</text:span><text:span text:style-name="T12">=</text:span><text:span text:style-name="T8">{</text:span><text:span text:style-name="T6">isAmplifying</text:span><text:span text:style-name="T8">}</text:span></text:p>
      <text:p text:style-name="P7"><text:span text:style-name="T5">              </text:span><text:span text:style-name="T24">className</text:span><text:span text:style-name="T12">=</text:span><text:span text:style-name="T2">"w-full py-6 bg-gradient-to-r from-violet-600 to-fuchsia-600 rounded-3xl text-xl font-semibold disabled:opacity-70"</text:span></text:p>
      <text:p text:style-name="P7"><text:span text:style-name="T5">            </text:span><text:span text:style-name="T27">&gt;</text:span></text:p>
      <text:p text:style-name="P7"><text:span text:style-name="T5">              </text:span><text:span text:style-name="T8">{</text:span><text:span text:style-name="T6">isAmplifying </text:span><text:span text:style-name="T12">?</text:span><text:span text:style-name="T6"> </text:span><text:span text:style-name="T2">'⚡ Amplifying Video...'</text:span><text:span text:style-name="T6"> </text:span><text:span text:style-name="T12">:</text:span><text:span text:style-name="T6"> </text:span><text:span text:style-name="T2">'✨ Amplify Video for All Platforms'</text:span><text:span text:style-name="T8">}</text:span></text:p>
      <text:p text:style-name="P7"><text:span text:style-name="T5">            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27">&lt;</text:span><text:span text:style-name="T28">button</text:span></text:p>
      <text:p text:style-name="P7"><text:span text:style-name="T5">              </text:span><text:span text:style-name="T24">onClick</text:span><text:span text:style-name="T12">=</text:span><text:span text:style-name="T8">{</text:span><text:span text:style-name="T6">resetAll</text:span><text:span text:style-name="T8">}</text:span></text:p>
      <text:p text:style-name="P7"><text:span text:style-name="T5">              </text:span><text:span text:style-name="T24">className</text:span><text:span text:style-name="T12">=</text:span><text:span text:style-name="T2">"w-full py-4 border border-white/20 rounded-2xl hover:bg-white/5 flex items-center justify-center gap-2"</text:span></text:p>
      <text:p text:style-name="P7"><text:span text:style-name="T5">            </text:span><text:span text:style-name="T27">&gt;</text:span></text:p>
      <text:p text:style-name="P7"><text:span text:style-name="T5">              </text:span><text:span text:style-name="T27">&lt;</text:span><text:span text:style-name="T28">RotateCcw</text:span><text:span text:style-name="T6"> </text:span><text:span text:style-name="T24">size</text:span><text:span text:style-name="T12">=</text:span><text:span text:style-name="T8">{</text:span><text:span text:style-name="T17">18</text:span><text:span text:style-name="T8">}</text:span><text:span text:style-name="T6"> </text:span><text:span text:style-name="T27">/&gt;</text:span><text:span text:style-name="T6"> Start Over</text:span></text:p>
      <text:p text:style-name="P7"><text:soft-page-break/><text:span text:style-name="T5">            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6">)</text:span><text:span text:style-name="T8">}</text:span></text:p>
      <text:p text:style-name="P7"><text:span text:style-name="T5">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</text:span><text:span text:style-name="T8">{</text:span><text:span text:style-name="T6">error </text:span><text:span text:style-name="T12">&amp;&amp;</text:span><text:span text:style-name="T6">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red-950 border border-red-500/50 p-6 rounded-3xl text-red-300"</text:span><text:span text:style-name="T27">&gt;</text:span><text:span text:style-name="T8">{</text:span><text:span text:style-name="T6">error</text:span><text:span text:style-name="T8">}</text:span><text:span text:style-name="T27">&lt;/</text:span><text:span text:style-name="T28">div</text:span><text:span text:style-name="T27">&gt;</text:span><text:span text:style-name="T8">}</text:span></text:p>
      <text:p text:style-name="P10"/>
      <text:p text:style-name="P7"><text:span text:style-name="T5">      </text:span><text:span text:style-name="T8">{</text:span><text:span text:style-name="T25">/* Results */</text:span><text:span text:style-name="T8">}</text:span></text:p>
      <text:p text:style-name="P7"><text:span text:style-name="T5">      </text:span><text:span text:style-name="T8">{</text:span><text:span text:style-name="T6">results </text:span><text:span text:style-name="T12">&amp;&amp;</text:span><text:span text:style-name="T6"> results.</text:span><text:span text:style-name="T10">length</text:span><text:span text:style-name="T6"> </text:span><text:span text:style-name="T12">&gt;</text:span><text:span text:style-name="T6"> </text:span><text:span text:style-name="T17">0</text:span><text:span text:style-name="T6"> </text:span><text:span text:style-name="T12">&amp;&amp;</text:span><text:span text:style-name="T6"> (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8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items-center"</text:span><text:span text:style-name="T27">&gt;</text:span></text:p>
      <text:p text:style-name="P7"><text:span text:style-name="T5">            </text:span><text:span text:style-name="T27">&lt;</text:span><text:span text:style-name="T28">h2</text:span><text:span text:style-name="T6"> </text:span><text:span text:style-name="T24">className</text:span><text:span text:style-name="T12">=</text:span><text:span text:style-name="T2">"text-3xl font-bold"</text:span><text:span text:style-name="T27">&gt;</text:span><text:span text:style-name="T6">✅ Amplification Complete!</text:span><text:span text:style-name="T27">&lt;/</text:span><text:span text:style-name="T28">h2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gap-3"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copyAllResults</text:span><text:span text:style-name="T8">}</text:span><text:span text:style-name="T6"> </text:span><text:span text:style-name="T24">className</text:span><text:span text:style-name="T12">=</text:span><text:span text:style-name="T2">"flex items-center gap-2 px-6 py-3 bg-white/10 hover:bg-white/20 rounded-2xl"</text:span><text:span text:style-name="T27">&gt;</text:span></text:p>
      <text:p text:style-name="P7"><text:span text:style-name="T5">                </text:span><text:span text:style-name="T27">&lt;</text:span><text:span text:style-name="T28">Copy</text:span><text:span text:style-name="T6"> </text:span><text:span text:style-name="T24">size</text:span><text:span text:style-name="T12">=</text:span><text:span text:style-name="T8">{</text:span><text:span text:style-name="T17">18</text:span><text:span text:style-name="T8">}</text:span><text:span text:style-name="T6"> </text:span><text:span text:style-name="T27">/&gt;</text:span><text:span text:style-name="T6"> Copy All Results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10"/>
      <text:p text:style-name="P7"><text:span text:style-name="T5">              </text:span><text:span text:style-name="T8">{</text:span><text:span text:style-name="T25">/* Download dropdown - individual platforms only */</text:span><text:span text:style-name="T8">}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relative"</text:span><text:span text:style-name="T27">&gt;</text:span></text:p>
      <text:p text:style-name="P7"><text:span text:style-name="T5">                </text:span><text:span text:style-name="T27">&lt;</text:span><text:span text:style-name="T28">button</text:span></text:p>
      <text:p text:style-name="P7"><text:span text:style-name="T5">                 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ShowDownloadDropdown</text:span><text:span text:style-name="T6">(</text:span><text:span text:style-name="T12">!</text:span><text:span text:style-name="T6">showDownloadDropdown)</text:span><text:span text:style-name="T8">}</text:span></text:p>
      <text:p text:style-name="P7"><text:span text:style-name="T5">                  </text:span><text:span text:style-name="T24">disabled</text:span><text:span text:style-name="T12">=</text:span><text:span text:style-name="T8">{</text:span><text:span text:style-name="T6">isOptimizing</text:span><text:span text:style-name="T8">}</text:span></text:p>
      <text:p text:style-name="P7"><text:span text:style-name="T5">                  </text:span><text:span text:style-name="T24">className</text:span><text:span text:style-name="T12">=</text:span><text:span text:style-name="T2">"flex items-center gap-2 px-6 py-3 bg-amber-600 hover:bg-amber-700 rounded-2xl font-semibold disabled:opacity-70"</text:span></text:p>
      <text:p text:style-name="P7"><text:span text:style-name="T5">                </text:span><text:span text:style-name="T27">&gt;</text:span></text:p>
      <text:p text:style-name="P7"><text:span text:style-name="T5">                  </text:span><text:span text:style-name="T27">&lt;</text:span><text:span text:style-name="T28">Download</text:span><text:span text:style-name="T6"> </text:span><text:span text:style-name="T24">size</text:span><text:span text:style-name="T12">=</text:span><text:span text:style-name="T8">{</text:span><text:span text:style-name="T17">18</text:span><text:span text:style-name="T8">}</text:span><text:span text:style-name="T6"> </text:span><text:span text:style-name="T27">/&gt;</text:span></text:p>
      <text:p text:style-name="P7"><text:span text:style-name="T5">                  </text:span><text:span text:style-name="T8">{</text:span><text:span text:style-name="T6">isOptimizing </text:span><text:span text:style-name="T12">?</text:span><text:span text:style-name="T6"> </text:span><text:span text:style-name="T2">'Optimizing...'</text:span><text:span text:style-name="T6"> </text:span><text:span text:style-name="T12">:</text:span><text:span text:style-name="T6"> </text:span><text:span text:style-name="T2">'Download'</text:span><text:span text:style-name="T8">}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10"/>
      <text:p text:style-name="P7"><text:span text:style-name="T5">                </text:span><text:span text:style-name="T8">{</text:span><text:span text:style-name="T6">showDownloadDropdown </text:span><text:span text:style-name="T12">&amp;&amp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absolute right-0 mt-2 w-64 bg-zinc-900 border border-white/10 rounded-2xl shadow-xl z-50 py-2"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px-4 py-2 text-xs text-zinc-400 border-b border-white/10"</text:span><text:span text:style-name="T27">&gt;</text:span></text:p>
      <text:p text:style-name="P8">                      <text:span text:style-name="T15">Video will be formatted on-demand for the selected platform.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  </text:span><text:span text:style-name="T8">{</text:span><text:span text:style-name="T6">[</text:span><text:span text:style-name="T2">'linkedin'</text:span><text:span text:style-name="T6">, </text:span><text:span text:style-name="T2">'youtube'</text:span><text:span text:style-name="T6">, </text:span><text:span text:style-name="T2">'tiktok'</text:span><text:span text:style-name="T6">, </text:span><text:span text:style-name="T2">'instagram'</text:span><text:span text:style-name="T6">, </text:span><text:span text:style-name="T2">'threads'</text:span><text:span text:style-name="T6">, </text:span><text:span text:style-name="T2">'rumble'</text:span><text:span text:style-name="T6">].</text:span><text:span text:style-name="T14">map</text:span><text:span text:style-name="T6">((</text:span><text:span text:style-name="T21">plat</text:span><text:span text:style-name="T6">) </text:span><text:span text:style-name="T8">=&gt;</text:span><text:span text:style-name="T6"> (</text:span></text:p>
      <text:p text:style-name="P7"><text:span text:style-name="T5">                      </text:span><text:span text:style-name="T27">&lt;</text:span><text:span text:style-name="T28">button</text:span></text:p>
      <text:p text:style-name="P7"><text:span text:style-name="T5">                        </text:span><text:span text:style-name="T24">key</text:span><text:span text:style-name="T12">=</text:span><text:span text:style-name="T8">{</text:span><text:span text:style-name="T6">plat</text:span><text:span text:style-name="T8">}</text:span></text:p>
      <text:p text:style-name="P7"><text:span text:style-name="T5">                       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optimizeAndDownload</text:span><text:span text:style-name="T6">(plat)</text:span><text:span text:style-name="T8">}</text:span></text:p>
      <text:p text:style-name="P7"><text:span text:style-name="T5">                        </text:span><text:span text:style-name="T24">className</text:span><text:span text:style-name="T12">=</text:span><text:span text:style-name="T2">"w-full text-left px-6 py-3 hover:bg-white/10 flex justify-between items-center text-sm"</text:span></text:p>
      <text:p text:style-name="P7"><text:span text:style-name="T5">                      </text:span><text:span text:style-name="T27">&gt;</text:span></text:p>
      <text:p text:style-name="P7"><text:span text:style-name="T5">    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capitalize"</text:span><text:span text:style-name="T27">&gt;</text:span><text:span text:style-name="T8">{</text:span><text:span text:style-name="T6">plat</text:span><text:span text:style-name="T8">}</text:span><text:span text:style-name="T27">&lt;/</text:span><text:span text:style-name="T28">span</text:span><text:span text:style-name="T27">&gt;</text:span></text:p>
      <text:p text:style-name="P7"><text:span text:style-name="T5">                      </text:span><text:span text:style-name="T27">&lt;/</text:span><text:span text:style-name="T28">button</text:span><text:span text:style-name="T27">&gt;</text:span></text:p>
      <text:p text:style-name="P7"><text:soft-page-break/><text:span text:style-name="T5">                    </text:span><text:span text:style-name="T6">))</text:span><text:span text:style-name="T8">}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  </text:span><text:span text:style-name="T27">&lt;</text:span><text:span text:style-name="T28">button</text:span></text:p>
      <text:p text:style-name="P7"><text:span text:style-name="T5">               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{</text:span></text:p>
      <text:p text:style-name="P7"><text:span text:style-name="T5">                  </text:span><text:span text:style-name="T14">fetchConnectedAccounts</text:span><text:span text:style-name="T6">();</text:span></text:p>
      <text:p text:style-name="P7"><text:span text:style-name="T5">                  </text:span><text:span text:style-name="T14">setShowZernioModal</text:span><text:span text:style-name="T6">(</text:span><text:span text:style-name="T23">true</text:span><text:span text:style-name="T6">);</text:span></text:p>
      <text:p text:style-name="P7"><text:span text:style-name="T5">                </text:span><text:span text:style-name="T6">}</text:span><text:span text:style-name="T8">}</text:span></text:p>
      <text:p text:style-name="P7"><text:span text:style-name="T5">                </text:span><text:span text:style-name="T24">className</text:span><text:span text:style-name="T12">=</text:span><text:span text:style-name="T2">"flex items-center gap-2 px-6 py-3 bg-emerald-600 hover:bg-emerald-700 rounded-2xl font-semibold"</text:span></text:p>
      <text:p text:style-name="P7"><text:span text:style-name="T5">              </text:span><text:span text:style-name="T27">&gt;</text:span></text:p>
      <text:p text:style-name="P7"><text:span text:style-name="T5">                </text:span><text:span text:style-name="T27">&lt;</text:span><text:span text:style-name="T28">Send</text:span><text:span text:style-name="T6"> </text:span><text:span text:style-name="T24">size</text:span><text:span text:style-name="T12">=</text:span><text:span text:style-name="T8">{</text:span><text:span text:style-name="T17">18</text:span><text:span text:style-name="T8">}</text:span><text:span text:style-name="T6"> </text:span><text:span text:style-name="T27">/&gt;</text:span><text:span text:style-name="T6"> Post with Zernio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</text:span><text:span text:style-name="T8">{</text:span><text:span text:style-name="T6">transcription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rounded-3xl p-8"</text:span><text:span text:style-name="T27">&gt;</text:span></text:p>
      <text:p text:style-name="P7"><text:span text:style-name="T5">  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xl font-semibold mb-4"</text:span><text:span text:style-name="T27">&gt;</text:span><text:span text:style-name="T6">📝 Full Transcription</text:span><text:span text:style-name="T27">&lt;/</text:span><text:span text:style-name="T28">h3</text:span><text:span text:style-name="T27">&gt;</text:span></text:p>
      <text:p text:style-name="P7"><text:span text:style-name="T5">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zinc-300 whitespace-pre-wrap leading-relaxed max-h-96 overflow-auto"</text:span><text:span text:style-name="T27">&gt;</text:span><text:span text:style-name="T8">{</text:span><text:span text:style-name="T6">transcription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10"/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grid grid-cols-1 lg:grid-cols-2 gap-6"</text:span><text:span text:style-name="T27">&gt;</text:span></text:p>
      <text:p text:style-name="P7"><text:span text:style-name="T5">            </text:span><text:span text:style-name="T8">{</text:span><text:span text:style-name="T6">results.</text:span><text:span text:style-name="T14">map</text:span><text:span text:style-name="T6">((</text:span><text:span text:style-name="T21">result</text:span><text:span text:style-name="T6">, </text:span><text:span text:style-name="T21">index</text:span><text:span text:style-name="T6">) </text:span><text:span text:style-name="T8">=&gt;</text:span><text:span text:style-name="T6"> (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index</text:span><text:span text:style-name="T8">}</text:span><text:span text:style-name="T6"> </text:span><text:span text:style-name="T24">className</text:span><text:span text:style-name="T12">=</text:span><text:span text:style-name="T2">"bg-zinc-900 rounded-3xl p-8 border border-white/10"</text:span><text:span text:style-name="T27">&gt;</text:span></text:p>
      <text:p text:style-name="P7"><text:span text:style-name="T5">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mb-6"</text:span><text:span text:style-name="T27">&gt;</text:span></text:p>
      <text:p text:style-name="P7"><text:span text:style-name="T5">      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2xl font-bold text-violet-400"</text:span><text:span text:style-name="T27">&gt;</text:span><text:span text:style-name="T8">{</text:span><text:span text:style-name="T6">result.platform</text:span><text:span text:style-name="T8">}</text:span><text:span text:style-name="T27">&lt;/</text:span><text:span text:style-name="T28">h3</text:span><text:span text:style-name="T27">&gt;</text:span></text:p>
      <text:p text:style-name="P7"><text:span text:style-name="T5">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Platform</text:span><text:span text:style-name="T6">(result)</text:span><text:span text:style-name="T8">}</text:span><text:span text:style-name="T6"> </text:span><text:span text:style-name="T24">className</text:span><text:span text:style-name="T12">=</text:span><text:span text:style-name="T2">"px-5 py-2 bg-white/10 hover:bg-white/20 rounded-xl text-sm"</text:span><text:span text:style-name="T27">&gt;</text:span><text:span text:style-name="T6">Copy</text:span><text:span text:style-name="T27">&lt;/</text:span><text:span text:style-name="T28">button</text:span><text:span text:style-name="T27">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    </text:span><text:span text:style-name="T8">{</text:span><text:span text:style-name="T6">result.title </text:span><text:span text:style-name="T12">&amp;&amp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b-6"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xs uppercase tracking-widest text-zinc-500 mb-1"</text:span><text:span text:style-name="T27">&gt;</text:span><text:span text:style-name="T6">Title</text:span><text:span text:style-name="T27">&lt;/</text:span><text:span text:style-name="T28">p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font-medium"</text:span><text:span text:style-name="T27">&gt;</text:span><text:span text:style-name="T8">{</text:span><text:span text:style-name="T6">result.title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</text:span><text:span text:style-name="T8">}</text:span></text:p>
      <text:p text:style-name="P7"><text:span text:style-name="T5">                </text:span><text:span text:style-name="T8">{</text:span><text:span text:style-name="T6">result.description </text:span><text:span text:style-name="T12">&amp;&amp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b-6"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xs uppercase tracking-widest text-zinc-500 mb-1"</text:span><text:span text:style-name="T27">&gt;</text:span><text:span text:style-name="T6">Description</text:span><text:span text:style-name="T27">&lt;/</text:span><text:span text:style-name="T28">p</text:span><text:span text:style-name="T27">&gt;</text:span></text:p>
      <text:p text:style-name="P7"><text:soft-page-break/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zinc-300"</text:span><text:span text:style-name="T27">&gt;</text:span><text:span text:style-name="T8">{</text:span><text:span text:style-name="T6">result.description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</text:span><text:span text:style-name="T8">}</text:span></text:p>
      <text:p text:style-name="P7"><text:span text:style-name="T5">                </text:span><text:span text:style-name="T8">{</text:span><text:span text:style-name="T6">(result.caption </text:span><text:span text:style-name="T12">||</text:span><text:span text:style-name="T6"> result.text) </text:span><text:span text:style-name="T12">&amp;&amp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b-6"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xs uppercase tracking-widest text-zinc-500 mb-1"</text:span><text:span text:style-name="T27">&gt;</text:span><text:span text:style-name="T6">Caption</text:span><text:span text:style-name="T27">&lt;/</text:span><text:span text:style-name="T28">p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zinc-300"</text:span><text:span text:style-name="T27">&gt;</text:span><text:span text:style-name="T8">{</text:span><text:span text:style-name="T6">result.caption </text:span><text:span text:style-name="T12">||</text:span><text:span text:style-name="T6"> result.text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</text:span><text:span text:style-name="T8">}</text:span></text:p>
      <text:p text:style-name="P7"><text:span text:style-name="T5">                </text:span><text:span text:style-name="T8">{</text:span><text:span text:style-name="T6">result.hashtags </text:span><text:span text:style-name="T12">&amp;&amp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xs uppercase tracking-widest text-zinc-500 mb-1"</text:span><text:span text:style-name="T27">&gt;</text:span><text:span text:style-name="T6">Hashtags</text:span><text:span text:style-name="T27">&lt;/</text:span><text:span text:style-name="T28">p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violet-400 font-mono"</text:span><text:span text:style-name="T27">&gt;</text:span><text:span text:style-name="T8">{</text:span><text:span text:style-name="T6">result.hashtags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6">))</text:span><text:span text:style-name="T8">}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</text:span><text:span text:style-name="T8">{</text:span><text:span text:style-name="T25">/* Zernio modal */</text:span><text:span text:style-name="T8">}</text:span></text:p>
      <text:p text:style-name="P7"><text:span text:style-name="T5">          </text:span><text:span text:style-name="T8">{</text:span><text:span text:style-name="T10">showZernioModal</text:span><text:span text:style-name="T6">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ixed inset-0 bg-black/80 flex items-center justify-center z-50"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rounded-3xl p-8 max-w-md w-full mx-4"</text:span><text:span text:style-name="T27">&gt;</text:span></text:p>
      <text:p text:style-name="P7"><text:span text:style-name="T5">    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2xl font-bold mb-6"</text:span><text:span text:style-name="T27">&gt;</text:span><text:span text:style-name="T6">Post to Zernio</text:span><text:span text:style-name="T27">&lt;/</text:span><text:span text:style-name="T28">h3</text:span><text:span text:style-name="T27">&gt;</text:span></text:p>
      <text:p text:style-name="P7"><text:span text:style-name="T5">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6"</text:span><text:span text:style-name="T27">&gt;</text:span></text:p>
      <text:p text:style-name="P7"><text:span text:style-name="T5">                  </text:span><text:span text:style-name="T27">&lt;</text:span><text:span text:style-name="T28">div</text:span><text:span text:style-name="T27">&gt;</text:span></text:p>
      <text:p text:style-name="P7"><text:span text:style-name="T5">                    </text:span><text:span text:style-name="T27">&lt;</text:span><text:span text:style-name="T28">label</text:span><text:span text:style-name="T6"> </text:span><text:span text:style-name="T24">className</text:span><text:span text:style-name="T12">=</text:span><text:span text:style-name="T2">"block text-sm text-zinc-400 mb-1"</text:span><text:span text:style-name="T27">&gt;</text:span><text:span text:style-name="T6">Connected Account</text:span><text:span text:style-name="T27">&lt;/</text:span><text:span text:style-name="T28">label</text:span><text:span text:style-name="T27">&gt;</text:span></text:p>
      <text:p text:style-name="P7"><text:span text:style-name="T5">                    </text:span><text:span text:style-name="T27">&lt;</text:span><text:span text:style-name="T28">select</text:span></text:p>
      <text:p text:style-name="P7"><text:span text:style-name="T5">                      </text:span><text:span text:style-name="T24">value</text:span><text:span text:style-name="T12">=</text:span><text:span text:style-name="T8">{</text:span><text:span text:style-name="T10">selectedAccountId</text:span><text:span text:style-name="T8">}</text:span></text:p>
      <text:p text:style-name="P7"><text:span text:style-name="T5">                      </text:span><text:span text:style-name="T24">onChange</text:span><text:span text:style-name="T12">=</text:span><text:span text:style-name="T8">{</text:span><text:span text:style-name="T6">(</text:span><text:span text:style-name="T21">e</text:span><text:span text:style-name="T6">) </text:span><text:span text:style-name="T8">=&gt;</text:span><text:span text:style-name="T6"> </text:span><text:span text:style-name="T14">setSelectedAccountId</text:span><text:span text:style-name="T6">(</text:span><text:span text:style-name="T21">e</text:span><text:span text:style-name="T6">.target.</text:span><text:span text:style-name="T10">value</text:span><text:span text:style-name="T6">)</text:span><text:span text:style-name="T8">}</text:span></text:p>
      <text:p text:style-name="P7"><text:span text:style-name="T5">                      </text:span><text:span text:style-name="T24">className</text:span><text:span text:style-name="T12">=</text:span><text:span text:style-name="T2">"w-full bg-zinc-950 border border-white/10 rounded-2xl px-4 py-3 focus:outline-none"</text:span></text:p>
      <text:p text:style-name="P7"><text:span text:style-name="T5">                    </text:span><text:span text:style-name="T27">&gt;</text:span></text:p>
      <text:p text:style-name="P7"><text:span text:style-name="T5">                      </text:span><text:span text:style-name="T27">&lt;</text:span><text:span text:style-name="T28">option</text:span><text:span text:style-name="T6"> </text:span><text:span text:style-name="T24">value</text:span><text:span text:style-name="T12">=</text:span><text:span text:style-name="T2">""</text:span><text:span text:style-name="T27">&gt;</text:span><text:span text:style-name="T6">Select account...</text:span><text:span text:style-name="T27">&lt;/</text:span><text:span text:style-name="T28">option</text:span><text:span text:style-name="T27">&gt;</text:span></text:p>
      <text:p text:style-name="P7"><text:span text:style-name="T5">                      </text:span><text:span text:style-name="T8">{</text:span><text:span text:style-name="T10">connectedAccounts</text:span><text:span text:style-name="T6">.</text:span><text:span text:style-name="T14">map</text:span><text:span text:style-name="T6">((</text:span><text:span text:style-name="T21">acc</text:span><text:span text:style-name="T6">) </text:span><text:span text:style-name="T8">=&gt;</text:span><text:span text:style-name="T6"> (</text:span></text:p>
      <text:p text:style-name="P7"><text:span text:style-name="T5">                        </text:span><text:span text:style-name="T27">&lt;</text:span><text:span text:style-name="T28">option</text:span><text:span text:style-name="T6"> </text:span><text:span text:style-name="T24">key</text:span><text:span text:style-name="T12">=</text:span><text:span text:style-name="T8">{</text:span><text:span text:style-name="T21">acc</text:span><text:span text:style-name="T6">._id</text:span><text:span text:style-name="T8">}</text:span><text:span text:style-name="T6"> </text:span><text:span text:style-name="T24">value</text:span><text:span text:style-name="T12">=</text:span><text:span text:style-name="T8">{</text:span><text:span text:style-name="T21">acc</text:span><text:span text:style-name="T6">._id</text:span><text:span text:style-name="T8">}</text:span><text:span text:style-name="T27">&gt;</text:span></text:p>
      <text:p text:style-name="P7"><text:span text:style-name="T5">                          </text:span><text:span text:style-name="T8">{</text:span><text:span text:style-name="T21">acc</text:span><text:span text:style-name="T6">.platform.</text:span><text:span text:style-name="T14">toUpperCase</text:span><text:span text:style-name="T6">()</text:span><text:span text:style-name="T8">}</text:span><text:span text:style-name="T6"> — </text:span><text:span text:style-name="T8">{</text:span><text:span text:style-name="T21">acc</text:span><text:span text:style-name="T6">.name </text:span><text:span text:style-name="T12">||</text:span><text:span text:style-name="T6"> </text:span><text:span text:style-name="T21">acc</text:span><text:span text:style-name="T6">.username </text:span><text:span text:style-name="T12">||</text:span><text:span text:style-name="T6"> </text:span><text:span text:style-name="T21">acc</text:span><text:span text:style-name="T6">._id</text:span><text:span text:style-name="T8">}</text:span></text:p>
      <text:p text:style-name="P7"><text:span text:style-name="T5">                        </text:span><text:span text:style-name="T27">&lt;/</text:span><text:span text:style-name="T28">option</text:span><text:span text:style-name="T27">&gt;</text:span></text:p>
      <text:p text:style-name="P7"><text:span text:style-name="T5">                      </text:span><text:span text:style-name="T6">))</text:span><text:span text:style-name="T8">}</text:span></text:p>
      <text:p text:style-name="P7"><text:span text:style-name="T5">                    </text:span><text:span text:style-name="T27">&lt;/</text:span><text:span text:style-name="T28">select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gap-3 pt-4"</text:span><text:span text:style-name="T27">&gt;</text:span></text:p>
      <text:p text:style-name="P7"><text:soft-page-break/><text:span text:style-name="T5">  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ShowZernioModal</text:span><text:span text:style-name="T6">(</text:span><text:span text:style-name="T23">false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flex-1 py-4 border border-white/20 rounded-2xl hover:bg-white/5"</text:span><text:span text:style-name="T27">&gt;</text:span><text:span text:style-name="T6">Cancel</text:span><text:span text:style-name="T27">&lt;/</text:span><text:span text:style-name="T28">button</text:span><text:span text:style-name="T27">&gt;</text:span></text:p>
      <text:p text:style-name="P7"><text:span text:style-name="T5">  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14">postToZernio</text:span><text:span text:style-name="T8">}</text:span><text:span text:style-name="T6"> </text:span><text:span text:style-name="T24">disabled</text:span><text:span text:style-name="T12">=</text:span><text:span text:style-name="T8">{</text:span><text:span text:style-name="T12">!</text:span><text:span text:style-name="T10">selectedAccountId</text:span><text:span text:style-name="T8">}</text:span><text:span text:style-name="T6"> </text:span><text:span text:style-name="T24">className</text:span><text:span text:style-name="T12">=</text:span><text:span text:style-name="T2">"flex-1 py-4 bg-emerald-600 hover:bg-emerald-700 rounded-2xl font-semibold disabled:opacity-50"</text:span><text:span text:style-name="T27">&gt;</text:span><text:span text:style-name="T6">Post Now</text:span><text:span text:style-name="T27">&lt;/</text:span><text:span text:style-name="T28">button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6">)</text:span><text:span text:style-name="T8">}</text:span></text:p>
      <text:p text:style-name="P7"><text:span text:style-name="T5">    </text:span><text:span text:style-name="T27">&lt;/</text:span><text:span text:style-name="T28">div</text:span><text:span text:style-name="T27">&gt;</text:span></text:p>
      <text:p text:style-name="P8">  <text:span text:style-name="T15">);</text:span></text:p>
      <text:p text:style-name="P9">}</text:p>
      <text:p text:style-name="P1"/>
      <text:p text:style-name="P1"/>
      <text:p text:style-name="P1"/>
      <text:p text:style-name="P14">components/AudioProcessor.tsx:</text:p>
      <text:p text:style-name="P14"/>
      <text:p text:style-name="P3"><text:span text:style-name="T1">"use client"</text:span>;</text:p>
      <text:p text:style-name="P10"/>
      <text:p text:style-name="P2"><text:span text:style-name="T3">import</text:span> <text:span text:style-name="T5">React</text:span>, <text:span text:style-name="T5">{ useState, useRef, useCallback, useEffect }</text:span> <text:span text:style-name="T3">from</text:span> <text:span text:style-name="T1">'react'</text:span>;</text:p>
      <text:p text:style-name="P2"><text:span text:style-name="T3">import</text:span> <text:span text:style-name="T5">{ Mic, Square, Upload, Play, RefreshCw, Copy, Send, Download, Trash2, Clock }</text:span> <text:span text:style-name="T3">from</text:span> <text:span text:style-name="T1">'lucide-react'</text:span>;</text:p>
      <text:p text:style-name="P2"><text:span text:style-name="T3">import</text:span> <text:span text:style-name="T5">{ createClient }</text:span> <text:span text:style-name="T3">from</text:span> <text:span text:style-name="T1">'@supabase/supabase-js'</text:span>;</text:p>
      <text:p text:style-name="P10"/>
      <text:p text:style-name="P2"><text:span text:style-name="T7">const</text:span> <text:span text:style-name="T9">supabase</text:span> <text:span text:style-name="T11">=</text:span> <text:span text:style-name="T13">createClient</text:span>(</text:p>
      <text:p text:style-name="P7">  <text:span text:style-name="T6">process</text:span><text:span text:style-name="T15">.</text:span><text:span text:style-name="T6">env</text:span><text:span text:style-name="T15">.</text:span><text:span text:style-name="T10">NEXT_PUBLIC_SUPABASE_URL</text:span><text:span text:style-name="T12">!</text:span><text:span text:style-name="T15">,</text:span></text:p>
      <text:p text:style-name="P7">  <text:span text:style-name="T6">process</text:span><text:span text:style-name="T15">.</text:span><text:span text:style-name="T6">env</text:span><text:span text:style-name="T15">.</text:span><text:span text:style-name="T10">NEXT_PUBLIC_SUPABASE_ANON_KEY</text:span><text:span text:style-name="T12">!</text:span></text:p>
      <text:p text:style-name="P2">);</text:p>
      <text:p text:style-name="P10"/>
      <text:p text:style-name="P2"><text:span text:style-name="T7">const</text:span> <text:span text:style-name="T9">MAX_SIZE_MB</text:span> <text:span text:style-name="T11">=</text:span> <text:span text:style-name="T16">500</text:span>;</text:p>
      <text:p text:style-name="P10"/>
      <text:p text:style-name="P2"><text:span text:style-name="T7">const</text:span> <text:span text:style-name="T9">platformsList</text:span> <text:span text:style-name="T11">=</text:span> [</text:p>
      <text:p text:style-name="P7">  <text:span text:style-name="T15">{ </text:span><text:span text:style-name="T6">value</text:span><text:span text:style-name="T24">:</text:span><text:span text:style-name="T6"> </text:span><text:span text:style-name="T2">'YouTube'</text:span><text:span text:style-name="T15">, </text:span><text:span text:style-name="T6">label</text:span><text:span text:style-name="T24">:</text:span><text:span text:style-name="T6"> </text:span><text:span text:style-name="T2">'YouTube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TikTok'</text:span><text:span text:style-name="T15">, </text:span><text:span text:style-name="T6">label</text:span><text:span text:style-name="T24">:</text:span><text:span text:style-name="T6"> </text:span><text:span text:style-name="T2">'TikTok / Reels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Instagram'</text:span><text:span text:style-name="T15">, </text:span><text:span text:style-name="T6">label</text:span><text:span text:style-name="T24">:</text:span><text:span text:style-name="T6"> </text:span><text:span text:style-name="T2">'Instagram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LinkedIn'</text:span><text:span text:style-name="T15">, </text:span><text:span text:style-name="T6">label</text:span><text:span text:style-name="T24">:</text:span><text:span text:style-name="T6"> </text:span><text:span text:style-name="T2">'LinkedIn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X'</text:span><text:span text:style-name="T15">, </text:span><text:span text:style-name="T6">label</text:span><text:span text:style-name="T24">:</text:span><text:span text:style-name="T6"> </text:span><text:span text:style-name="T2">'X (Twitter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Rumble'</text:span><text:span text:style-name="T15">, </text:span><text:span text:style-name="T6">label</text:span><text:span text:style-name="T24">:</text:span><text:span text:style-name="T6"> </text:span><text:span text:style-name="T2">'Rumble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Threads'</text:span><text:span text:style-name="T15">, </text:span><text:span text:style-name="T6">label</text:span><text:span text:style-name="T24">:</text:span><text:span text:style-name="T6"> </text:span><text:span text:style-name="T2">'Threads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ShortsReels'</text:span><text:span text:style-name="T15">, </text:span><text:span text:style-name="T6">label</text:span><text:span text:style-name="T24">:</text:span><text:span text:style-name="T6"> </text:span><text:span text:style-name="T2">'Shorts / Reels'</text:span><text:span text:style-name="T6"> </text:span><text:span text:style-name="T15">},</text:span></text:p>
      <text:p text:style-name="P2">];</text:p>
      <text:p text:style-name="P10"/>
      <text:p text:style-name="P2"><text:span text:style-name="T7">interface</text:span> <text:span text:style-name="T18">PodcastOutputs</text:span> {</text:p>
      <text:p text:style-name="P7"><text:soft-page-break/>  <text:span text:style-name="T6">transcription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showNotes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chapters</text:span><text:span text:style-name="T12">?:</text:span><text:span text:style-name="T15"> </text:span><text:span text:style-name="T19">Array</text:span><text:span text:style-name="T15">&lt;{ </text:span><text:span text:style-name="T6">time</text:span><text:span text:style-name="T12">:</text:span><text:span text:style-name="T15"> </text:span><text:span text:style-name="T19">string</text:span><text:span text:style-name="T15">; </text:span><text:span text:style-name="T6">title</text:span><text:span text:style-name="T12">:</text:span><text:span text:style-name="T15"> </text:span><text:span text:style-name="T19">string</text:span><text:span text:style-name="T15">; </text:span><text:span text:style-name="T6">summary</text:span><text:span text:style-name="T12">?:</text:span><text:span text:style-name="T15"> </text:span><text:span text:style-name="T19">string</text:span><text:span text:style-name="T15"> }&gt;;</text:span></text:p>
      <text:p text:style-name="P7">  <text:span text:style-name="T6">keyQuotes</text:span><text:span text:style-name="T12">?:</text:span><text:span text:style-name="T15"> </text:span><text:span text:style-name="T19">string</text:span><text:span text:style-name="T15">[];</text:span></text:p>
      <text:p text:style-name="P7">  <text:span text:style-name="T6">clipIdeas</text:span><text:span text:style-name="T12">?:</text:span><text:span text:style-name="T15"> </text:span><text:span text:style-name="T19">Array</text:span><text:span text:style-name="T15">&lt;{ </text:span><text:span text:style-name="T6">start</text:span><text:span text:style-name="T12">:</text:span><text:span text:style-name="T15"> </text:span><text:span text:style-name="T19">number</text:span><text:span text:style-name="T15">; </text:span><text:span text:style-name="T6">end</text:span><text:span text:style-name="T12">:</text:span><text:span text:style-name="T15"> </text:span><text:span text:style-name="T19">number</text:span><text:span text:style-name="T15">; </text:span><text:span text:style-name="T6">reason</text:span><text:span text:style-name="T12">:</text:span><text:span text:style-name="T15"> </text:span><text:span text:style-name="T19">string</text:span><text:span text:style-name="T15"> }&gt;;</text:span></text:p>
      <text:p text:style-name="P7">  <text:span text:style-name="T6">platforms</text:span><text:span text:style-name="T12">?:</text:span><text:span text:style-name="T15"> </text:span><text:span text:style-name="T19">Record</text:span><text:span text:style-name="T15">&lt;</text:span><text:span text:style-name="T19">string</text:span><text:span text:style-name="T15">, </text:span><text:span text:style-name="T19">any</text:span><text:span text:style-name="T15">&gt;;</text:span></text:p>
      <text:p text:style-name="P2">}</text:p>
      <text:p text:style-name="P10"/>
      <text:p text:style-name="P2"><text:span text:style-name="T7">interface</text:span> <text:span text:style-name="T18">ConnectedAccount</text:span> {</text:p>
      <text:p text:style-name="P7">  <text:span text:style-name="T6">_id</text:span><text:span text:style-name="T12">:</text:span><text:span text:style-name="T15"> </text:span><text:span text:style-name="T19">string</text:span><text:span text:style-name="T15">;</text:span></text:p>
      <text:p text:style-name="P7">  <text:span text:style-name="T6">platform</text:span><text:span text:style-name="T12">:</text:span><text:span text:style-name="T15"> </text:span><text:span text:style-name="T19">string</text:span><text:span text:style-name="T15">;</text:span></text:p>
      <text:p text:style-name="P7">  <text:span text:style-name="T6">name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username</text:span><text:span text:style-name="T12">?:</text:span><text:span text:style-name="T15"> </text:span><text:span text:style-name="T19">string</text:span><text:span text:style-name="T15">;</text:span></text:p>
      <text:p text:style-name="P2">}</text:p>
      <text:p text:style-name="P10"/>
      <text:p text:style-name="P2"><text:span text:style-name="T3">export</text:span><text:span text:style-name="T20"> </text:span><text:span text:style-name="T3">default</text:span><text:span text:style-name="T20"> </text:span><text:span text:style-name="T7">function</text:span><text:span text:style-name="T20"> </text:span><text:span text:style-name="T13">AudioProcessor</text:span><text:span text:style-name="T20">({ onAmplifySuccess }</text:span><text:span text:style-name="T11">:</text:span><text:span text:style-name="T20"> { </text:span><text:span text:style-name="T13">onAmplifySuccess</text:span><text:span text:style-name="T11">?:</text:span><text:span text:style-name="T20"> () </text:span><text:span text:style-name="T7">=&gt;</text:span><text:span text:style-name="T20"> </text:span><text:span text:style-name="T18">void</text:span><text:span text:style-name="T20"> }) </text:span><text:span text:style-name="T5">{</text:span></text:p>
      <text:p text:style-name="P7"><text:span text:style-name="T5">  </text:span><text:span text:style-name="T8">const</text:span><text:span text:style-name="T6"> [</text:span><text:span text:style-name="T10">audioBlob</text:span><text:span text:style-name="T6">, </text:span><text:span text:style-name="T10">setAudioBlob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Blob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audioUrl</text:span><text:span text:style-name="T6">, </text:span><text:span text:style-name="T10">setAudioUrl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Recording</text:span><text:span text:style-name="T6">, </text:span><text:span text:style-name="T10">setIsRecording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recordingTime</text:span><text:span text:style-name="T6">, </text:span><text:span text:style-name="T10">setRecordingTime</text:span><text:span text:style-name="T6">] </text:span><text:span text:style-name="T12">=</text:span><text:span text:style-name="T6"> </text:span><text:span text:style-name="T14">useState</text:span><text:span text:style-name="T6">(</text:span><text:span text:style-name="T17">0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Processing</text:span><text:span text:style-name="T6">, </text:span><text:span text:style-name="T10">setIsProcessing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podcastOutputs</text:span><text:span text:style-name="T6">, </text:span><text:span text:style-name="T10">setPodcastOutputs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PodcastOutputs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transcription</text:span><text:span text:style-name="T6">, </text:span><text:span text:style-name="T10">setTranscription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&gt;(</text:span><text:span text:style-name="T2">''</text:span><text:span text:style-name="T6">);</text:span></text:p>
      <text:p text:style-name="P7"><text:span text:style-name="T5">  </text:span><text:span text:style-name="T8">const</text:span><text:span text:style-name="T6"> [</text:span><text:span text:style-name="T10">error</text:span><text:span text:style-name="T6">, </text:span><text:span text:style-name="T10">setError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&gt;(</text:span><text:span text:style-name="T2">''</text:span><text:span text:style-name="T6">);</text:span></text:p>
      <text:p text:style-name="P7"><text:span text:style-name="T5">  </text:span><text:span text:style-name="T8">const</text:span><text:span text:style-name="T6"> [</text:span><text:span text:style-name="T10">selectedFile</text:span><text:span text:style-name="T6">, </text:span><text:span text:style-name="T10">setSelectedFile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File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currentUser</text:span><text:span text:style-name="T6">, </text:span><text:span text:style-name="T10">setCurrentUser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Dragging</text:span><text:span text:style-name="T6">, </text:span><text:span text:style-name="T10">setIsDragging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10"/>
      <text:p text:style-name="P7"><text:span text:style-name="T5">  </text:span><text:span text:style-name="T8">const</text:span><text:span text:style-name="T6"> [</text:span><text:span text:style-name="T10">connectedAccounts</text:span><text:span text:style-name="T6">, </text:span><text:span text:style-name="T10">setConnectedAccounts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ConnectedAccount</text:span><text:span text:style-name="T6">[]&gt;([]);</text:span></text:p>
      <text:p text:style-name="P7"><text:span text:style-name="T5">  </text:span><text:span text:style-name="T8">const</text:span><text:span text:style-name="T6"> [</text:span><text:span text:style-name="T10">showZernioModal</text:span><text:span text:style-name="T6">, </text:span><text:span text:style-name="T10">setShowZernioModal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selectedAccountId</text:span><text:span text:style-name="T6">, </text:span><text:span text:style-name="T10">setSelectedAccountId</text:span><text:span text:style-name="T6">] </text:span><text:span text:style-name="T12">=</text:span><text:span text:style-name="T6"> </text:span><text:span text:style-name="T14">useState</text:span><text:span text:style-name="T6">(</text:span><text:span text:style-name="T2">''</text:span><text:span text:style-name="T6">);</text:span></text:p>
      <text:p text:style-name="P10"/>
      <text:p text:style-name="P7"><text:span text:style-name="T5">  </text:span><text:span text:style-name="T8">const</text:span><text:span text:style-name="T6"> [</text:span><text:span text:style-name="T10">generatingClips</text:span><text:span text:style-name="T6">, </text:span><text:span text:style-name="T10">setGeneratingClips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clipModal</text:span><text:span text:style-name="T6">, </text:span><text:span text:style-name="T10">setClipModal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CopyingAll</text:span><text:span text:style-name="T6">, </text:span><text:span text:style-name="T10">setIsCopyingAll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10"/>
      <text:p text:style-name="P7"><text:span text:style-name="T5">  </text:span><text:span text:style-name="T8">const</text:span><text:span text:style-name="T6"> </text:span><text:span text:style-name="T10">fileInput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HTMLInputElement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mediaRecorder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MediaRecorder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chunks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Blob</text:span><text:span text:style-name="T6">[]&gt;([]);</text:span></text:p>
      <text:p text:style-name="P7"><text:span text:style-name="T5">  </text:span><text:span text:style-name="T8">const</text:span><text:span text:style-name="T6"> </text:span><text:span text:style-name="T10">stream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MediaStream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timer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NodeJS</text:span><text:span text:style-name="T6">.</text:span><text:span text:style-name="T19">Timeout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10"/>
      <text:p text:style-name="P7"><text:span text:style-name="T5">  </text:span><text:span text:style-name="T14">useEffect</text:span><text:span text:style-name="T6">(() </text:span><text:span text:style-name="T8">=&gt;</text:span><text:span text:style-name="T6"> {</text:span></text:p>
      <text:p text:style-name="P7"><text:span text:style-name="T5">    </text:span><text:span text:style-name="T8">const</text:span><text:span text:style-name="T6"> </text:span><text:span text:style-name="T14">getUser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  </text:span><text:span text:style-name="T8">const</text:span><text:span text:style-name="T6"> { </text:span><text:span text:style-name="T21">data</text:span><text:span text:style-name="T6">: { </text:span><text:span text:style-name="T10">user</text:span><text:span text:style-name="T6"> } } </text:span><text:span text:style-name="T12">=</text:span><text:span text:style-name="T6"> </text:span><text:span text:style-name="T4">await</text:span><text:span text:style-name="T6"> supabase.auth.</text:span><text:span text:style-name="T14">getUser</text:span><text:span text:style-name="T6">();</text:span></text:p>
      <text:p text:style-name="P7"><text:span text:style-name="T5">      </text:span><text:span text:style-name="T14">setCurrentUser</text:span><text:span text:style-name="T6">(user);</text:span></text:p>
      <text:p text:style-name="P8"><text:soft-page-break/>    <text:span text:style-name="T15">};</text:span></text:p>
      <text:p text:style-name="P7"><text:span text:style-name="T5">    </text:span><text:span text:style-name="T14">getUser</text:span><text:span text:style-name="T6">();</text:span></text:p>
      <text:p text:style-name="P10"/>
      <text:p text:style-name="P7"><text:span text:style-name="T5">    </text:span><text:span text:style-name="T8">const</text:span><text:span text:style-name="T6"> { </text:span><text:span text:style-name="T21">data</text:span><text:span text:style-name="T6">: </text:span><text:span text:style-name="T10">listener</text:span><text:span text:style-name="T6"> } </text:span><text:span text:style-name="T12">=</text:span><text:span text:style-name="T6"> supabase.auth.</text:span><text:span text:style-name="T14">onAuthStateChange</text:span><text:span text:style-name="T6">((</text:span><text:span text:style-name="T21">_</text:span><text:span text:style-name="T6">, </text:span><text:span text:style-name="T21">session</text:span><text:span text:style-name="T6">) </text:span><text:span text:style-name="T8">=&gt;</text:span><text:span text:style-name="T6"> {</text:span></text:p>
      <text:p text:style-name="P7"><text:span text:style-name="T5">      </text:span><text:span text:style-name="T14">setCurrentUser</text:span><text:span text:style-name="T6">(session?.user </text:span><text:span text:style-name="T12">||</text:span><text:span text:style-name="T6"> </text:span><text:span text:style-name="T23">null</text:span><text:span text:style-name="T6">);</text:span></text:p>
      <text:p text:style-name="P8">    <text:span text:style-name="T15">});</text:span></text:p>
      <text:p text:style-name="P7"><text:span text:style-name="T5">    </text:span><text:span text:style-name="T4">return</text:span><text:span text:style-name="T6"> () </text:span><text:span text:style-name="T8">=&gt;</text:span><text:span text:style-name="T6"> listener.subscription.</text:span><text:span text:style-name="T14">unsubscribe</text:span><text:span text:style-name="T6">();</text:span></text:p>
      <text:p text:style-name="P8">  <text:span text:style-name="T15">}, []);</text:span></text:p>
      <text:p text:style-name="P10"/>
      <text:p text:style-name="P7"><text:span text:style-name="T5">  </text:span><text:span text:style-name="T25">// ==================== RECORDING ====================</text:span></text:p>
      <text:p text:style-name="P7"><text:span text:style-name="T5">  </text:span><text:span text:style-name="T8">const</text:span><text:span text:style-name="T6"> </text:span><text:span text:style-name="T14">startRecording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RecordingTime</text:span><text:span text:style-name="T6">(</text:span><text:span text:style-name="T17">0</text:span><text:span text:style-name="T6">);</text:span></text:p>
      <text:p text:style-name="P7"><text:span text:style-name="T5">    </text:span><text:span text:style-name="T6">chunksRef.current </text:span><text:span text:style-name="T12">=</text:span><text:span text:style-name="T6"> []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stream</text:span><text:span text:style-name="T6"> </text:span><text:span text:style-name="T12">=</text:span><text:span text:style-name="T6"> </text:span><text:span text:style-name="T4">await</text:span><text:span text:style-name="T6"> navigator.mediaDevices.</text:span><text:span text:style-name="T14">getUserMedia</text:span><text:span text:style-name="T6">({ </text:span></text:p>
      <text:p text:style-name="P7"><text:span text:style-name="T5">        </text:span><text:span text:style-name="T24">audio:</text:span><text:span text:style-name="T6"> { </text:span><text:span text:style-name="T24">echoCancellation:</text:span><text:span text:style-name="T6"> </text:span><text:span text:style-name="T23">true</text:span><text:span text:style-name="T6">, </text:span><text:span text:style-name="T24">noiseSuppression:</text:span><text:span text:style-name="T6"> </text:span><text:span text:style-name="T23">true</text:span><text:span text:style-name="T6">, </text:span><text:span text:style-name="T24">sampleRate:</text:span><text:span text:style-name="T6"> </text:span><text:span text:style-name="T17">44100</text:span><text:span text:style-name="T6"> } </text:span></text:p>
      <text:p text:style-name="P8">      <text:span text:style-name="T15">});</text:span></text:p>
      <text:p text:style-name="P7"><text:span text:style-name="T5">      </text:span><text:span text:style-name="T6">streamRef.current </text:span><text:span text:style-name="T12">=</text:span><text:span text:style-name="T6"> stream;</text:span></text:p>
      <text:p text:style-name="P7"><text:span text:style-name="T5">      </text:span><text:span text:style-name="T14">setIsRecording</text:span><text:span text:style-name="T6">(</text:span><text:span text:style-name="T23">true</text:span><text:span text:style-name="T6">);</text:span></text:p>
      <text:p text:style-name="P10"/>
      <text:p text:style-name="P7"><text:span text:style-name="T5">      </text:span><text:span text:style-name="T8">const</text:span><text:span text:style-name="T6"> </text:span><text:span text:style-name="T10">mediaRecorder</text:span><text:span text:style-name="T6"> </text:span><text:span text:style-name="T12">=</text:span><text:span text:style-name="T6"> </text:span><text:span text:style-name="T23">new</text:span><text:span text:style-name="T6"> </text:span><text:span text:style-name="T14">MediaRecorder</text:span><text:span text:style-name="T6">(stream, { </text:span><text:span text:style-name="T24">mimeType:</text:span><text:span text:style-name="T6"> </text:span><text:span text:style-name="T2">'audio/webm;codecs=opus'</text:span><text:span text:style-name="T6"> });</text:span></text:p>
      <text:p text:style-name="P7"><text:span text:style-name="T5">      </text:span><text:span text:style-name="T6">mediaRecorderRef.current </text:span><text:span text:style-name="T12">=</text:span><text:span text:style-name="T6"> mediaRecorder;</text:span></text:p>
      <text:p text:style-name="P10"/>
      <text:p text:style-name="P7"><text:span text:style-name="T5">      </text:span><text:span text:style-name="T6">mediaRecorder.</text:span><text:span text:style-name="T14">ondataavailable</text:span><text:span text:style-name="T6"> </text:span><text:span text:style-name="T12">=</text:span><text:span text:style-name="T6"> (</text:span><text:span text:style-name="T21">e</text:span><text:span text:style-name="T6">) </text:span><text:span text:style-name="T8">=&gt;</text:span><text:span text:style-name="T6"> {</text:span></text:p>
      <text:p text:style-name="P7"><text:span text:style-name="T5">        </text:span><text:span text:style-name="T4">if</text:span><text:span text:style-name="T6"> (e.data.size </text:span><text:span text:style-name="T12">&gt;</text:span><text:span text:style-name="T6"> </text:span><text:span text:style-name="T17">0</text:span><text:span text:style-name="T6">) chunksRef.current.</text:span><text:span text:style-name="T14">push</text:span><text:span text:style-name="T6">(e.data);</text:span></text:p>
      <text:p text:style-name="P8">      <text:span text:style-name="T15">};</text:span></text:p>
      <text:p text:style-name="P10"/>
      <text:p text:style-name="P7"><text:span text:style-name="T5">      </text:span><text:span text:style-name="T6">mediaRecorder.</text:span><text:span text:style-name="T14">onstop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    </text:span><text:span text:style-name="T8">const</text:span><text:span text:style-name="T6"> </text:span><text:span text:style-name="T10">blob</text:span><text:span text:style-name="T6"> </text:span><text:span text:style-name="T12">=</text:span><text:span text:style-name="T6"> </text:span><text:span text:style-name="T23">new</text:span><text:span text:style-name="T6"> </text:span><text:span text:style-name="T14">Blob</text:span><text:span text:style-name="T6">(chunksRef.current, { </text:span><text:span text:style-name="T24">type:</text:span><text:span text:style-name="T6"> </text:span><text:span text:style-name="T2">'audio/webm'</text:span><text:span text:style-name="T6"> });</text:span></text:p>
      <text:p text:style-name="P7"><text:span text:style-name="T5">        </text:span><text:span text:style-name="T8">const</text:span><text:span text:style-name="T6"> </text:span><text:span text:style-name="T10">url</text:span><text:span text:style-name="T6"> </text:span><text:span text:style-name="T12">=</text:span><text:span text:style-name="T6"> </text:span><text:span text:style-name="T10">URL</text:span><text:span text:style-name="T6">.</text:span><text:span text:style-name="T14">createObjectURL</text:span><text:span text:style-name="T6">(blob);</text:span></text:p>
      <text:p text:style-name="P7"><text:span text:style-name="T5">        </text:span><text:span text:style-name="T14">setAudioUrl</text:span><text:span text:style-name="T6">(url);</text:span></text:p>
      <text:p text:style-name="P7"><text:span text:style-name="T5">        </text:span><text:span text:style-name="T14">setAudioBlob</text:span><text:span text:style-name="T6">(blob);</text:span></text:p>
      <text:p text:style-name="P7"><text:span text:style-name="T5">        </text:span><text:span text:style-name="T14">setSelectedFile</text:span><text:span text:style-name="T6">(</text:span><text:span text:style-name="T23">null</text:span><text:span text:style-name="T6">);</text:span></text:p>
      <text:p text:style-name="P7"><text:span text:style-name="T5">        </text:span><text:span text:style-name="T4">if</text:span><text:span text:style-name="T6"> (streamRef.current) streamRef.current.</text:span><text:span text:style-name="T14">getTracks</text:span><text:span text:style-name="T6">().</text:span><text:span text:style-name="T14">forEach</text:span><text:span text:style-name="T6">(</text:span><text:span text:style-name="T21">track</text:span><text:span text:style-name="T6"> </text:span><text:span text:style-name="T8">=&gt;</text:span><text:span text:style-name="T6"> track.</text:span><text:span text:style-name="T14">stop</text:span><text:span text:style-name="T6">());</text:span></text:p>
      <text:p text:style-name="P8">      <text:span text:style-name="T15">};</text:span></text:p>
      <text:p text:style-name="P10"/>
      <text:p text:style-name="P7"><text:span text:style-name="T5">      </text:span><text:span text:style-name="T6">mediaRecorder.</text:span><text:span text:style-name="T14">start</text:span><text:span text:style-name="T6">(</text:span><text:span text:style-name="T17">1000</text:span><text:span text:style-name="T6">);</text:span></text:p>
      <text:p text:style-name="P7"><text:span text:style-name="T5">      </text:span><text:span text:style-name="T6">timerRef.current </text:span><text:span text:style-name="T12">=</text:span><text:span text:style-name="T6"> </text:span><text:span text:style-name="T14">setInterval</text:span><text:span text:style-name="T6">(() </text:span><text:span text:style-name="T8">=&gt;</text:span><text:span text:style-name="T6"> </text:span><text:span text:style-name="T14">setRecordingTime</text:span><text:span text:style-name="T6">(</text:span><text:span text:style-name="T21">p</text:span><text:span text:style-name="T6"> </text:span><text:span text:style-name="T8">=&gt;</text:span><text:span text:style-name="T6"> p </text:span><text:span text:style-name="T12">+</text:span><text:span text:style-name="T6"> </text:span><text:span text:style-name="T17">1</text:span><text:span text:style-name="T6">), </text:span><text:span text:style-name="T17">1000</text:span><text:span text:style-name="T6">);</text:span></text:p>
      <text:p text:style-name="P7"><text:span text:style-name="T5">    </text:span><text:span text:style-name="T6">} </text:span><text:span text:style-name="T4">catch</text:span><text:span text:style-name="T6"> (</text:span><text:span text:style-name="T21">err</text:span><text:span text:style-name="T12">:</text:span><text:span text:style-name="T6"> </text:span><text:span text:style-name="T19">any</text:span><text:span text:style-name="T6">) {</text:span></text:p>
      <text:p text:style-name="P7"><text:span text:style-name="T5">      </text:span><text:span text:style-name="T14">setError</text:span><text:span text:style-name="T6">(</text:span><text:span text:style-name="T2">'Failed to access microphone. Please allow permissions.'</text:span><text:span text:style-name="T6">);</text:span></text:p>
      <text:p text:style-name="P7"><text:span text:style-name="T5">      </text:span><text:span text:style-name="T14">setIsRecording</text:span><text:span text:style-name="T6">(</text:span><text:span text:style-name="T23">false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><text:soft-page-break/></text:p>
      <text:p text:style-name="P7"><text:span text:style-name="T5">  </text:span><text:span text:style-name="T8">const</text:span><text:span text:style-name="T6"> </text:span><text:span text:style-name="T14">stopRecording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mediaRecorderRef.current) mediaRecorderRef.current.</text:span><text:span text:style-name="T14">stop</text:span><text:span text:style-name="T6">();</text:span></text:p>
      <text:p text:style-name="P7"><text:span text:style-name="T5">    </text:span><text:span text:style-name="T4">if</text:span><text:span text:style-name="T6"> (timerRef.current) </text:span><text:span text:style-name="T14">clearInterval</text:span><text:span text:style-name="T6">(timerRef.current);</text:span></text:p>
      <text:p text:style-name="P7"><text:span text:style-name="T5">    </text:span><text:span text:style-name="T14">setIsRecording</text:span><text:span text:style-name="T6">(</text:span><text:span text:style-name="T23">false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25">// ==================== FILE UPLOAD ====================</text:span></text:p>
      <text:p text:style-name="P7"><text:span text:style-name="T5">  </text:span><text:span text:style-name="T8">const</text:span><text:span text:style-name="T6"> </text:span><text:span text:style-name="T14">triggerFileUpload</text:span><text:span text:style-name="T6"> </text:span><text:span text:style-name="T12">=</text:span><text:span text:style-name="T6"> () </text:span><text:span text:style-name="T8">=&gt;</text:span><text:span text:style-name="T6"> fileInputRef.current?.</text:span><text:span text:style-name="T14">click</text:span><text:span text:style-name="T6">();</text:span></text:p>
      <text:p text:style-name="P10"/>
      <text:p text:style-name="P7"><text:span text:style-name="T5">  </text:span><text:span text:style-name="T8">const</text:span><text:span text:style-name="T6"> </text:span><text:span text:style-name="T10">handleFileSelect</text:span><text:span text:style-name="T6"> </text:span><text:span text:style-name="T12">=</text:span><text:span text:style-name="T6"> </text:span><text:span text:style-name="T14">useCallback</text:span><text:span text:style-name="T6">((</text:span><text:span text:style-name="T21">file</text:span><text:span text:style-name="T12">:</text:span><text:span text:style-name="T6"> </text:span><text:span text:style-name="T19">File</text:span><text:span text:style-name="T6">) </text:span><text:span text:style-name="T8">=&gt;</text:span><text:span text:style-name="T6"> {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PodcastOutputs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Transcription</text:span><text:span text:style-name="T6">(</text:span><text:span text:style-name="T2">''</text:span><text:span text:style-name="T6">);</text:span></text:p>
      <text:p text:style-name="P10"/>
      <text:p text:style-name="P7"><text:span text:style-name="T5">    </text:span><text:span text:style-name="T8">const</text:span><text:span text:style-name="T6"> </text:span><text:span text:style-name="T10">sizeMB</text:span><text:span text:style-name="T6"> </text:span><text:span text:style-name="T12">=</text:span><text:span text:style-name="T6"> file.size </text:span><text:span text:style-name="T12">/</text:span><text:span text:style-name="T6"> (</text:span><text:span text:style-name="T17">1024</text:span><text:span text:style-name="T6"> </text:span><text:span text:style-name="T12">*</text:span><text:span text:style-name="T6"> </text:span><text:span text:style-name="T17">1024</text:span><text:span text:style-name="T6">);</text:span></text:p>
      <text:p text:style-name="P7"><text:span text:style-name="T5">    </text:span><text:span text:style-name="T4">if</text:span><text:span text:style-name="T6"> (sizeMB </text:span><text:span text:style-name="T12">&gt;</text:span><text:span text:style-name="T6"> </text:span><text:span text:style-name="T10">MAX_SIZE_MB</text:span><text:span text:style-name="T6">) {</text:span></text:p>
      <text:p text:style-name="P7"><text:span text:style-name="T5">      </text:span><text:span text:style-name="T14">setError</text:span><text:span text:style-name="T6">(</text:span><text:span text:style-name="T2">`File too large (max </text:span><text:span text:style-name="T23">${</text:span><text:span text:style-name="T10">MAX_SIZE_MB</text:span><text:span text:style-name="T23">}</text:span><text:span text:style-name="T2">MB)`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7"><text:span text:style-name="T5">    </text:span><text:span text:style-name="T4">if</text:span><text:span text:style-name="T6"> (</text:span><text:span text:style-name="T12">!</text:span><text:span text:style-name="T6">file.type.</text:span><text:span text:style-name="T14">startsWith</text:span><text:span text:style-name="T6">(</text:span><text:span text:style-name="T2">'audio/'</text:span><text:span text:style-name="T6">)) {</text:span></text:p>
      <text:p text:style-name="P7"><text:span text:style-name="T5">      </text:span><text:span text:style-name="T14">setError</text:span><text:span text:style-name="T6">(</text:span><text:span text:style-name="T2">'Please upload a valid audio file'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10"/>
      <text:p text:style-name="P7"><text:span text:style-name="T5">    </text:span><text:span text:style-name="T14">setSelectedFile</text:span><text:span text:style-name="T6">(file);</text:span></text:p>
      <text:p text:style-name="P7"><text:span text:style-name="T5">    </text:span><text:span text:style-name="T8">const</text:span><text:span text:style-name="T6"> </text:span><text:span text:style-name="T10">url</text:span><text:span text:style-name="T6"> </text:span><text:span text:style-name="T12">=</text:span><text:span text:style-name="T6"> </text:span><text:span text:style-name="T10">URL</text:span><text:span text:style-name="T6">.</text:span><text:span text:style-name="T14">createObjectURL</text:span><text:span text:style-name="T6">(file);</text:span></text:p>
      <text:p text:style-name="P7"><text:span text:style-name="T5">    </text:span><text:span text:style-name="T14">setAudioUrl</text:span><text:span text:style-name="T6">(url);</text:span></text:p>
      <text:p text:style-name="P7"><text:span text:style-name="T5">    </text:span><text:span text:style-name="T14">setAudioBlob</text:span><text:span text:style-name="T6">(file);</text:span></text:p>
      <text:p text:style-name="P8">  <text:span text:style-name="T15">}, []);</text:span></text:p>
      <text:p text:style-name="P10"/>
      <text:p text:style-name="P7"><text:span text:style-name="T5">  </text:span><text:span text:style-name="T8">const</text:span><text:span text:style-name="T6"> </text:span><text:span text:style-name="T14">handleDrop</text:span><text:span text:style-name="T6"> </text:span><text:span text:style-name="T12">=</text:span><text:span text:style-name="T6"> (</text:span><text:span text:style-name="T21">e</text:span><text:span text:style-name="T12">:</text:span><text:span text:style-name="T6"> </text:span><text:span text:style-name="T19">React</text:span><text:span text:style-name="T6">.</text:span><text:span text:style-name="T19">DragEvent</text:span><text:span text:style-name="T6">&lt;</text:span><text:span text:style-name="T19">HTMLDivElement</text:span><text:span text:style-name="T6">&gt;) </text:span><text:span text:style-name="T8">=&gt;</text:span><text:span text:style-name="T6"> {</text:span></text:p>
      <text:p text:style-name="P7"><text:span text:style-name="T5">    </text:span><text:span text:style-name="T6">e.</text:span><text:span text:style-name="T14">preventDefault</text:span><text:span text:style-name="T6">();</text:span></text:p>
      <text:p text:style-name="P7"><text:span text:style-name="T5">    </text:span><text:span text:style-name="T14">setIsDragging</text:span><text:span text:style-name="T6">(</text:span><text:span text:style-name="T23">false</text:span><text:span text:style-name="T6">);</text:span></text:p>
      <text:p text:style-name="P7"><text:span text:style-name="T5">    </text:span><text:span text:style-name="T8">const</text:span><text:span text:style-name="T6"> </text:span><text:span text:style-name="T10">file</text:span><text:span text:style-name="T6"> </text:span><text:span text:style-name="T12">=</text:span><text:span text:style-name="T6"> e.dataTransfer.files[</text:span><text:span text:style-name="T17">0</text:span><text:span text:style-name="T6">];</text:span></text:p>
      <text:p text:style-name="P7"><text:span text:style-name="T5">    </text:span><text:span text:style-name="T4">if</text:span><text:span text:style-name="T6"> (file) </text:span><text:span text:style-name="T14">handleFileSelect</text:span><text:span text:style-name="T6">(file);</text:span></text:p>
      <text:p text:style-name="P8">  <text:span text:style-name="T15">};</text:span></text:p>
      <text:p text:style-name="P10"/>
      <text:p text:style-name="P7"><text:span text:style-name="T5">  </text:span><text:span text:style-name="T25">// ==================== AMPLIFY ====================</text:span></text:p>
      <text:p text:style-name="P7"><text:span text:style-name="T5">  </text:span><text:span text:style-name="T8">const</text:span><text:span text:style-name="T6"> </text:span><text:span text:style-name="T14">amplifyAudio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audioBlob </text:span><text:span text:style-name="T12">||</text:span><text:span text:style-name="T6"> </text:span><text:span text:style-name="T12">!</text:span><text:span text:style-name="T6">currentUser) {</text:span></text:p>
      <text:p text:style-name="P7"><text:span text:style-name="T5">      </text:span><text:span text:style-name="T14">setError</text:span><text:span text:style-name="T6">(</text:span><text:span text:style-name="T12">!</text:span><text:span text:style-name="T6">currentUser </text:span><text:span text:style-name="T12">?</text:span><text:span text:style-name="T6"> </text:span><text:span text:style-name="T2">"Please log in"</text:span><text:span text:style-name="T6"> </text:span><text:span text:style-name="T12">:</text:span><text:span text:style-name="T6"> </text:span><text:span text:style-name="T2">"No audio selected"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10"/>
      <text:p text:style-name="P7"><text:span text:style-name="T5">    </text:span><text:span text:style-name="T14">setIsProcessing</text:span><text:span text:style-name="T6">(</text:span><text:span text:style-name="T23">true</text:span><text:span text:style-name="T6">);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oft-page-break/><text:span text:style-name="T5">    </text:span><text:span text:style-name="T14">setPodcastOutputs</text:span><text:span text:style-name="T6">(</text:span><text:span text:style-name="T23">null</text:span><text:span text:style-name="T6">)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formData</text:span><text:span text:style-name="T6"> </text:span><text:span text:style-name="T12">=</text:span><text:span text:style-name="T6"> </text:span><text:span text:style-name="T23">new</text:span><text:span text:style-name="T6"> </text:span><text:span text:style-name="T14">FormData</text:span><text:span text:style-name="T6">();</text:span></text:p>
      <text:p text:style-name="P7"><text:span text:style-name="T5">      </text:span><text:span text:style-name="T8">const</text:span><text:span text:style-name="T6"> </text:span><text:span text:style-name="T10">fileName</text:span><text:span text:style-name="T6"> </text:span><text:span text:style-name="T12">=</text:span><text:span text:style-name="T6"> selectedFile?.name </text:span><text:span text:style-name="T12">||</text:span><text:span text:style-name="T6"> </text:span><text:span text:style-name="T2">`recording-</text:span><text:span text:style-name="T23">${</text:span><text:span text:style-name="T6">Date</text:span><text:span text:style-name="T12">.</text:span><text:span text:style-name="T14">now</text:span><text:span text:style-name="T12">()</text:span><text:span text:style-name="T23">}</text:span><text:span text:style-name="T2">.webm`</text:span><text:span text:style-name="T6">;</text:span></text:p>
      <text:p text:style-name="P7"><text:span text:style-name="T5">      </text:span><text:span text:style-name="T6">formData.</text:span><text:span text:style-name="T14">append</text:span><text:span text:style-name="T6">(</text:span><text:span text:style-name="T2">'audio'</text:span><text:span text:style-name="T6">, audioBlob, fileName);</text:span></text:p>
      <text:p text:style-name="P7"><text:span text:style-name="T5">      </text:span><text:span text:style-name="T6">formData.</text:span><text:span text:style-name="T14">append</text:span><text:span text:style-name="T6">(</text:span><text:span text:style-name="T2">'user_id'</text:span><text:span text:style-name="T6">, currentUser.id);</text:span></text:p>
      <text:p text:style-name="P10"/>
      <text:p text:style-name="P7"><text:span text:style-name="T5">      </text:span><text:span text:style-name="T8">const</text:span><text:span text:style-name="T6"> </text:span><text:span text:style-name="T10">response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'/api/amplify-audio'</text:span><text:span text:style-name="T6">, { </text:span><text:span text:style-name="T24">method:</text:span><text:span text:style-name="T6"> </text:span><text:span text:style-name="T2">'POST'</text:span><text:span text:style-name="T6">, </text:span><text:span text:style-name="T24">body:</text:span><text:span text:style-name="T6"> formData });</text:span></text:p>
      <text:p text:style-name="P7"><text:span text:style-name="T5">      </text:span><text:span text:style-name="T8">const</text:span><text:span text:style-name="T6"> </text:span><text:span text:style-name="T10">data</text:span><text:span text:style-name="T6"> </text:span><text:span text:style-name="T12">=</text:span><text:span text:style-name="T6"> </text:span><text:span text:style-name="T4">await</text:span><text:span text:style-name="T6"> response.</text:span><text:span text:style-name="T14">json</text:span><text:span text:style-name="T6">();</text:span></text:p>
      <text:p text:style-name="P10"/>
      <text:p text:style-name="P7"><text:span text:style-name="T5">      </text:span><text:span text:style-name="T4">if</text:span><text:span text:style-name="T6"> (</text:span><text:span text:style-name="T12">!</text:span><text:span text:style-name="T6">response.ok) </text:span><text:span text:style-name="T4">throw</text:span><text:span text:style-name="T6"> </text:span><text:span text:style-name="T23">new</text:span><text:span text:style-name="T6"> </text:span><text:span text:style-name="T14">Error</text:span><text:span text:style-name="T6">(data.error </text:span><text:span text:style-name="T12">||</text:span><text:span text:style-name="T6"> </text:span><text:span text:style-name="T2">'Failed'</text:span><text:span text:style-name="T6">);</text:span></text:p>
      <text:p text:style-name="P10"/>
      <text:p text:style-name="P7"><text:span text:style-name="T5">      </text:span><text:span text:style-name="T14">setTranscription</text:span><text:span text:style-name="T6">(data.transcription </text:span><text:span text:style-name="T12">||</text:span><text:span text:style-name="T6"> </text:span><text:span text:style-name="T2">''</text:span><text:span text:style-name="T6">);</text:span></text:p>
      <text:p text:style-name="P7"><text:span text:style-name="T5">      </text:span><text:span text:style-name="T14">setPodcastOutputs</text:span><text:span text:style-name="T6">({</text:span></text:p>
      <text:p text:style-name="P7"><text:span text:style-name="T5">        </text:span><text:span text:style-name="T24">transcription:</text:span><text:span text:style-name="T6"> data.transcription,</text:span></text:p>
      <text:p text:style-name="P7"><text:span text:style-name="T5">        </text:span><text:span text:style-name="T24">showNotes:</text:span><text:span text:style-name="T6"> data.showNotes,</text:span></text:p>
      <text:p text:style-name="P7"><text:span text:style-name="T5">        </text:span><text:span text:style-name="T24">chapters:</text:span><text:span text:style-name="T6"> data.chapters,</text:span></text:p>
      <text:p text:style-name="P7"><text:span text:style-name="T5">        </text:span><text:span text:style-name="T24">keyQuotes:</text:span><text:span text:style-name="T6"> data.keyQuotes,</text:span></text:p>
      <text:p text:style-name="P7"><text:span text:style-name="T5">        </text:span><text:span text:style-name="T24">clipIdeas:</text:span><text:span text:style-name="T6"> data.clipIdeas,</text:span></text:p>
      <text:p text:style-name="P7"><text:span text:style-name="T5">        </text:span><text:span text:style-name="T24">platforms:</text:span><text:span text:style-name="T6"> data.platforms,</text:span></text:p>
      <text:p text:style-name="P8">      <text:span text:style-name="T15">});</text:span></text:p>
      <text:p text:style-name="P10"/>
      <text:p text:style-name="P7"><text:span text:style-name="T5">      </text:span><text:span text:style-name="T14">onAmplifySuccess</text:span><text:span text:style-name="T6">?.();</text:span></text:p>
      <text:p text:style-name="P7"><text:span text:style-name="T5">    </text:span><text:span text:style-name="T6">} </text:span><text:span text:style-name="T4">catch</text:span><text:span text:style-name="T6"> (</text:span><text:span text:style-name="T21">err</text:span><text:span text:style-name="T12">:</text:span><text:span text:style-name="T6"> </text:span><text:span text:style-name="T19">any</text:span><text:span text:style-name="T6">) {</text:span></text:p>
      <text:p text:style-name="P7"><text:span text:style-name="T5">      </text:span><text:span text:style-name="T14">setError</text:span><text:span text:style-name="T6">(err.message </text:span><text:span text:style-name="T12">||</text:span><text:span text:style-name="T6"> </text:span><text:span text:style-name="T2">'Failed to amplify audio'</text:span><text:span text:style-name="T6">);</text:span></text:p>
      <text:p text:style-name="P7"><text:span text:style-name="T5">    </text:span><text:span text:style-name="T6">} </text:span><text:span text:style-name="T4">finally</text:span><text:span text:style-name="T6"> {</text:span></text:p>
      <text:p text:style-name="P7"><text:span text:style-name="T5">      </text:span><text:span text:style-name="T14">setIsProcessing</text:span><text:span text:style-name="T6">(</text:span><text:span text:style-name="T23">false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25">// ==================== COPY ALL ====================</text:span></text:p>
      <text:p text:style-name="P7"><text:span text:style-name="T5">  </text:span><text:span text:style-name="T8">const</text:span><text:span text:style-name="T6"> </text:span><text:span text:style-name="T14">copyAllPlatforms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podcastOutputs?.platforms) </text:span><text:span text:style-name="T4">return</text:span><text:span text:style-name="T6">;</text:span></text:p>
      <text:p text:style-name="P7"><text:span text:style-name="T5">    </text:span><text:span text:style-name="T14">setIsCopyingAll</text:span><text:span text:style-name="T6">(</text:span><text:span text:style-name="T23">true</text:span><text:span text:style-name="T6">);</text:span></text:p>
      <text:p text:style-name="P10"/>
      <text:p text:style-name="P7"><text:span text:style-name="T5">    </text:span><text:span text:style-name="T8">let</text:span><text:span text:style-name="T6"> allText </text:span><text:span text:style-name="T12">=</text:span><text:span text:style-name="T6"> </text:span><text:span text:style-name="T2">"PODCAST CONTENT</text:span><text:span text:style-name="T26">\n\n</text:span><text:span text:style-name="T2">"</text:span><text:span text:style-name="T6">;</text:span></text:p>
      <text:p text:style-name="P7"><text:span text:style-name="T5">    </text:span><text:span text:style-name="T4">if</text:span><text:span text:style-name="T6"> (transcription) allText </text:span><text:span text:style-name="T12">+=</text:span><text:span text:style-name="T6"> </text:span><text:span text:style-name="T2">`TRANSCRIPTION:</text:span><text:span text:style-name="T26">\n</text:span><text:span text:style-name="T23">${</text:span><text:span text:style-name="T6">transcription</text:span><text:span text:style-name="T23">}</text:span><text:span text:style-name="T26">\n\n</text:span><text:span text:style-name="T2">`</text:span><text:span text:style-name="T6">;</text:span></text:p>
      <text:p text:style-name="P7"><text:span text:style-name="T5">    </text:span><text:span text:style-name="T4">if</text:span><text:span text:style-name="T6"> (podcastOutputs.showNotes) allText </text:span><text:span text:style-name="T12">+=</text:span><text:span text:style-name="T6"> </text:span><text:span text:style-name="T2">`SHOW NOTES:</text:span><text:span text:style-name="T26">\n</text:span><text:span text:style-name="T23">${</text:span><text:span text:style-name="T6">podcastOutputs</text:span><text:span text:style-name="T12">.</text:span><text:span text:style-name="T6">showNotes</text:span><text:span text:style-name="T23">}</text:span><text:span text:style-name="T26">\n\n</text:span><text:span text:style-name="T2">`</text:span><text:span text:style-name="T6">;</text:span></text:p>
      <text:p text:style-name="P7"><text:span text:style-name="T5">    </text:span><text:span text:style-name="T4">if</text:span><text:span text:style-name="T6"> (podcastOutputs.keyQuotes?.</text:span><text:span text:style-name="T10">length</text:span><text:span text:style-name="T6">) allText </text:span><text:span text:style-name="T12">+=</text:span><text:span text:style-name="T6"> </text:span><text:span text:style-name="T2">`KEY QUOTES:</text:span><text:span text:style-name="T26">\n</text:span><text:span text:style-name="T23">${</text:span><text:span text:style-name="T6">podcastOutputs</text:span><text:span text:style-name="T12">.</text:span><text:span text:style-name="T6">keyQuotes</text:span><text:span text:style-name="T12">.</text:span><text:span text:style-name="T14">join</text:span><text:span text:style-name="T12">(</text:span><text:span text:style-name="T2">'</text:span><text:span text:style-name="T26">\n</text:span><text:span text:style-name="T2">'</text:span><text:span text:style-name="T12">)</text:span><text:span text:style-name="T23">}</text:span><text:span text:style-name="T26">\n\n</text:span><text:span text:style-name="T2">`</text:span><text:span text:style-name="T6">;</text:span></text:p>
      <text:p text:style-name="P10"/>
      <text:p text:style-name="P7"><text:span text:style-name="T5">    </text:span><text:span text:style-name="T6">Object.</text:span><text:span text:style-name="T14">entries</text:span><text:span text:style-name="T6">(podcastOutputs.platforms).</text:span><text:span text:style-name="T14">forEach</text:span><text:span text:style-name="T6">(([</text:span><text:span text:style-name="T21">platform</text:span><text:span text:style-name="T6">, </text:span><text:span text:style-name="T21">content</text:span><text:span text:style-name="T6">]) </text:span><text:span text:style-name="T8">=&gt;</text:span><text:span text:style-name="T6"> {</text:span></text:p>
      <text:p text:style-name="P7"><text:span text:style-name="T5">      </text:span><text:span text:style-name="T6">allText </text:span><text:span text:style-name="T12">+=</text:span><text:span text:style-name="T6"> </text:span><text:span text:style-name="T2">`</text:span><text:span text:style-name="T23">${</text:span><text:span text:style-name="T6">platform</text:span><text:span text:style-name="T12">.</text:span><text:span text:style-name="T14">toUpperCase</text:span><text:span text:style-name="T12">()</text:span><text:span text:style-name="T23">}</text:span><text:span text:style-name="T2">:</text:span><text:span text:style-name="T26">\n</text:span><text:span text:style-name="T2">`</text:span><text:span text:style-name="T6">;</text:span></text:p>
      <text:p text:style-name="P7"><text:span text:style-name="T5">      </text:span><text:span text:style-name="T4">if</text:span><text:span text:style-name="T6"> (</text:span><text:span text:style-name="T23">typeof</text:span><text:span text:style-name="T6"> content </text:span><text:span text:style-name="T12">===</text:span><text:span text:style-name="T6"> </text:span><text:span text:style-name="T2">'string'</text:span><text:span text:style-name="T6">) {</text:span></text:p>
      <text:p text:style-name="P7"><text:soft-page-break/><text:span text:style-name="T5">        </text:span><text:span text:style-name="T6">allText </text:span><text:span text:style-name="T12">+=</text:span><text:span text:style-name="T6"> content </text:span><text:span text:style-name="T12">+</text:span><text:span text:style-name="T6"> </text:span><text:span text:style-name="T2">'</text:span><text:span text:style-name="T26">\n\n</text:span><text:span text:style-name="T2">'</text:span><text:span text:style-name="T6">;</text:span></text:p>
      <text:p text:style-name="P7"><text:span text:style-name="T5">      </text:span><text:span text:style-name="T6">} </text:span><text:span text:style-name="T4">else</text:span><text:span text:style-name="T6"> </text:span><text:span text:style-name="T4">if</text:span><text:span text:style-name="T6"> (content </text:span><text:span text:style-name="T12">&amp;&amp;</text:span><text:span text:style-name="T6"> </text:span><text:span text:style-name="T23">typeof</text:span><text:span text:style-name="T6"> content </text:span><text:span text:style-name="T12">===</text:span><text:span text:style-name="T6"> </text:span><text:span text:style-name="T2">'object'</text:span><text:span text:style-name="T6">) {</text:span></text:p>
      <text:p text:style-name="P7"><text:span text:style-name="T5">        </text:span><text:span text:style-name="T6">Object.</text:span><text:span text:style-name="T14">entries</text:span><text:span text:style-name="T6">(content).</text:span><text:span text:style-name="T14">forEach</text:span><text:span text:style-name="T6">(([</text:span><text:span text:style-name="T21">key</text:span><text:span text:style-name="T6">, </text:span><text:span text:style-name="T21">value</text:span><text:span text:style-name="T6">]) </text:span><text:span text:style-name="T8">=&gt;</text:span><text:span text:style-name="T6"> {</text:span></text:p>
      <text:p text:style-name="P7"><text:span text:style-name="T5">          </text:span><text:span text:style-name="T6">allText </text:span><text:span text:style-name="T12">+=</text:span><text:span text:style-name="T6"> </text:span><text:span text:style-name="T2">`</text:span><text:span text:style-name="T23">${</text:span><text:span text:style-name="T6">key</text:span><text:span text:style-name="T23">}</text:span><text:span text:style-name="T2">: </text:span><text:span text:style-name="T23">${</text:span><text:span text:style-name="T6">value</text:span><text:span text:style-name="T23">}</text:span><text:span text:style-name="T26">\n</text:span><text:span text:style-name="T2">`</text:span><text:span text:style-name="T6">;</text:span></text:p>
      <text:p text:style-name="P8">        <text:span text:style-name="T15">});</text:span></text:p>
      <text:p text:style-name="P7"><text:span text:style-name="T5">        </text:span><text:span text:style-name="T6">allText </text:span><text:span text:style-name="T12">+=</text:span><text:span text:style-name="T6"> </text:span><text:span text:style-name="T2">'</text:span><text:span text:style-name="T26">\n</text:span><text:span text:style-name="T2">'</text:span><text:span text:style-name="T6">;</text:span></text:p>
      <text:p text:style-name="P8">      <text:span text:style-name="T15">}</text:span></text:p>
      <text:p text:style-name="P8">    <text:span text:style-name="T15">})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4">await</text:span><text:span text:style-name="T6"> navigator.clipboard.</text:span><text:span text:style-name="T14">writeText</text:span><text:span text:style-name="T6">(allText.</text:span><text:span text:style-name="T14">trim</text:span><text:span text:style-name="T6">());</text:span></text:p>
      <text:p text:style-name="P7"><text:span text:style-name="T5">      </text:span><text:span text:style-name="T14">alert</text:span><text:span text:style-name="T6">(</text:span><text:span text:style-name="T2">'✅ Copied all platform content!'</text:span><text:span text:style-name="T6">);</text:span></text:p>
      <text:p text:style-name="P7"><text:span text:style-name="T5">    </text:span><text:span text:style-name="T6">} </text:span><text:span text:style-name="T4">catch</text:span><text:span text:style-name="T6"> {</text:span></text:p>
      <text:p text:style-name="P7"><text:span text:style-name="T5">      </text:span><text:span text:style-name="T14">alert</text:span><text:span text:style-name="T6">(</text:span><text:span text:style-name="T2">'Failed to copy'</text:span><text:span text:style-name="T6">);</text:span></text:p>
      <text:p text:style-name="P8">    <text:span text:style-name="T15">}</text:span></text:p>
      <text:p text:style-name="P7"><text:span text:style-name="T5">    </text:span><text:span text:style-name="T14">setIsCopyingAll</text:span><text:span text:style-name="T6">(</text:span><text:span text:style-name="T23">false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25">// ==================== ZERNIO ====================</text:span></text:p>
      <text:p text:style-name="P7"><text:span text:style-name="T5">  </text:span><text:span text:style-name="T8">const</text:span><text:span text:style-name="T6"> </text:span><text:span text:style-name="T14">fetchConnectedAccounts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currentUser) </text:span><text:span text:style-name="T4">return</text:span><text:span text:style-name="T6">;</text:span></text:p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res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`/api/zernio/accounts?user_id=</text:span><text:span text:style-name="T23">${</text:span><text:span text:style-name="T6">currentUser</text:span><text:span text:style-name="T12">.</text:span><text:span text:style-name="T6">id</text:span><text:span text:style-name="T23">}</text:span><text:span text:style-name="T2">`</text:span><text:span text:style-name="T6">);</text:span></text:p>
      <text:p text:style-name="P7"><text:span text:style-name="T5">      </text:span><text:span text:style-name="T8">const</text:span><text:span text:style-name="T6"> </text:span><text:span text:style-name="T10">data</text:span><text:span text:style-name="T6"> </text:span><text:span text:style-name="T12">=</text:span><text:span text:style-name="T6"> </text:span><text:span text:style-name="T4">await</text:span><text:span text:style-name="T6"> res.</text:span><text:span text:style-name="T14">json</text:span><text:span text:style-name="T6">();</text:span></text:p>
      <text:p text:style-name="P7"><text:span text:style-name="T5">      </text:span><text:span text:style-name="T4">if</text:span><text:span text:style-name="T6"> (data.accounts) </text:span><text:span text:style-name="T14">setConnectedAccounts</text:span><text:span text:style-name="T6">(data.accounts);</text:span></text:p>
      <text:p text:style-name="P7"><text:span text:style-name="T5">    </text:span><text:span text:style-name="T6">} </text:span><text:span text:style-name="T4">catch</text:span><text:span text:style-name="T6"> (e) {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postToZernio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currentUser </text:span><text:span text:style-name="T12">||</text:span><text:span text:style-name="T6"> </text:span><text:span text:style-name="T12">!</text:span><text:span text:style-name="T6">selectedAccountId </text:span><text:span text:style-name="T12">||</text:span><text:span text:style-name="T6"> </text:span><text:span text:style-name="T12">!</text:span><text:span text:style-name="T6">podcastOutputs) </text:span><text:span text:style-name="T4">return</text:span><text:span text:style-name="T6">;</text:span></text:p>
      <text:p text:style-name="P7"><text:span text:style-name="T5">    </text:span><text:span text:style-name="T8">const</text:span><text:span text:style-name="T6"> </text:span><text:span text:style-name="T10">selectedAccount</text:span><text:span text:style-name="T6"> </text:span><text:span text:style-name="T12">=</text:span><text:span text:style-name="T6"> connectedAccounts.</text:span><text:span text:style-name="T14">find</text:span><text:span text:style-name="T6">(</text:span><text:span text:style-name="T21">a</text:span><text:span text:style-name="T6"> </text:span><text:span text:style-name="T8">=&gt;</text:span><text:span text:style-name="T6"> a._id </text:span><text:span text:style-name="T12">===</text:span><text:span text:style-name="T6"> selectedAccountId);</text:span></text:p>
      <text:p text:style-name="P7"><text:span text:style-name="T5">    </text:span><text:span text:style-name="T4">if</text:span><text:span text:style-name="T6"> (</text:span><text:span text:style-name="T12">!</text:span><text:span text:style-name="T6">selectedAccount) </text:span><text:span text:style-name="T4">return</text:span><text:span text:style-name="T6">;</text:span></text:p>
      <text:p text:style-name="P10"/>
      <text:p text:style-name="P7"><text:span text:style-name="T5">    </text:span><text:span text:style-name="T8">const</text:span><text:span text:style-name="T6"> </text:span><text:span text:style-name="T10">postContent</text:span><text:span text:style-name="T6"> </text:span><text:span text:style-name="T12">=</text:span><text:span text:style-name="T6"> podcastOutputs.showNotes </text:span><text:span text:style-name="T12">||</text:span><text:span text:style-name="T6"> transcription </text:span><text:span text:style-name="T12">||</text:span><text:span text:style-name="T6"> </text:span><text:span text:style-name="T2">'Amplified podcast content'</text:span><text:span text:style-name="T6">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res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'/api/zernio/post'</text:span><text:span text:style-name="T6">, {</text:span></text:p>
      <text:p text:style-name="P7"><text:span text:style-name="T5">        </text:span><text:span text:style-name="T24">method:</text:span><text:span text:style-name="T6"> </text:span><text:span text:style-name="T2">'POST'</text:span><text:span text:style-name="T6">,</text:span></text:p>
      <text:p text:style-name="P7"><text:span text:style-name="T5">        </text:span><text:span text:style-name="T24">headers:</text:span><text:span text:style-name="T6"> { </text:span><text:span text:style-name="T2">'Content-Type'</text:span><text:span text:style-name="T24">:</text:span><text:span text:style-name="T6"> </text:span><text:span text:style-name="T2">'application/json'</text:span><text:span text:style-name="T6"> },</text:span></text:p>
      <text:p text:style-name="P7"><text:span text:style-name="T5">        </text:span><text:span text:style-name="T24">body:</text:span><text:span text:style-name="T6"> </text:span><text:span text:style-name="T10">JSON</text:span><text:span text:style-name="T6">.</text:span><text:span text:style-name="T14">stringify</text:span><text:span text:style-name="T6">({</text:span></text:p>
      <text:p text:style-name="P7"><text:span text:style-name="T5">          </text:span><text:span text:style-name="T24">platform_id:</text:span><text:span text:style-name="T6"> selectedAccount._id,</text:span></text:p>
      <text:p text:style-name="P7"><text:span text:style-name="T5">          </text:span><text:span text:style-name="T24">platform:</text:span><text:span text:style-name="T6"> selectedAccount.platform,</text:span></text:p>
      <text:p text:style-name="P7"><text:span text:style-name="T5">          </text:span><text:span text:style-name="T24">content:</text:span><text:span text:style-name="T6"> postContent,</text:span></text:p>
      <text:p text:style-name="P7"><text:span text:style-name="T5">          </text:span><text:span text:style-name="T24">user_id:</text:span><text:span text:style-name="T6"> currentUser.id,</text:span></text:p>
      <text:p text:style-name="P8">        <text:span text:style-name="T15">}),</text:span></text:p>
      <text:p text:style-name="P8">      <text:span text:style-name="T15">});</text:span></text:p>
      <text:p text:style-name="P7"><text:soft-page-break/><text:span text:style-name="T5">      </text:span><text:span text:style-name="T8">const</text:span><text:span text:style-name="T6"> </text:span><text:span text:style-name="T10">json</text:span><text:span text:style-name="T6"> </text:span><text:span text:style-name="T12">=</text:span><text:span text:style-name="T6"> </text:span><text:span text:style-name="T4">await</text:span><text:span text:style-name="T6"> res.</text:span><text:span text:style-name="T14">json</text:span><text:span text:style-name="T6">();</text:span></text:p>
      <text:p text:style-name="P7"><text:span text:style-name="T5">      </text:span><text:span text:style-name="T4">if</text:span><text:span text:style-name="T6"> (json.success) {</text:span></text:p>
      <text:p text:style-name="P7"><text:span text:style-name="T5">        </text:span><text:span text:style-name="T14">alert</text:span><text:span text:style-name="T6">(json.message);</text:span></text:p>
      <text:p text:style-name="P7"><text:span text:style-name="T5">        </text:span><text:span text:style-name="T14">setShowZernioModal</text:span><text:span text:style-name="T6">(</text:span><text:span text:style-name="T23">false</text:span><text:span text:style-name="T6">);</text:span></text:p>
      <text:p text:style-name="P7"><text:span text:style-name="T5">        </text:span><text:span text:style-name="T14">setSelectedAccountId</text:span><text:span text:style-name="T6">(</text:span><text:span text:style-name="T2">''</text:span><text:span text:style-name="T6">);</text:span></text:p>
      <text:p text:style-name="P7"><text:span text:style-name="T5">      </text:span><text:span text:style-name="T6">} </text:span><text:span text:style-name="T4">else</text:span><text:span text:style-name="T6"> {</text:span></text:p>
      <text:p text:style-name="P7"><text:span text:style-name="T5">        </text:span><text:span text:style-name="T14">alert</text:span><text:span text:style-name="T6">(</text:span><text:span text:style-name="T2">'Error: '</text:span><text:span text:style-name="T6"> </text:span><text:span text:style-name="T12">+</text:span><text:span text:style-name="T6"> json.error);</text:span></text:p>
      <text:p text:style-name="P8">      <text:span text:style-name="T15">}</text:span></text:p>
      <text:p text:style-name="P7"><text:span text:style-name="T5">    </text:span><text:span text:style-name="T6">} </text:span><text:span text:style-name="T4">catch</text:span><text:span text:style-name="T6"> {</text:span></text:p>
      <text:p text:style-name="P7"><text:span text:style-name="T5">      </text:span><text:span text:style-name="T14">alert</text:span><text:span text:style-name="T6">(</text:span><text:span text:style-name="T2">'Failed to post to Zernio'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25">// ==================== SMART CLIPS ====================</text:span></text:p>
      <text:p text:style-name="P7"><text:span text:style-name="T5">  </text:span><text:span text:style-name="T8">const</text:span><text:span text:style-name="T6"> </text:span><text:span text:style-name="T14">generateSmartClips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podcastOutputs?.clipIdeas?.</text:span><text:span text:style-name="T10">length</text:span><text:span text:style-name="T6">) {</text:span></text:p>
      <text:p text:style-name="P7"><text:span text:style-name="T5">      </text:span><text:span text:style-name="T14">alert</text:span><text:span text:style-name="T6">(</text:span><text:span text:style-name="T2">"No clip ideas available yet."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7"><text:span text:style-name="T5">    </text:span><text:span text:style-name="T14">setGeneratingClips</text:span><text:span text:style-name="T6">(</text:span><text:span text:style-name="T23">true</text:span><text:span text:style-name="T6">);</text:span></text:p>
      <text:p text:style-name="P7"><text:span text:style-name="T5">    </text:span><text:span text:style-name="T14">setClipModal</text:span><text:span text:style-name="T6">({</text:span></text:p>
      <text:p text:style-name="P7"><text:span text:style-name="T5">      </text:span><text:span text:style-name="T24">clips:</text:span><text:span text:style-name="T6"> podcastOutputs.clipIdeas,</text:span></text:p>
      <text:p text:style-name="P7"><text:span text:style-name="T5">      </text:span><text:span text:style-name="T24">transcription:</text:span><text:span text:style-name="T6"> transcription,</text:span></text:p>
      <text:p text:style-name="P8">    <text:span text:style-name="T15">});</text:span></text:p>
      <text:p text:style-name="P7"><text:span text:style-name="T5">    </text:span><text:span text:style-name="T14">setGeneratingClips</text:span><text:span text:style-name="T6">(</text:span><text:span text:style-name="T23">false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25">// ==================== UTILS ====================</text:span></text:p>
      <text:p text:style-name="P7"><text:span text:style-name="T5">  </text:span><text:span text:style-name="T8">const</text:span><text:span text:style-name="T6"> </text:span><text:span text:style-name="T14">resetAll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audioUrl) </text:span><text:span text:style-name="T10">URL</text:span><text:span text:style-name="T6">.</text:span><text:span text:style-name="T14">revokeObjectURL</text:span><text:span text:style-name="T6">(audioUrl);</text:span></text:p>
      <text:p text:style-name="P7"><text:span text:style-name="T5">    </text:span><text:span text:style-name="T4">if</text:span><text:span text:style-name="T6"> (streamRef.current) streamRef.current.</text:span><text:span text:style-name="T14">getTracks</text:span><text:span text:style-name="T6">().</text:span><text:span text:style-name="T14">forEach</text:span><text:span text:style-name="T6">(</text:span><text:span text:style-name="T21">track</text:span><text:span text:style-name="T6"> </text:span><text:span text:style-name="T8">=&gt;</text:span><text:span text:style-name="T6"> track.</text:span><text:span text:style-name="T14">stop</text:span><text:span text:style-name="T6">());</text:span></text:p>
      <text:p text:style-name="P7"><text:span text:style-name="T5">    </text:span><text:span text:style-name="T4">if</text:span><text:span text:style-name="T6"> (timerRef.current) </text:span><text:span text:style-name="T14">clearInterval</text:span><text:span text:style-name="T6">(timerRef.current);</text:span></text:p>
      <text:p text:style-name="P10"/>
      <text:p text:style-name="P7"><text:span text:style-name="T5">    </text:span><text:span text:style-name="T14">setAudioBlob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AudioUrl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SelectedFile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PodcastOutputs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Transcription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RecordingTime</text:span><text:span text:style-name="T6">(</text:span><text:span text:style-name="T17">0</text:span><text:span text:style-name="T6">);</text:span></text:p>
      <text:p text:style-name="P7"><text:span text:style-name="T5">    </text:span><text:span text:style-name="T14">setIsRecording</text:span><text:span text:style-name="T6">(</text:span><text:span text:style-name="T23">false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copyToClipboard</text:span><text:span text:style-name="T6"> </text:span><text:span text:style-name="T12">=</text:span><text:span text:style-name="T6"> </text:span><text:span text:style-name="T23">async</text:span><text:span text:style-name="T6"> (</text:span><text:span text:style-name="T21">text</text:span><text:span text:style-name="T12">:</text:span><text:span text:style-name="T6"> </text:span><text:span text:style-name="T19">string</text:span><text:span text:style-name="T6">, </text:span><text:span text:style-name="T21">label</text:span><text:span text:style-name="T12">:</text:span><text:span text:style-name="T6"> </text:span><text:span text:style-name="T19">string</text:span><text:span text:style-name="T6">) </text:span><text:span text:style-name="T8">=&gt;</text:span><text:span text:style-name="T6"> {</text:span></text:p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4">await</text:span><text:span text:style-name="T6"> navigator.clipboard.</text:span><text:span text:style-name="T14">writeText</text:span><text:span text:style-name="T6">(text);</text:span></text:p>
      <text:p text:style-name="P7"><text:span text:style-name="T5">      </text:span><text:span text:style-name="T14">alert</text:span><text:span text:style-name="T6">(</text:span><text:span text:style-name="T2">`✅ Copied </text:span><text:span text:style-name="T23">${</text:span><text:span text:style-name="T6">label</text:span><text:span text:style-name="T23">}</text:span><text:span text:style-name="T2">`</text:span><text:span text:style-name="T6">);</text:span></text:p>
      <text:p text:style-name="P7"><text:soft-page-break/><text:span text:style-name="T5">    </text:span><text:span text:style-name="T6">} </text:span><text:span text:style-name="T4">catch</text:span><text:span text:style-name="T6"> {</text:span></text:p>
      <text:p text:style-name="P7"><text:span text:style-name="T5">      </text:span><text:span text:style-name="T14">alert</text:span><text:span text:style-name="T6">(</text:span><text:span text:style-name="T2">"Failed to copy"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formatTime</text:span><text:span text:style-name="T6"> </text:span><text:span text:style-name="T12">=</text:span><text:span text:style-name="T6"> (</text:span><text:span text:style-name="T21">seconds</text:span><text:span text:style-name="T12">:</text:span><text:span text:style-name="T6"> </text:span><text:span text:style-name="T19">number</text:span><text:span text:style-name="T6">) </text:span><text:span text:style-name="T8">=&gt;</text:span><text:span text:style-name="T6"> {</text:span></text:p>
      <text:p text:style-name="P7"><text:span text:style-name="T5">    </text:span><text:span text:style-name="T8">const</text:span><text:span text:style-name="T6"> </text:span><text:span text:style-name="T10">mins</text:span><text:span text:style-name="T6"> </text:span><text:span text:style-name="T12">=</text:span><text:span text:style-name="T6"> Math.</text:span><text:span text:style-name="T14">floor</text:span><text:span text:style-name="T6">(seconds </text:span><text:span text:style-name="T12">/</text:span><text:span text:style-name="T6"> </text:span><text:span text:style-name="T17">60</text:span><text:span text:style-name="T6">);</text:span></text:p>
      <text:p text:style-name="P7"><text:span text:style-name="T5">    </text:span><text:span text:style-name="T8">const</text:span><text:span text:style-name="T6"> </text:span><text:span text:style-name="T10">secs</text:span><text:span text:style-name="T6"> </text:span><text:span text:style-name="T12">=</text:span><text:span text:style-name="T6"> seconds </text:span><text:span text:style-name="T12">%</text:span><text:span text:style-name="T6"> </text:span><text:span text:style-name="T17">60</text:span><text:span text:style-name="T6">;</text:span></text:p>
      <text:p text:style-name="P7"><text:span text:style-name="T5">    </text:span><text:span text:style-name="T4">return</text:span><text:span text:style-name="T6"> </text:span><text:span text:style-name="T2">`</text:span><text:span text:style-name="T23">${</text:span><text:span text:style-name="T6">mins</text:span><text:span text:style-name="T23">}</text:span><text:span text:style-name="T2">:</text:span><text:span text:style-name="T23">${</text:span><text:span text:style-name="T6">secs</text:span><text:span text:style-name="T12">.</text:span><text:span text:style-name="T14">toString</text:span><text:span text:style-name="T12">().</text:span><text:span text:style-name="T14">padStart</text:span><text:span text:style-name="T12">(</text:span><text:span text:style-name="T17">2</text:span><text:span text:style-name="T12">, </text:span><text:span text:style-name="T2">'0'</text:span><text:span text:style-name="T12">)</text:span><text:span text:style-name="T23">}</text:span><text:span text:style-name="T2">`</text:span><text:span text:style-name="T6">;</text:span></text:p>
      <text:p text:style-name="P8">  <text:span text:style-name="T15">};</text:span></text:p>
      <text:p text:style-name="P10"/>
      <text:p text:style-name="P7"><text:span text:style-name="T5">  </text:span><text:span text:style-name="T4">return</text:span><text:span text:style-name="T6"> (</text:span></text:p>
      <text:p text:style-name="P7"><text:span text:style-name="T5">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ax-w-4xl mx-auto"</text:span><text:span text:style-name="T27">&gt;</text:span></text:p>
      <text:p text:style-name="P7"><text:span text:style-name="T5">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center mb-8"</text:span><text:span text:style-name="T27">&gt;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justify-center gap-3 mb-2"</text:span><text:span text:style-name="T27">&gt;</text:span></text:p>
      <text:p text:style-name="P7"><text:span text:style-name="T5">         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2">"w-8 h-8 text-violet-400"</text:span><text:span text:style-name="T6"> </text:span><text:span text:style-name="T27">/&gt;</text:span></text:p>
      <text:p text:style-name="P7"><text:span text:style-name="T5">          </text:span><text:span text:style-name="T27">&lt;</text:span><text:span text:style-name="T28">h2</text:span><text:span text:style-name="T6"> </text:span><text:span text:style-name="T24">className</text:span><text:span text:style-name="T12">=</text:span><text:span text:style-name="T2">"text-3xl font-bold tracking-tight"</text:span><text:span text:style-name="T27">&gt;</text:span><text:span text:style-name="T6">Audio Mode</text:span><text:span text:style-name="T27">&lt;/</text:span><text:span text:style-name="T28">h2</text:span><text:span text:style-name="T27">&gt;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zinc-400"</text:span><text:span text:style-name="T27">&gt;</text:span><text:span text:style-name="T6">Record or upload podcasts </text:span><text:span text:style-name="T8">&amp;amp;</text:span><text:span text:style-name="T6"> voiceovers. Get show notes, chapters, quotes </text:span><text:span text:style-name="T8">&amp;amp;</text:span><text:span text:style-name="T6"> clips.</text:span><text:span text:style-name="T27">&lt;/</text:span><text:span text:style-name="T28">p</text:span><text:span text:style-name="T27">&gt;</text:span></text:p>
      <text:p text:style-name="P7"><text:span text:style-name="T5">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</text:span><text:span text:style-name="T8">{</text:span><text:span text:style-name="T25">/* RECORDING + UPLOAD */</text:span><text:span text:style-name="T8">}</text:span></text:p>
      <text:p text:style-name="P7"><text:span text:style-name="T5">      </text:span><text:span text:style-name="T8">{</text:span><text:span text:style-name="T12">!</text:span><text:span text:style-name="T6">audioUrl </text:span><text:span text:style-name="T12">&amp;&amp;</text:span><text:span text:style-name="T6"> (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6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8 text-center"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b-6"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8">{</text:span><text:span text:style-name="T2">`mx-auto w-20 h-20 rounded-full flex items-center justify-center mb-4 </text:span><text:span text:style-name="T23">${</text:span><text:span text:style-name="T6">isRecording</text:span><text:span text:style-name="T12"> ? </text:span><text:span text:style-name="T2">'bg-red-500/20 animate-pulse'</text:span><text:span text:style-name="T12"> : </text:span><text:span text:style-name="T2">'bg-zinc-800'</text:span><text:span text:style-name="T23">}</text:span><text:span text:style-name="T2">`</text:span><text:span text:style-name="T8">}</text:span><text:span text:style-name="T27">&gt;</text:span></text:p>
      <text:p text:style-name="P7"><text:span text:style-name="T5">               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8">{</text:span><text:span text:style-name="T2">`w-10 h-10 </text:span><text:span text:style-name="T23">${</text:span><text:span text:style-name="T6">isRecording</text:span><text:span text:style-name="T12"> ? </text:span><text:span text:style-name="T2">'text-red-500'</text:span><text:span text:style-name="T12"> : </text:span><text:span text:style-name="T2">'text-violet-400'</text:span><text:span text:style-name="T23">}</text:span><text:span text:style-name="T2">`</text:span><text:span text:style-name="T8">}</text:span><text:span text:style-name="T6"> </text:span><text:span text:style-name="T27">/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xl font-semibold mb-1"</text:span><text:span text:style-name="T27">&gt;</text:span><text:span text:style-name="T6">Record Live Audio</text:span><text:span text:style-name="T27">&lt;/</text:span><text:span text:style-name="T28">h3</text:span><text:span text:style-name="T27">&gt;</text:span></text:p>
      <text:p text:style-name="P7"><text:span text:style-name="T5">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sm text-zinc-400"</text:span><text:span text:style-name="T27">&gt;</text:span><text:span text:style-name="T6">Voiceovers, podcast intros, or quick ideas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</text:span><text:span text:style-name="T8">{</text:span><text:span text:style-name="T6">isRecording </text:span><text:span text:style-name="T12">?</text:span><text:span text:style-name="T6"> (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4"</text:span><text:span text:style-name="T27">&gt;</text:span></text:p>
      <text:p text:style-name="P7"><text:span text:style-name="T5">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4xl font-mono font-bold text-red-500"</text:span><text:span text:style-name="T27">&gt;</text:span><text:span text:style-name="T8">{</text:span><text:span text:style-name="T14">formatTime</text:span><text:span text:style-name="T6">(recordingTime)</text:span><text:span text:style-name="T8">}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stopRecording</text:span><text:span text:style-name="T8">}</text:span><text:span text:style-name="T6"> </text:span><text:span text:style-name="T24">className</text:span><text:span text:style-name="T12">=</text:span><text:span text:style-name="T2">"flex items-center justify-center gap-3 mx-auto bg-red-600 hover:bg-red-700 px-10 py-4 rounded-2xl font-semibold text-lg"</text:span><text:span text:style-name="T27">&gt;</text:span></text:p>
      <text:p text:style-name="P7"><text:span text:style-name="T5">                  </text:span><text:span text:style-name="T27">&lt;</text:span><text:span text:style-name="T28">Square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Stop Recording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oft-page-break/><text:span text:style-name="T5">            </text:span><text:span text:style-name="T6">) </text:span><text:span text:style-name="T12">:</text:span><text:span text:style-name="T6"> (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startRecording</text:span><text:span text:style-name="T8">}</text:span><text:span text:style-name="T6"> </text:span><text:span text:style-name="T24">className</text:span><text:span text:style-name="T12">=</text:span><text:span text:style-name="T2">"flex items-center justify-center gap-3 mx-auto bg-white text-black hover:bg-white/90 px-10 py-4 rounded-2xl font-semibold text-lg"</text:span><text:span text:style-name="T27">&gt;</text:span></text:p>
      <text:p text:style-name="P7"><text:span text:style-name="T5">               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Start Recording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6">)</text:span><text:span text:style-name="T8">}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</text:span><text:span text:style-name="T27">&lt;</text:span><text:span text:style-name="T28">div</text:span></text:p>
      <text:p text:style-name="P7"><text:span text:style-name="T5">            </text:span><text:span text:style-name="T24">className</text:span><text:span text:style-name="T12">=</text:span><text:span text:style-name="T8">{</text:span><text:span text:style-name="T2">`border-2 border-dashed rounded-3xl p-10 text-center cursor-pointer bg-zinc-900/90 </text:span><text:span text:style-name="T23">${</text:span><text:span text:style-name="T6">isDragging</text:span><text:span text:style-name="T12"> ? </text:span><text:span text:style-name="T2">'border-violet-500 bg-violet-500/10'</text:span><text:span text:style-name="T12"> : </text:span><text:span text:style-name="T2">'border-white/20'</text:span><text:span text:style-name="T23">}</text:span><text:span text:style-name="T2">`</text:span><text:span text:style-name="T8">}</text:span></text:p>
      <text:p text:style-name="P7"><text:span text:style-name="T5">            </text:span><text:span text:style-name="T24">onDragOver</text:span><text:span text:style-name="T12">=</text:span><text:span text:style-name="T8">{</text:span><text:span text:style-name="T6">(</text:span><text:span text:style-name="T21">e</text:span><text:span text:style-name="T6">) </text:span><text:span text:style-name="T8">=&gt;</text:span><text:span text:style-name="T6"> { e.</text:span><text:span text:style-name="T14">preventDefault</text:span><text:span text:style-name="T6">(); </text:span><text:span text:style-name="T14">setIsDragging</text:span><text:span text:style-name="T6">(</text:span><text:span text:style-name="T23">true</text:span><text:span text:style-name="T6">); }</text:span><text:span text:style-name="T8">}</text:span></text:p>
      <text:p text:style-name="P7"><text:span text:style-name="T5">            </text:span><text:span text:style-name="T24">onDragLeave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IsDragging</text:span><text:span text:style-name="T6">(</text:span><text:span text:style-name="T23">false</text:span><text:span text:style-name="T6">)</text:span><text:span text:style-name="T8">}</text:span></text:p>
      <text:p text:style-name="P7"><text:span text:style-name="T5">            </text:span><text:span text:style-name="T24">onDrop</text:span><text:span text:style-name="T12">=</text:span><text:span text:style-name="T8">{</text:span><text:span text:style-name="T6">handleDrop</text:span><text:span text:style-name="T8">}</text:span></text:p>
      <text:p text:style-name="P7"><text:span text:style-name="T5">            </text:span><text:span text:style-name="T24">onClick</text:span><text:span text:style-name="T12">=</text:span><text:span text:style-name="T8">{</text:span><text:span text:style-name="T6">triggerFileUpload</text:span><text:span text:style-name="T8">}</text:span></text:p>
      <text:p text:style-name="P7"><text:span text:style-name="T5">          </text:span><text:span text:style-name="T27">&gt;</text:span></text:p>
      <text:p text:style-name="P7"><text:span text:style-name="T5">            </text:span><text:span text:style-name="T27">&lt;</text:span><text:span text:style-name="T28">Upload</text:span><text:span text:style-name="T6"> </text:span><text:span text:style-name="T24">className</text:span><text:span text:style-name="T12">=</text:span><text:span text:style-name="T2">"w-10 h-10 mx-auto mb-3 text-violet-400"</text:span><text:span text:style-name="T6"> </text:span><text:span text:style-name="T27">/&gt;</text:span></text:p>
      <text:p text:style-name="P7"><text:span text:style-name="T5">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xl font-semibold mb-1"</text:span><text:span text:style-name="T27">&gt;</text:span><text:span text:style-name="T6">Drop your podcast or audio file here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sm text-zinc-400"</text:span><text:span text:style-name="T27">&gt;</text:span><text:span text:style-name="T6">or click to browse • up to </text:span><text:span text:style-name="T8">{</text:span><text:span text:style-name="T10">MAX_SIZE_MB</text:span><text:span text:style-name="T8">}</text:span><text:span text:style-name="T6">MB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</text:span><text:span text:style-name="T28">input</text:span><text:span text:style-name="T6"> </text:span><text:span text:style-name="T24">ref</text:span><text:span text:style-name="T12">=</text:span><text:span text:style-name="T8">{</text:span><text:span text:style-name="T6">fileInputRef</text:span><text:span text:style-name="T8">}</text:span><text:span text:style-name="T6"> </text:span><text:span text:style-name="T24">type</text:span><text:span text:style-name="T12">=</text:span><text:span text:style-name="T2">"file"</text:span><text:span text:style-name="T6"> </text:span><text:span text:style-name="T24">accept</text:span><text:span text:style-name="T12">=</text:span><text:span text:style-name="T2">"audio/*"</text:span><text:span text:style-name="T6"> </text:span><text:span text:style-name="T24">onChange</text:span><text:span text:style-name="T12">=</text:span><text:span text:style-name="T8">{</text:span><text:span text:style-name="T6">(</text:span><text:span text:style-name="T21">e</text:span><text:span text:style-name="T6">) </text:span><text:span text:style-name="T8">=&gt;</text:span><text:span text:style-name="T6"> e.target.files </text:span><text:span text:style-name="T12">&amp;&amp;</text:span><text:span text:style-name="T6"> </text:span><text:span text:style-name="T14">handleFileSelect</text:span><text:span text:style-name="T6">(e.target.files[</text:span><text:span text:style-name="T17">0</text:span><text:span text:style-name="T6">])</text:span><text:span text:style-name="T8">}</text:span><text:span text:style-name="T6"> </text:span><text:span text:style-name="T24">className</text:span><text:span text:style-name="T12">=</text:span><text:span text:style-name="T2">"hidden"</text:span><text:span text:style-name="T6"> </text:span><text:span text:style-name="T27">/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6">)</text:span><text:span text:style-name="T8">}</text:span></text:p>
      <text:p text:style-name="P10"/>
      <text:p text:style-name="P7"><text:span text:style-name="T5">      </text:span><text:span text:style-name="T8">{</text:span><text:span text:style-name="T25">/* AUDIO PREVIEW + AMPLIFY */</text:span><text:span text:style-name="T8">}</text:span></text:p>
      <text:p text:style-name="P7"><text:span text:style-name="T5">      </text:span><text:span text:style-name="T8">{</text:span><text:span text:style-name="T6">audioUrl </text:span><text:span text:style-name="T12">&amp;&amp;</text:span><text:span text:style-name="T6"> (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8 mb-8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items-center mb-4"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sm text-zinc-400"</text:span><text:span text:style-name="T27">&gt;</text:span><text:span text:style-name="T6">Ready to amplify</text:span><text:span text:style-name="T27">&lt;/</text:span><text:span text:style-name="T28">p</text:span><text:span text:style-name="T27">&gt;</text:span></text:p>
      <text:p text:style-name="P7"><text:span text:style-name="T5">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font-medium"</text:span><text:span text:style-name="T27">&gt;</text:span><text:span text:style-name="T8">{</text:span><text:span text:style-name="T6">selectedFile?.name </text:span><text:span text:style-name="T12">||</text:span><text:span text:style-name="T6"> </text:span><text:span text:style-name="T2">'Live Recording'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resetAll</text:span><text:span text:style-name="T8">}</text:span><text:span text:style-name="T6"> </text:span><text:span text:style-name="T24">className</text:span><text:span text:style-name="T12">=</text:span><text:span text:style-name="T2">"text-sm flex items-center gap-1 text-zinc-400 hover:text-white"</text:span><text:span text:style-name="T27">&gt;</text:span></text:p>
      <text:p text:style-name="P7"><text:span text:style-name="T5">              </text:span><text:span text:style-name="T27">&lt;</text:span><text:span text:style-name="T28">Trash2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6"> Start Over</text:span></text:p>
      <text:p text:style-name="P7"><text:span text:style-name="T5">            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</text:span><text:span text:style-name="T27">&lt;</text:span><text:span text:style-name="T28">audio</text:span><text:span text:style-name="T6"> </text:span><text:span text:style-name="T24">controls</text:span><text:span text:style-name="T6"> </text:span><text:span text:style-name="T24">src</text:span><text:span text:style-name="T12">=</text:span><text:span text:style-name="T8">{</text:span><text:span text:style-name="T6">audioUrl</text:span><text:span text:style-name="T8">}</text:span><text:span text:style-name="T6"> </text:span><text:span text:style-name="T24">className</text:span><text:span text:style-name="T12">=</text:span><text:span text:style-name="T2">"w-full mb-6 rounded-xl"</text:span><text:span text:style-name="T6"> </text:span><text:span text:style-name="T27">/&gt;</text:span></text:p>
      <text:p text:style-name="P10"/>
      <text:p text:style-name="P7"><text:span text:style-name="T5">          </text:span><text:span text:style-name="T27">&lt;</text:span><text:span text:style-name="T28">button</text:span></text:p>
      <text:p text:style-name="P7"><text:span text:style-name="T5">            </text:span><text:span text:style-name="T24">onClick</text:span><text:span text:style-name="T12">=</text:span><text:span text:style-name="T8">{</text:span><text:span text:style-name="T6">amplifyAudio</text:span><text:span text:style-name="T8">}</text:span></text:p>
      <text:p text:style-name="P7"><text:soft-page-break/><text:span text:style-name="T5">            </text:span><text:span text:style-name="T24">disabled</text:span><text:span text:style-name="T12">=</text:span><text:span text:style-name="T8">{</text:span><text:span text:style-name="T6">isProcessing</text:span><text:span text:style-name="T8">}</text:span></text:p>
      <text:p text:style-name="P7"><text:span text:style-name="T5">            </text:span><text:span text:style-name="T24">className</text:span><text:span text:style-name="T12">=</text:span><text:span text:style-name="T2">"w-full bg-gradient-to-r from-violet-600 to-fuchsia-600 hover:brightness-110 disabled:opacity-70 py-4 rounded-2xl font-semibold text-lg flex items-center justify-center gap-3"</text:span></text:p>
      <text:p text:style-name="P7"><text:span text:style-name="T5">          </text:span><text:span text:style-name="T27">&gt;</text:span></text:p>
      <text:p text:style-name="P7"><text:span text:style-name="T5">            </text:span><text:span text:style-name="T8">{</text:span><text:span text:style-name="T6">isProcessing </text:span><text:span text:style-name="T12">?</text:span><text:span text:style-name="T6"> </text:span><text:span text:style-name="T27">&lt;&gt;</text:span><text:span text:style-name="T6">Processing </text:span><text:span text:style-name="T27">&lt;</text:span><text:span text:style-name="T28">RefreshCw</text:span><text:span text:style-name="T6"> </text:span><text:span text:style-name="T24">className</text:span><text:span text:style-name="T12">=</text:span><text:span text:style-name="T2">"w-5 h-5 animate-spin"</text:span><text:span text:style-name="T6"> </text:span><text:span text:style-name="T27">/&gt;&lt;/&gt;</text:span><text:span text:style-name="T6"> </text:span><text:span text:style-name="T12">:</text:span><text:span text:style-name="T6"> </text:span><text:span text:style-name="T27">&lt;&gt;</text:span><text:span text:style-name="T6">Amplify Podcast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&lt;/&gt;</text:span><text:span text:style-name="T8">}</text:span></text:p>
      <text:p text:style-name="P7"><text:span text:style-name="T5">          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8">{</text:span><text:span text:style-name="T6">error </text:span><text:span text:style-name="T12">&amp;&amp;</text:span><text:span text:style-name="T6">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red-400 text-sm mt-3 text-center"</text:span><text:span text:style-name="T27">&gt;</text:span><text:span text:style-name="T8">{</text:span><text:span text:style-name="T6">error</text:span><text:span text:style-name="T8">}</text:span><text:span text:style-name="T27">&lt;/</text:span><text:span text:style-name="T28">p</text:span><text:span text:style-name="T27">&gt;</text:span><text:span text:style-name="T8">}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6">)</text:span><text:span text:style-name="T8">}</text:span></text:p>
      <text:p text:style-name="P10"/>
      <text:p text:style-name="P7"><text:span text:style-name="T5">      </text:span><text:span text:style-name="T8">{</text:span><text:span text:style-name="T25">/* RESULTS */</text:span><text:span text:style-name="T8">}</text:span></text:p>
      <text:p text:style-name="P7"><text:span text:style-name="T5">      </text:span><text:span text:style-name="T8">{</text:span><text:span text:style-name="T6">podcastOutputs </text:span><text:span text:style-name="T12">&amp;&amp;</text:span><text:span text:style-name="T6"> (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8 mt-8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items-center"</text:span><text:span text:style-name="T27">&gt;</text:span></text:p>
      <text:p text:style-name="P7"><text:span text:style-name="T5">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2xl font-semibold"</text:span><text:span text:style-name="T27">&gt;</text:span><text:span text:style-name="T6">Podcast Content Ready</text:span><text:span text:style-name="T27">&lt;/</text:span><text:span text:style-name="T28">h3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gap-3"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copyAllPlatforms</text:span><text:span text:style-name="T8">}</text:span><text:span text:style-name="T6"> </text:span><text:span text:style-name="T24">disabled</text:span><text:span text:style-name="T12">=</text:span><text:span text:style-name="T8">{</text:span><text:span text:style-name="T6">isCopyingAll</text:span><text:span text:style-name="T8">}</text:span><text:span text:style-name="T6"> </text:span><text:span text:style-name="T24">className</text:span><text:span text:style-name="T12">=</text:span><text:span text:style-name="T2">"flex items-center gap-2 bg-zinc-800 hover:bg-zinc-700 px-5 py-2 rounded-2xl text-sm"</text:span><text:span text:style-name="T27">&gt;</text:span></text:p>
      <text:p text:style-name="P7"><text:span text:style-name="T5">                </text:span><text:span text:style-name="T27">&lt;</text:span><text:span text:style-name="T28">Copy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6"> </text:span><text:span text:style-name="T8">{</text:span><text:span text:style-name="T6">isCopyingAll </text:span><text:span text:style-name="T12">?</text:span><text:span text:style-name="T6"> </text:span><text:span text:style-name="T2">"Copying..."</text:span><text:span text:style-name="T6"> </text:span><text:span text:style-name="T12">:</text:span><text:span text:style-name="T6"> </text:span><text:span text:style-name="T2">"Copy All Platforms"</text:span><text:span text:style-name="T8">}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{ </text:span><text:span text:style-name="T14">fetchConnectedAccounts</text:span><text:span text:style-name="T6">(); </text:span><text:span text:style-name="T14">setShowZernioModal</text:span><text:span text:style-name="T6">(</text:span><text:span text:style-name="T23">true</text:span><text:span text:style-name="T6">); }</text:span><text:span text:style-name="T8">}</text:span><text:span text:style-name="T6"> </text:span><text:span text:style-name="T24">className</text:span><text:span text:style-name="T12">=</text:span><text:span text:style-name="T2">"flex items-center gap-2 bg-emerald-600 hover:bg-emerald-700 px-5 py-2 rounded-2xl text-sm font-semibold"</text:span><text:span text:style-name="T27">&gt;</text:span></text:p>
      <text:p text:style-name="P7"><text:span text:style-name="T5">                </text:span><text:span text:style-name="T27">&lt;</text:span><text:span text:style-name="T28">Send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6"> Post with Zernio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resetAll</text:span><text:span text:style-name="T8">}</text:span><text:span text:style-name="T6"> </text:span><text:span text:style-name="T24">className</text:span><text:span text:style-name="T12">=</text:span><text:span text:style-name="T2">"flex items-center gap-2 bg-zinc-800 hover:bg-zinc-700 px-5 py-2 rounded-2xl text-sm"</text:span><text:span text:style-name="T27">&gt;</text:span></text:p>
      <text:p text:style-name="P7"><text:span text:style-name="T5">                </text:span><text:span text:style-name="T27">&lt;</text:span><text:span text:style-name="T28">Trash2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6"> New Audio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</text:span><text:span text:style-name="T8">{</text:span><text:span text:style-name="T25">/* Transcription */</text:span><text:span text:style-name="T8">}</text:span></text:p>
      <text:p text:style-name="P7"><text:span text:style-name="T5">          </text:span><text:span text:style-name="T8">{</text:span><text:span text:style-name="T6">transcription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6"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mb-3"</text:span><text:span text:style-name="T27">&gt;</text:span></text:p>
      <text:p text:style-name="P7"><text:span text:style-name="T5">                </text:span><text:span text:style-name="T27">&lt;</text:span><text:span text:style-name="T28">h4</text:span><text:span text:style-name="T6"> </text:span><text:span text:style-name="T24">className</text:span><text:span text:style-name="T12">=</text:span><text:span text:style-name="T2">"font-semibold flex items-center gap-2"</text:span><text:span text:style-name="T27">&gt;&lt;</text:span><text:span text:style-name="T28">Clock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6"> Full Transcription</text:span><text:span text:style-name="T27">&lt;/</text:span><text:span text:style-name="T28">h4</text:span><text:span text:style-name="T27">&gt;</text:span></text:p>
      <text:p text:style-name="P7"><text:span text:style-name="T5">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ToClipboard</text:span><text:span text:style-name="T6">(transcription, </text:span><text:span text:style-name="T2">'Transcription'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text-xs px-3 py-1 bg-zinc-800 rounded-full flex items-center gap-1"</text:span><text:span text:style-name="T27">&gt;</text:span></text:p>
      <text:p text:style-name="P7"><text:span text:style-name="T5">                  </text:span><text:span text:style-name="T27">&lt;</text:span><text:span text:style-name="T28">Copy</text:span><text:span text:style-name="T6"> </text:span><text:span text:style-name="T24">className</text:span><text:span text:style-name="T12">=</text:span><text:span text:style-name="T2">"w-3 h-3"</text:span><text:span text:style-name="T6"> </text:span><text:span text:style-name="T27">/&gt;</text:span><text:span text:style-name="T6"> Copy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oft-page-break/><text:span text:style-name="T5">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sm text-zinc-300 whitespace-pre-wrap max-h-64 overflow-auto"</text:span><text:span text:style-name="T27">&gt;</text:span><text:span text:style-name="T8">{</text:span><text:span text:style-name="T6">transcription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10"/>
      <text:p text:style-name="P7"><text:span text:style-name="T5">          </text:span><text:span text:style-name="T8">{</text:span><text:span text:style-name="T25">/* Show Notes */</text:span><text:span text:style-name="T8">}</text:span></text:p>
      <text:p text:style-name="P7"><text:span text:style-name="T5">          </text:span><text:span text:style-name="T8">{</text:span><text:span text:style-name="T6">podcastOutputs.showNotes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6"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mb-3"</text:span><text:span text:style-name="T27">&gt;</text:span></text:p>
      <text:p text:style-name="P7"><text:span text:style-name="T5">                </text:span><text:span text:style-name="T27">&lt;</text:span><text:span text:style-name="T28">h4</text:span><text:span text:style-name="T6"> </text:span><text:span text:style-name="T24">className</text:span><text:span text:style-name="T12">=</text:span><text:span text:style-name="T2">"font-semibold"</text:span><text:span text:style-name="T27">&gt;</text:span><text:span text:style-name="T6">Show Notes</text:span><text:span text:style-name="T27">&lt;/</text:span><text:span text:style-name="T28">h4</text:span><text:span text:style-name="T27">&gt;</text:span></text:p>
      <text:p text:style-name="P7"><text:span text:style-name="T5">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ToClipboard</text:span><text:span text:style-name="T6">(podcastOutputs.showNotes</text:span><text:span text:style-name="T12">!</text:span><text:span text:style-name="T6">, </text:span><text:span text:style-name="T2">'Show Notes'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text-xs px-3 py-1 bg-zinc-800 rounded-full flex items-center gap-1"</text:span><text:span text:style-name="T27">&gt;</text:span></text:p>
      <text:p text:style-name="P7"><text:span text:style-name="T5">                  </text:span><text:span text:style-name="T27">&lt;</text:span><text:span text:style-name="T28">Copy</text:span><text:span text:style-name="T6"> </text:span><text:span text:style-name="T24">className</text:span><text:span text:style-name="T12">=</text:span><text:span text:style-name="T2">"w-3 h-3"</text:span><text:span text:style-name="T6"> </text:span><text:span text:style-name="T27">/&gt;</text:span><text:span text:style-name="T6"> Copy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sm text-zinc-300 whitespace-pre-wrap"</text:span><text:span text:style-name="T27">&gt;</text:span><text:span text:style-name="T8">{</text:span><text:span text:style-name="T6">podcastOutputs.showNotes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10"/>
      <text:p text:style-name="P7"><text:span text:style-name="T5">          </text:span><text:span text:style-name="T8">{</text:span><text:span text:style-name="T25">/* Key Quotes */</text:span><text:span text:style-name="T8">}</text:span></text:p>
      <text:p text:style-name="P7"><text:span text:style-name="T5">          </text:span><text:span text:style-name="T8">{</text:span><text:span text:style-name="T6">podcastOutputs.keyQuotes </text:span><text:span text:style-name="T12">&amp;&amp;</text:span><text:span text:style-name="T6"> podcastOutputs.keyQuotes.</text:span><text:span text:style-name="T10">length</text:span><text:span text:style-name="T6"> </text:span><text:span text:style-name="T12">&gt;</text:span><text:span text:style-name="T6"> </text:span><text:span text:style-name="T17">0</text:span><text:span text:style-name="T6">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6"</text:span><text:span text:style-name="T27">&gt;</text:span></text:p>
      <text:p text:style-name="P7"><text:span text:style-name="T5">              </text:span><text:span text:style-name="T27">&lt;</text:span><text:span text:style-name="T28">h4</text:span><text:span text:style-name="T6"> </text:span><text:span text:style-name="T24">className</text:span><text:span text:style-name="T12">=</text:span><text:span text:style-name="T2">"font-semibold mb-4"</text:span><text:span text:style-name="T27">&gt;</text:span><text:span text:style-name="T6">Key Quotes</text:span><text:span text:style-name="T27">&lt;/</text:span><text:span text:style-name="T28">h4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2"</text:span><text:span text:style-name="T27">&gt;</text:span></text:p>
      <text:p text:style-name="P7"><text:span text:style-name="T5">                </text:span><text:span text:style-name="T8">{</text:span><text:span text:style-name="T6">podcastOutputs.keyQuotes.</text:span><text:span text:style-name="T14">map</text:span><text:span text:style-name="T6">((</text:span><text:span text:style-name="T21">quote</text:span><text:span text:style-name="T6">, </text:span><text:span text:style-name="T21">i</text:span><text:span text:style-name="T6">) </text:span><text:span text:style-name="T8">=&gt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i</text:span><text:span text:style-name="T8">}</text:span><text:span text:style-name="T6"> </text:span><text:span text:style-name="T24">className</text:span><text:span text:style-name="T12">=</text:span><text:span text:style-name="T2">"bg-zinc-950 p-4 rounded-2xl text-sm italic border-l-2 border-emerald-500 flex justify-between items-start"</text:span><text:span text:style-name="T27">&gt;</text:span></text:p>
      <text:p text:style-name="P7"><text:span text:style-name="T5">                    </text:span><text:span text:style-name="T27">&lt;</text:span><text:span text:style-name="T28">span</text:span><text:span text:style-name="T27">&gt;</text:span><text:span text:style-name="T6">“</text:span><text:span text:style-name="T8">{</text:span><text:span text:style-name="T6">quote</text:span><text:span text:style-name="T8">}</text:span><text:span text:style-name="T6">”</text:span><text:span text:style-name="T27">&lt;/</text:span><text:span text:style-name="T28">span</text:span><text:span text:style-name="T27">&gt;</text:span></text:p>
      <text:p text:style-name="P7"><text:span text:style-name="T5">  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ToClipboard</text:span><text:span text:style-name="T6">(quote, </text:span><text:span text:style-name="T2">'Quote'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text-xs ml-4 text-zinc-400 hover:text-white"</text:span><text:span text:style-name="T27">&gt;</text:span><text:span text:style-name="T6">Copy</text:span><text:span text:style-name="T27">&lt;/</text:span><text:span text:style-name="T28">button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10"/>
      <text:p text:style-name="P7"><text:span text:style-name="T5">          </text:span><text:span text:style-name="T8">{</text:span><text:span text:style-name="T25">/* Chapters */</text:span><text:span text:style-name="T8">}</text:span></text:p>
      <text:p text:style-name="P7"><text:span text:style-name="T5">          </text:span><text:span text:style-name="T8">{</text:span><text:span text:style-name="T6">podcastOutputs.chapters </text:span><text:span text:style-name="T12">&amp;&amp;</text:span><text:span text:style-name="T6"> podcastOutputs.chapters.</text:span><text:span text:style-name="T10">length</text:span><text:span text:style-name="T6"> </text:span><text:span text:style-name="T12">&gt;</text:span><text:span text:style-name="T6"> </text:span><text:span text:style-name="T17">0</text:span><text:span text:style-name="T6">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6"</text:span><text:span text:style-name="T27">&gt;</text:span></text:p>
      <text:p text:style-name="P7"><text:span text:style-name="T5">              </text:span><text:span text:style-name="T27">&lt;</text:span><text:span text:style-name="T28">h4</text:span><text:span text:style-name="T6"> </text:span><text:span text:style-name="T24">className</text:span><text:span text:style-name="T12">=</text:span><text:span text:style-name="T2">"font-semibold mb-4"</text:span><text:span text:style-name="T27">&gt;</text:span><text:span text:style-name="T6">Chapters</text:span><text:span text:style-name="T27">&lt;/</text:span><text:span text:style-name="T28">h4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3"</text:span><text:span text:style-name="T27">&gt;</text:span></text:p>
      <text:p text:style-name="P7"><text:span text:style-name="T5">                </text:span><text:span text:style-name="T8">{</text:span><text:span text:style-name="T6">podcastOutputs.chapters.</text:span><text:span text:style-name="T14">map</text:span><text:span text:style-name="T6">((</text:span><text:span text:style-name="T21">ch</text:span><text:span text:style-name="T6">, </text:span><text:span text:style-name="T21">i</text:span><text:span text:style-name="T6">) </text:span><text:span text:style-name="T8">=&gt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i</text:span><text:span text:style-name="T8">}</text:span><text:span text:style-name="T6"> </text:span><text:span text:style-name="T24">className</text:span><text:span text:style-name="T12">=</text:span><text:span text:style-name="T2">"flex gap-4 text-sm border-l-2 border-violet-500 pl-4"</text:span><text:span text:style-name="T27">&gt;</text:span></text:p>
      <text:p text:style-name="P7"><text:soft-page-break/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ont-mono text-violet-400 w-16 flex-shrink-0"</text:span><text:span text:style-name="T27">&gt;</text:span><text:span text:style-name="T8">{</text:span><text:span text:style-name="T6">ch.time</text:span><text:span text:style-name="T8">}</text:span><text:span text:style-name="T27">&lt;/</text:span><text:span text:style-name="T28">div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27">&gt;</text:span></text:p>
      <text:p text:style-name="P7"><text:span text:style-name="T5">  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ont-medium"</text:span><text:span text:style-name="T27">&gt;</text:span><text:span text:style-name="T8">{</text:span><text:span text:style-name="T6">ch.title</text:span><text:span text:style-name="T8">}</text:span><text:span text:style-name="T27">&lt;/</text:span><text:span text:style-name="T28">div</text:span><text:span text:style-name="T27">&gt;</text:span></text:p>
      <text:p text:style-name="P7"><text:span text:style-name="T5">                      </text:span><text:span text:style-name="T8">{</text:span><text:span text:style-name="T6">ch.summary </text:span><text:span text:style-name="T12">&amp;&amp;</text:span><text:span text:style-name="T6">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zinc-400 text-xs mt-0.5"</text:span><text:span text:style-name="T27">&gt;</text:span><text:span text:style-name="T8">{</text:span><text:span text:style-name="T6">ch.summary</text:span><text:span text:style-name="T8">}</text:span><text:span text:style-name="T27">&lt;/</text:span><text:span text:style-name="T28">div</text:span><text:span text:style-name="T27">&gt;</text:span><text:span text:style-name="T8">}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10"/>
      <text:p text:style-name="P7"><text:span text:style-name="T5">          </text:span><text:span text:style-name="T8">{</text:span><text:span text:style-name="T25">/* Smart Clips */</text:span><text:span text:style-name="T8">}</text:span></text:p>
      <text:p text:style-name="P7"><text:span text:style-name="T5">          </text:span><text:span text:style-name="T8">{</text:span><text:span text:style-name="T6">podcastOutputs.clipIdeas </text:span><text:span text:style-name="T12">&amp;&amp;</text:span><text:span text:style-name="T6"> podcastOutputs.clipIdeas.</text:span><text:span text:style-name="T10">length</text:span><text:span text:style-name="T6"> </text:span><text:span text:style-name="T12">&gt;</text:span><text:span text:style-name="T6"> </text:span><text:span text:style-name="T17">0</text:span><text:span text:style-name="T6">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6"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items-center mb-4"</text:span><text:span text:style-name="T27">&gt;</text:span></text:p>
      <text:p text:style-name="P7"><text:span text:style-name="T5">                </text:span><text:span text:style-name="T27">&lt;</text:span><text:span text:style-name="T28">h4</text:span><text:span text:style-name="T6"> </text:span><text:span text:style-name="T24">className</text:span><text:span text:style-name="T12">=</text:span><text:span text:style-name="T2">"font-semibold"</text:span><text:span text:style-name="T27">&gt;</text:span><text:span text:style-name="T6">Smart Clip Ideas</text:span><text:span text:style-name="T27">&lt;/</text:span><text:span text:style-name="T28">h4</text:span><text:span text:style-name="T27">&gt;</text:span></text:p>
      <text:p text:style-name="P7"><text:span text:style-name="T5">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generateSmartClips</text:span><text:span text:style-name="T8">}</text:span><text:span text:style-name="T6"> </text:span><text:span text:style-name="T24">disabled</text:span><text:span text:style-name="T12">=</text:span><text:span text:style-name="T8">{</text:span><text:span text:style-name="T6">generatingClips</text:span><text:span text:style-name="T8">}</text:span><text:span text:style-name="T6"> </text:span><text:span text:style-name="T24">className</text:span><text:span text:style-name="T12">=</text:span><text:span text:style-name="T2">"text-sm bg-emerald-600 hover:bg-emerald-700 px-4 py-2 rounded-2xl"</text:span><text:span text:style-name="T27">&gt;</text:span></text:p>
      <text:p text:style-name="P7"><text:span text:style-name="T5">                  </text:span><text:span text:style-name="T8">{</text:span><text:span text:style-name="T6">generatingClips </text:span><text:span text:style-name="T12">?</text:span><text:span text:style-name="T6"> </text:span><text:span text:style-name="T2">"Loading..."</text:span><text:span text:style-name="T6"> </text:span><text:span text:style-name="T12">:</text:span><text:span text:style-name="T6"> </text:span><text:span text:style-name="T2">"View Smart Clips"</text:span><text:span text:style-name="T8">}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2 text-sm"</text:span><text:span text:style-name="T27">&gt;</text:span></text:p>
      <text:p text:style-name="P7"><text:span text:style-name="T5">                </text:span><text:span text:style-name="T8">{</text:span><text:span text:style-name="T6">podcastOutputs.clipIdeas.</text:span><text:span text:style-name="T14">map</text:span><text:span text:style-name="T6">((</text:span><text:span text:style-name="T21">clip</text:span><text:span text:style-name="T6">, </text:span><text:span text:style-name="T21">i</text:span><text:span text:style-name="T6">) </text:span><text:span text:style-name="T8">=&gt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i</text:span><text:span text:style-name="T8">}</text:span><text:span text:style-name="T6"> </text:span><text:span text:style-name="T24">className</text:span><text:span text:style-name="T12">=</text:span><text:span text:style-name="T2">"bg-zinc-950 p-3 rounded-2xl flex justify-between items-center"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27">&gt;</text:span></text:p>
      <text:p text:style-name="P7"><text:span text:style-name="T5">  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font-mono text-emerald-400"</text:span><text:span text:style-name="T27">&gt;</text:span><text:span text:style-name="T8">{</text:span><text:span text:style-name="T6">clip.start</text:span><text:span text:style-name="T8">}</text:span><text:span text:style-name="T6">s – </text:span><text:span text:style-name="T8">{</text:span><text:span text:style-name="T6">clip.end</text:span><text:span text:style-name="T8">}</text:span><text:span text:style-name="T6">s</text:span><text:span text:style-name="T27">&lt;/</text:span><text:span text:style-name="T28">span</text:span><text:span text:style-name="T27">&gt;</text:span></text:p>
      <text:p text:style-name="P7"><text:span text:style-name="T5">  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ml-3 text-zinc-300"</text:span><text:span text:style-name="T27">&gt;</text:span><text:span text:style-name="T8">{</text:span><text:span text:style-name="T6">clip.reason</text:span><text:span text:style-name="T8">}</text:span><text:span text:style-name="T27">&lt;/</text:span><text:span text:style-name="T28">span</text:span><text:span text:style-name="T27">&gt;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ToClipboard</text:span><text:span text:style-name="T6">(</text:span><text:span text:style-name="T2">`</text:span><text:span text:style-name="T23">${</text:span><text:span text:style-name="T6">clip</text:span><text:span text:style-name="T12">.</text:span><text:span text:style-name="T6">start</text:span><text:span text:style-name="T23">}</text:span><text:span text:style-name="T2">s - </text:span><text:span text:style-name="T23">${</text:span><text:span text:style-name="T6">clip</text:span><text:span text:style-name="T12">.</text:span><text:span text:style-name="T6">end</text:span><text:span text:style-name="T23">}</text:span><text:span text:style-name="T2">s: </text:span><text:span text:style-name="T23">${</text:span><text:span text:style-name="T6">clip</text:span><text:span text:style-name="T12">.</text:span><text:span text:style-name="T6">reason</text:span><text:span text:style-name="T23">}</text:span><text:span text:style-name="T2">`</text:span><text:span text:style-name="T6">, </text:span><text:span text:style-name="T2">'Clip Idea'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text-xs px-3 py-1 bg-zinc-800 rounded-full"</text:span><text:span text:style-name="T27">&gt;</text:span><text:span text:style-name="T6">Copy</text:span><text:span text:style-name="T27">&lt;/</text:span><text:span text:style-name="T28">button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10"/>
      <text:p text:style-name="P7"><text:span text:style-name="T5">          </text:span><text:span text:style-name="T8">{</text:span><text:span text:style-name="T25">/* Platform Optimized Content */</text:span><text:span text:style-name="T8">}</text:span></text:p>
      <text:p text:style-name="P7"><text:span text:style-name="T5">          </text:span><text:span text:style-name="T8">{</text:span><text:span text:style-name="T6">podcastOutputs.platforms </text:span><text:span text:style-name="T12">&amp;&amp;</text:span><text:span text:style-name="T6"> Object.</text:span><text:span text:style-name="T14">keys</text:span><text:span text:style-name="T6">(podcastOutputs.platforms).</text:span><text:span text:style-name="T10">length</text:span><text:span text:style-name="T6"> </text:span><text:span text:style-name="T12">&gt;</text:span><text:span text:style-name="T6"> </text:span><text:span text:style-name="T17">0</text:span><text:span text:style-name="T6">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h4</text:span><text:span text:style-name="T6"> </text:span><text:span text:style-name="T24">className</text:span><text:span text:style-name="T12">=</text:span><text:span text:style-name="T2">"font-semibold mb-4"</text:span><text:span text:style-name="T27">&gt;</text:span><text:span text:style-name="T6">Platform-Optimized Content</text:span><text:span text:style-name="T27">&lt;/</text:span><text:span text:style-name="T28">h4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grid md:grid-cols-2 gap-4"</text:span><text:span text:style-name="T27">&gt;</text:span></text:p>
      <text:p text:style-name="P7"><text:soft-page-break/><text:span text:style-name="T5">                </text:span><text:span text:style-name="T8">{</text:span><text:span text:style-name="T6">Object.</text:span><text:span text:style-name="T14">entries</text:span><text:span text:style-name="T6">(podcastOutputs.platforms).</text:span><text:span text:style-name="T14">map</text:span><text:span text:style-name="T6">(([</text:span><text:span text:style-name="T21">platform</text:span><text:span text:style-name="T6">, </text:span><text:span text:style-name="T21">content</text:span><text:span text:style-name="T6">]) </text:span><text:span text:style-name="T8">=&gt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platform</text:span><text:span text:style-name="T8">}</text:span><text:span text:style-name="T6"> </text:span><text:span text:style-name="T24">className</text:span><text:span text:style-name="T12">=</text:span><text:span text:style-name="T2">"bg-zinc-900 border border-white/10 rounded-3xl p-5"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mb-3"</text:span><text:span text:style-name="T27">&gt;</text:span></text:p>
      <text:p text:style-name="P7"><text:span text:style-name="T5">  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uppercase text-xs tracking-widest text-violet-400 font-medium"</text:span><text:span text:style-name="T27">&gt;</text:span><text:span text:style-name="T8">{</text:span><text:span text:style-name="T6">platform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ToClipboard</text:span><text:span text:style-name="T6">(</text:span><text:span text:style-name="T23">typeof</text:span><text:span text:style-name="T6"> content </text:span><text:span text:style-name="T12">===</text:span><text:span text:style-name="T6"> </text:span><text:span text:style-name="T2">'string'</text:span><text:span text:style-name="T6"> </text:span><text:span text:style-name="T12">?</text:span><text:span text:style-name="T6"> content </text:span><text:span text:style-name="T12">:</text:span><text:span text:style-name="T6"> </text:span><text:span text:style-name="T10">JSON</text:span><text:span text:style-name="T6">.</text:span><text:span text:style-name="T14">stringify</text:span><text:span text:style-name="T6">(content, </text:span><text:span text:style-name="T23">null</text:span><text:span text:style-name="T6">, </text:span><text:span text:style-name="T17">2</text:span><text:span text:style-name="T6">), platform)</text:span><text:span text:style-name="T8">}</text:span><text:span text:style-name="T6"> </text:span><text:span text:style-name="T24">className</text:span><text:span text:style-name="T12">=</text:span><text:span text:style-name="T2">"text-xs px-3 py-1 bg-zinc-800 rounded-full flex items-center gap-1"</text:span><text:span text:style-name="T27">&gt;</text:span></text:p>
      <text:p text:style-name="P7"><text:span text:style-name="T5">                        </text:span><text:span text:style-name="T27">&lt;</text:span><text:span text:style-name="T28">Copy</text:span><text:span text:style-name="T6"> </text:span><text:span text:style-name="T24">className</text:span><text:span text:style-name="T12">=</text:span><text:span text:style-name="T2">"w-3 h-3"</text:span><text:span text:style-name="T6"> </text:span><text:span text:style-name="T27">/&gt;</text:span><text:span text:style-name="T6"> Copy</text:span></text:p>
      <text:p text:style-name="P7"><text:span text:style-name="T5">      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sm text-zinc-300 whitespace-pre-wrap"</text:span><text:span text:style-name="T27">&gt;</text:span></text:p>
      <text:p text:style-name="P7"><text:span text:style-name="T5">                      </text:span><text:span text:style-name="T8">{</text:span><text:span text:style-name="T23">typeof</text:span><text:span text:style-name="T6"> content </text:span><text:span text:style-name="T12">===</text:span><text:span text:style-name="T6"> </text:span><text:span text:style-name="T2">'string'</text:span><text:span text:style-name="T6"> </text:span><text:span text:style-name="T12">?</text:span><text:span text:style-name="T6"> content </text:span><text:span text:style-name="T12">:</text:span><text:span text:style-name="T6"> </text:span></text:p>
      <text:p text:style-name="P7"><text:span text:style-name="T5">                        </text:span><text:span text:style-name="T6">Object.</text:span><text:span text:style-name="T14">entries</text:span><text:span text:style-name="T6">(content).</text:span><text:span text:style-name="T14">map</text:span><text:span text:style-name="T6">(([</text:span><text:span text:style-name="T21">k</text:span><text:span text:style-name="T6">, </text:span><text:span text:style-name="T21">v</text:span><text:span text:style-name="T6">]) </text:span><text:span text:style-name="T8">=&gt;</text:span><text:span text:style-name="T6"> (</text:span></text:p>
      <text:p text:style-name="P7"><text:span text:style-name="T5">          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k</text:span><text:span text:style-name="T8">}</text:span><text:span text:style-name="T6"> </text:span><text:span text:style-name="T24">className</text:span><text:span text:style-name="T12">=</text:span><text:span text:style-name="T2">"mb-1"</text:span><text:span text:style-name="T27">&gt;&lt;</text:span><text:span text:style-name="T28">span</text:span><text:span text:style-name="T6"> </text:span><text:span text:style-name="T24">className</text:span><text:span text:style-name="T12">=</text:span><text:span text:style-name="T2">"text-zinc-400"</text:span><text:span text:style-name="T27">&gt;</text:span><text:span text:style-name="T8">{</text:span><text:span text:style-name="T6">k</text:span><text:span text:style-name="T8">}</text:span><text:span text:style-name="T6">:</text:span><text:span text:style-name="T27">&lt;/</text:span><text:span text:style-name="T28">span</text:span><text:span text:style-name="T27">&gt;</text:span><text:span text:style-name="T6"> </text:span><text:span text:style-name="T8">{</text:span><text:span text:style-name="T14">String</text:span><text:span text:style-name="T6">(v)</text:span><text:span text:style-name="T8">}</text:span><text:span text:style-name="T27">&lt;/</text:span><text:span text:style-name="T28">div</text:span><text:span text:style-name="T27">&gt;</text:span></text:p>
      <text:p text:style-name="P8">                        <text:span text:style-name="T15">))</text:span></text:p>
      <text:p text:style-name="P7"><text:span text:style-name="T5">                      </text:span><text:span text:style-name="T8">}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6">)</text:span><text:span text:style-name="T8">}</text:span></text:p>
      <text:p text:style-name="P10"/>
      <text:p text:style-name="P7"><text:span text:style-name="T5">      </text:span><text:span text:style-name="T8">{</text:span><text:span text:style-name="T25">/* Zernio Modal */</text:span><text:span text:style-name="T8">}</text:span></text:p>
      <text:p text:style-name="P7"><text:span text:style-name="T5">      </text:span><text:span text:style-name="T8">{</text:span><text:span text:style-name="T6">showZernioModal </text:span><text:span text:style-name="T12">&amp;&amp;</text:span><text:span text:style-name="T6"> (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ixed inset-0 bg-black/80 flex items-center justify-center z-50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rounded-3xl p-8 max-w-md w-full mx-4"</text:span><text:span text:style-name="T27">&gt;</text:span></text:p>
      <text:p text:style-name="P7"><text:span text:style-name="T5">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2xl font-bold mb-6"</text:span><text:span text:style-name="T27">&gt;</text:span><text:span text:style-name="T6">Post to Zernio</text:span><text:span text:style-name="T27">&lt;/</text:span><text:span text:style-name="T28">h3</text:span><text:span text:style-name="T27">&gt;</text:span></text:p>
      <text:p text:style-name="P7"><text:span text:style-name="T5">            </text:span><text:span text:style-name="T27">&lt;</text:span><text:span text:style-name="T28">select</text:span><text:span text:style-name="T6"> </text:span><text:span text:style-name="T24">value</text:span><text:span text:style-name="T12">=</text:span><text:span text:style-name="T8">{</text:span><text:span text:style-name="T10">selectedAccountId</text:span><text:span text:style-name="T8">}</text:span><text:span text:style-name="T6"> </text:span><text:span text:style-name="T24">onChange</text:span><text:span text:style-name="T12">=</text:span><text:span text:style-name="T8">{</text:span><text:span text:style-name="T6">(</text:span><text:span text:style-name="T21">e</text:span><text:span text:style-name="T6">) </text:span><text:span text:style-name="T8">=&gt;</text:span><text:span text:style-name="T6"> </text:span><text:span text:style-name="T14">setSelectedAccountId</text:span><text:span text:style-name="T6">(</text:span><text:span text:style-name="T21">e</text:span><text:span text:style-name="T6">.target.</text:span><text:span text:style-name="T10">value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w-full bg-zinc-950 border border-white/10 rounded-2xl px-4 py-3 mb-6"</text:span><text:span text:style-name="T27">&gt;</text:span></text:p>
      <text:p text:style-name="P7"><text:span text:style-name="T5">              </text:span><text:span text:style-name="T27">&lt;</text:span><text:span text:style-name="T28">option</text:span><text:span text:style-name="T6"> </text:span><text:span text:style-name="T24">value</text:span><text:span text:style-name="T12">=</text:span><text:span text:style-name="T2">""</text:span><text:span text:style-name="T27">&gt;</text:span><text:span text:style-name="T6">Select account...</text:span><text:span text:style-name="T27">&lt;/</text:span><text:span text:style-name="T28">option</text:span><text:span text:style-name="T27">&gt;</text:span></text:p>
      <text:p text:style-name="P7"><text:span text:style-name="T5">              </text:span><text:span text:style-name="T8">{</text:span><text:span text:style-name="T10">connectedAccounts</text:span><text:span text:style-name="T6">.</text:span><text:span text:style-name="T14">map</text:span><text:span text:style-name="T6">(</text:span><text:span text:style-name="T21">acc</text:span><text:span text:style-name="T6"> </text:span><text:span text:style-name="T8">=&gt;</text:span><text:span text:style-name="T6"> </text:span><text:span text:style-name="T27">&lt;</text:span><text:span text:style-name="T28">option</text:span><text:span text:style-name="T6"> </text:span><text:span text:style-name="T24">key</text:span><text:span text:style-name="T12">=</text:span><text:span text:style-name="T8">{</text:span><text:span text:style-name="T21">acc</text:span><text:span text:style-name="T6">._id</text:span><text:span text:style-name="T8">}</text:span><text:span text:style-name="T6"> </text:span><text:span text:style-name="T24">value</text:span><text:span text:style-name="T12">=</text:span><text:span text:style-name="T8">{</text:span><text:span text:style-name="T21">acc</text:span><text:span text:style-name="T6">._id</text:span><text:span text:style-name="T8">}</text:span><text:span text:style-name="T27">&gt;</text:span><text:span text:style-name="T8">{</text:span><text:span text:style-name="T21">acc</text:span><text:span text:style-name="T6">.platform.</text:span><text:span text:style-name="T14">toUpperCase</text:span><text:span text:style-name="T6">()</text:span><text:span text:style-name="T8">}</text:span><text:span text:style-name="T6"> — </text:span><text:span text:style-name="T8">{</text:span><text:span text:style-name="T21">acc</text:span><text:span text:style-name="T6">.name </text:span><text:span text:style-name="T12">||</text:span><text:span text:style-name="T6"> </text:span><text:span text:style-name="T21">acc</text:span><text:span text:style-name="T6">.username</text:span><text:span text:style-name="T8">}</text:span><text:span text:style-name="T27">&lt;/</text:span><text:span text:style-name="T28">option</text:span><text:span text:style-name="T27">&gt;</text:span><text:span text:style-name="T6">)</text:span><text:span text:style-name="T8">}</text:span></text:p>
      <text:p text:style-name="P7"><text:span text:style-name="T5">            </text:span><text:span text:style-name="T27">&lt;/</text:span><text:span text:style-name="T28">select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gap-3"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ShowZernioModal</text:span><text:span text:style-name="T6">(</text:span><text:span text:style-name="T23">false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flex-1 py-3 border border-white/20 rounded-2xl"</text:span><text:span text:style-name="T27">&gt;</text:span><text:span text:style-name="T6">Cancel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14">postToZernio</text:span><text:span text:style-name="T8">}</text:span><text:span text:style-name="T6"> </text:span><text:span text:style-name="T24">disabled</text:span><text:span text:style-name="T12">=</text:span><text:span text:style-name="T8">{</text:span><text:span text:style-name="T12">!</text:span><text:span text:style-name="T10">selectedAccountId</text:span><text:span text:style-name="T8">}</text:span><text:span text:style-name="T6"> </text:span><text:span text:style-name="T24">className</text:span><text:span text:style-name="T12">=</text:span><text:span text:style-name="T2">"flex-1 py-3 bg-emerald-600 rounded-2xl font-semibold disabled:opacity-50"</text:span><text:span text:style-name="T27">&gt;</text:span><text:span text:style-name="T6">Post Now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oft-page-break/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6">)</text:span><text:span text:style-name="T8">}</text:span></text:p>
      <text:p text:style-name="P10"/>
      <text:p text:style-name="P7"><text:span text:style-name="T5">      </text:span><text:span text:style-name="T8">{</text:span><text:span text:style-name="T25">/* Smart Clips Modal */</text:span><text:span text:style-name="T8">}</text:span></text:p>
      <text:p text:style-name="P7"><text:span text:style-name="T5">      </text:span><text:span text:style-name="T8">{</text:span><text:span text:style-name="T10">clipModal</text:span><text:span text:style-name="T6"> </text:span><text:span text:style-name="T12">&amp;&amp;</text:span><text:span text:style-name="T6"> (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ixed inset-0 bg-black/80 flex items-center justify-center z-[60] p-4"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ClipModal</text:span><text:span text:style-name="T6">(</text:span><text:span text:style-name="T23">null</text:span><text:span text:style-name="T6">)</text:span><text:span text:style-name="T8">}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50 rounded-3xl max-w-2xl w-full p-6"</text:span><text:span text:style-name="T6"> </text:span><text:span text:style-name="T24">onClick</text:span><text:span text:style-name="T12">=</text:span><text:span text:style-name="T8">{</text:span><text:span text:style-name="T21">e</text:span><text:span text:style-name="T6"> </text:span><text:span text:style-name="T8">=&gt;</text:span><text:span text:style-name="T6"> </text:span><text:span text:style-name="T21">e</text:span><text:span text:style-name="T6">.</text:span><text:span text:style-name="T14">stopPropagation</text:span><text:span text:style-name="T6">()</text:span><text:span text:style-name="T8">}</text:span><text:span text:style-name="T27">&gt;</text:span></text:p>
      <text:p text:style-name="P7"><text:span text:style-name="T5">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xl font-bold mb-4"</text:span><text:span text:style-name="T27">&gt;</text:span><text:span text:style-name="T6">Smart Audio Clips</text:span><text:span text:style-name="T27">&lt;/</text:span><text:span text:style-name="T28">h3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3 max-h-[60vh] overflow-auto"</text:span><text:span text:style-name="T27">&gt;</text:span></text:p>
      <text:p text:style-name="P7"><text:span text:style-name="T5">              </text:span><text:span text:style-name="T8">{</text:span><text:span text:style-name="T10">clipModal</text:span><text:span text:style-name="T6">.clips?.</text:span><text:span text:style-name="T14">map</text:span><text:span text:style-name="T6">((</text:span><text:span text:style-name="T21">clip</text:span><text:span text:style-name="T12">:</text:span><text:span text:style-name="T6"> </text:span><text:span text:style-name="T19">any</text:span><text:span text:style-name="T6">, </text:span><text:span text:style-name="T21">i</text:span><text:span text:style-name="T12">:</text:span><text:span text:style-name="T6"> </text:span><text:span text:style-name="T19">number</text:span><text:span text:style-name="T6">) </text:span><text:span text:style-name="T8">=&gt;</text:span><text:span text:style-name="T6"> (</text:span></text:p>
      <text:p text:style-name="P7"><text:span text:style-name="T5">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21">i</text:span><text:span text:style-name="T8">}</text:span><text:span text:style-name="T6"> </text:span><text:span text:style-name="T24">className</text:span><text:span text:style-name="T12">=</text:span><text:span text:style-name="T2">"bg-zinc-900 p-4 rounded-2xl"</text:span><text:span text:style-name="T27">&gt;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ont-mono text-emerald-400"</text:span><text:span text:style-name="T27">&gt;</text:span><text:span text:style-name="T8">{</text:span><text:span text:style-name="T21">clip</text:span><text:span text:style-name="T6">.start</text:span><text:span text:style-name="T8">}</text:span><text:span text:style-name="T6">s – </text:span><text:span text:style-name="T8">{</text:span><text:span text:style-name="T21">clip</text:span><text:span text:style-name="T6">.end</text:span><text:span text:style-name="T8">}</text:span><text:span text:style-name="T6">s</text:span><text:span text:style-name="T27">&lt;/</text:span><text:span text:style-name="T28">div</text:span><text:span text:style-name="T27">&gt;</text:span></text:p>
      <text:p text:style-name="P7"><text:span text:style-name="T5">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sm mt-1"</text:span><text:span text:style-name="T27">&gt;</text:span><text:span text:style-name="T8">{</text:span><text:span text:style-name="T21">clip</text:span><text:span text:style-name="T6">.reason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ToClipboard</text:span><text:span text:style-name="T6">(</text:span><text:span text:style-name="T2">`</text:span><text:span text:style-name="T23">${</text:span><text:span text:style-name="T21">clip</text:span><text:span text:style-name="T12">.</text:span><text:span text:style-name="T6">start</text:span><text:span text:style-name="T23">}</text:span><text:span text:style-name="T2">s - </text:span><text:span text:style-name="T23">${</text:span><text:span text:style-name="T21">clip</text:span><text:span text:style-name="T12">.</text:span><text:span text:style-name="T6">end</text:span><text:span text:style-name="T23">}</text:span><text:span text:style-name="T2">s`</text:span><text:span text:style-name="T6">, </text:span><text:span text:style-name="T2">'Clip Range'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mt-2 text-xs bg-zinc-800 px-3 py-1 rounded"</text:span><text:span text:style-name="T27">&gt;</text:span><text:span text:style-name="T6">Copy Timestamp</text:span><text:span text:style-name="T27">&lt;/</text:span><text:span text:style-name="T28">button</text:span><text:span text:style-name="T27">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6">))</text:span><text:span text:style-name="T8">}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ClipModal</text:span><text:span text:style-name="T6">(</text:span><text:span text:style-name="T23">null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mt-6 w-full py-3 bg-white/10 rounded-2xl"</text:span><text:span text:style-name="T27">&gt;</text:span><text:span text:style-name="T6">Close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6">)</text:span><text:span text:style-name="T8">}</text:span></text:p>
      <text:p text:style-name="P7"><text:span text:style-name="T5">    </text:span><text:span text:style-name="T27">&lt;/</text:span><text:span text:style-name="T28">div</text:span><text:span text:style-name="T27">&gt;</text:span></text:p>
      <text:p text:style-name="P8">  <text:span text:style-name="T15">);</text:span></text:p>
      <text:p text:style-name="P9">}</text:p>
      <text:p text:style-name="P14"/>
      <text:p text:style-name="P14"/>
      <text:p text:style-name="P14"/>
      <text:p text:style-name="P14"/>
      <text:p text:style-name="P15">app/supabase.ts:</text:p>
      <text:p text:style-name="P12">// app/supabase.ts</text:p>
      <text:p text:style-name="P2"><text:span text:style-name="T3">import</text:span> <text:span text:style-name="T5">{ createClient }</text:span> <text:span text:style-name="T3">from</text:span> <text:span text:style-name="T1">'@supabase/supabase-js'</text:span></text:p>
      <text:p text:style-name="P10"/>
      <text:p text:style-name="P2"><text:span text:style-name="T7">const</text:span> <text:span text:style-name="T9">supabaseUrl</text:span> <text:span text:style-name="T11">=</text:span> <text:span text:style-name="T5">process</text:span>.<text:span text:style-name="T5">env</text:span>.<text:span text:style-name="T9">NEXT_PUBLIC_SUPABASE_URL</text:span><text:span text:style-name="T11">!</text:span></text:p>
      <text:p text:style-name="P2"><text:span text:style-name="T7">const</text:span> <text:span text:style-name="T9">supabaseAnonKey</text:span> <text:span text:style-name="T11">=</text:span> <text:span text:style-name="T5">process</text:span>.<text:span text:style-name="T5">env</text:span>.<text:span text:style-name="T9">NEXT_PUBLIC_SUPABASE_ANON_KEY</text:span><text:span text:style-name="T11">!</text:span></text:p>
      <text:p text:style-name="P10"/>
      <text:p text:style-name="P2"><text:span text:style-name="T3">export</text:span> <text:span text:style-name="T7">const</text:span> <text:span text:style-name="T9">supabase</text:span> <text:span text:style-name="T11">=</text:span> <text:span text:style-name="T13">createClient</text:span>(<text:span text:style-name="T9">supabaseUrl</text:span>, <text:span text:style-name="T9">supabaseAnonKey</text:span>)</text:p>
      <text:p text:style-name="P10"/>
      <text:p text:style-name="P11">// ====================== TEXT HISTORY ======================</text:p>
      <text:p text:style-name="P2"><text:soft-page-break/><text:span text:style-name="T3">export</text:span> <text:span text:style-name="T22">async</text:span> <text:span text:style-name="T7">function</text:span> <text:span text:style-name="T13">loadTextHistory</text:span>(<text:span text:style-name="T20">user_id</text:span><text:span text:style-name="T11">:</text:span> <text:span text:style-name="T18">string</text:span>) <text:span text:style-name="T5">{</text:span></text:p>
      <text:p text:style-name="P7"><text:span text:style-name="T5">  </text:span><text:span text:style-name="T8">const</text:span><text:span text:style-name="T6"> { </text:span><text:span text:style-name="T10">data</text:span><text:span text:style-name="T6">,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content_history'</text:span><text:span text:style-name="T6">)</text:span></text:p>
      <text:p text:style-name="P7"><text:span text:style-name="T5">    </text:span><text:span text:style-name="T6">.</text:span><text:span text:style-name="T14">select</text:span><text:span text:style-name="T6">(</text:span><text:span text:style-name="T2">'*'</text:span><text:span text:style-name="T6">)</text:span></text:p>
      <text:p text:style-name="P7"><text:span text:style-name="T5">    </text:span><text:span text:style-name="T6">.</text:span><text:span text:style-name="T14">eq</text:span><text:span text:style-name="T6">(</text:span><text:span text:style-name="T2">'user_id'</text:span><text:span text:style-name="T6">, </text:span><text:span text:style-name="T21">user_id</text:span><text:span text:style-name="T6">)</text:span></text:p>
      <text:p text:style-name="P7"><text:span text:style-name="T5">    </text:span><text:span text:style-name="T6">.</text:span><text:span text:style-name="T14">order</text:span><text:span text:style-name="T6">(</text:span><text:span text:style-name="T2">'created_at'</text:span><text:span text:style-name="T6">, { ascending</text:span><text:span text:style-name="T24">:</text:span><text:span text:style-name="T6"> </text:span><text:span text:style-name="T23">false</text:span><text:span text:style-name="T6"> })</text:span></text:p>
      <text:p text:style-name="P10"/>
      <text:p text:style-name="P7"><text:span text:style-name="T5">  </text:span><text:span text:style-name="T4">if</text:span><text:span text:style-name="T6"> (</text:span><text:span text:style-name="T10">error</text:span><text:span text:style-name="T6">) </text:span><text:span text:style-name="T10">console</text:span><text:span text:style-name="T6">.</text:span><text:span text:style-name="T14">error</text:span><text:span text:style-name="T6">(</text:span><text:span text:style-name="T2">'Error loading text history:'</text:span><text:span text:style-name="T6">, </text:span><text:span text:style-name="T10">error</text:span><text:span text:style-name="T6">)</text:span></text:p>
      <text:p text:style-name="P7"><text:span text:style-name="T5">  </text:span><text:span text:style-name="T4">return</text:span><text:span text:style-name="T6"> </text:span><text:span text:style-name="T10">data</text:span><text:span text:style-name="T6"> </text:span><text:span text:style-name="T12">||</text:span><text:span text:style-name="T6"> []</text:span></text:p>
      <text:p text:style-name="P9">}</text:p>
      <text:p text:style-name="P10"/>
      <text:p text:style-name="P11">// ====================== MEDIA HISTORY (Video + Audio) ======================</text:p>
      <text:p text:style-name="P2"><text:span text:style-name="T3">export</text:span> <text:span text:style-name="T7">interface</text:span> <text:span text:style-name="T18">VideoHistoryItem</text:span> {</text:p>
      <text:p text:style-name="P7">  <text:span text:style-name="T6">id</text:span><text:span text:style-name="T12">:</text:span><text:span text:style-name="T15"> </text:span><text:span text:style-name="T19">string</text:span></text:p>
      <text:p text:style-name="P7">  <text:span text:style-name="T6">user_id</text:span><text:span text:style-name="T12">:</text:span><text:span text:style-name="T15"> </text:span><text:span text:style-name="T19">string</text:span></text:p>
      <text:p text:style-name="P7">  <text:span text:style-name="T6">video_url</text:span><text:span text:style-name="T12">:</text:span><text:span text:style-name="T15"> </text:span><text:span text:style-name="T19">string</text:span></text:p>
      <text:p text:style-name="P7">  <text:span text:style-name="T6">transcription</text:span><text:span text:style-name="T12">:</text:span><text:span text:style-name="T15"> </text:span><text:span text:style-name="T19">string</text:span></text:p>
      <text:p text:style-name="P7">  <text:span text:style-name="T6">platforms</text:span><text:span text:style-name="T12">?:</text:span><text:span text:style-name="T15"> </text:span><text:span text:style-name="T19">any</text:span><text:span text:style-name="T15">[]</text:span></text:p>
      <text:p text:style-name="P7">  <text:span text:style-name="T6">amplified_outputs</text:span><text:span text:style-name="T12">?:</text:span><text:span text:style-name="T15"> </text:span><text:span text:style-name="T19">any</text:span></text:p>
      <text:p text:style-name="P7">  <text:span text:style-name="T6">title</text:span><text:span text:style-name="T12">?:</text:span><text:span text:style-name="T15"> </text:span><text:span text:style-name="T19">string</text:span></text:p>
      <text:p text:style-name="P7">  <text:span text:style-name="T6">original_filename</text:span><text:span text:style-name="T12">?:</text:span><text:span text:style-name="T15"> </text:span><text:span text:style-name="T19">string</text:span></text:p>
      <text:p text:style-name="P7">  <text:span text:style-name="T6">file_name</text:span><text:span text:style-name="T12">?:</text:span><text:span text:style-name="T15"> </text:span><text:span text:style-name="T19">string</text:span></text:p>
      <text:p text:style-name="P7">  <text:span text:style-name="T6">thumbnail_url</text:span><text:span text:style-name="T12">?:</text:span><text:span text:style-name="T15"> </text:span><text:span text:style-name="T19">string</text:span></text:p>
      <text:p text:style-name="P7">  <text:span text:style-name="T6">created_at</text:span><text:span text:style-name="T12">:</text:span><text:span text:style-name="T15"> </text:span><text:span text:style-name="T19">string</text:span></text:p>
      <text:p text:style-name="P7">  <text:span text:style-name="T6">updated_at</text:span><text:span text:style-name="T12">?:</text:span><text:span text:style-name="T15"> </text:span><text:span text:style-name="T19">string</text:span></text:p>
      <text:p text:style-name="P2">}</text:p>
      <text:p text:style-name="P10"/>
      <text:p text:style-name="P2"><text:span text:style-name="T3">export</text:span> <text:span text:style-name="T22">async</text:span> <text:span text:style-name="T7">function</text:span> <text:span text:style-name="T13">saveVideoToHistory</text:span>({</text:p>
      <text:p text:style-name="P7">  <text:span text:style-name="T21">user_id</text:span><text:span text:style-name="T15">,</text:span></text:p>
      <text:p text:style-name="P7">  <text:span text:style-name="T21">video_url</text:span><text:span text:style-name="T15">,</text:span></text:p>
      <text:p text:style-name="P7">  <text:span text:style-name="T21">transcription</text:span><text:span text:style-name="T15">,</text:span></text:p>
      <text:p text:style-name="P7">  <text:span text:style-name="T21">platforms</text:span><text:span text:style-name="T15">,</text:span></text:p>
      <text:p text:style-name="P7">  <text:span text:style-name="T21">title</text:span><text:span text:style-name="T15">,</text:span></text:p>
      <text:p text:style-name="P7">  <text:span text:style-name="T21">original_filename</text:span><text:span text:style-name="T15">,</text:span></text:p>
      <text:p text:style-name="P7">  <text:span text:style-name="T21">thumbnail_url</text:span><text:span text:style-name="T15">,</text:span></text:p>
      <text:p text:style-name="P2">}<text:span text:style-name="T11">:</text:span> {</text:p>
      <text:p text:style-name="P7">  <text:span text:style-name="T21">user_id</text:span><text:span text:style-name="T12">:</text:span><text:span text:style-name="T15"> </text:span><text:span text:style-name="T19">string</text:span></text:p>
      <text:p text:style-name="P7">  <text:span text:style-name="T21">video_url</text:span><text:span text:style-name="T12">:</text:span><text:span text:style-name="T15"> </text:span><text:span text:style-name="T19">string</text:span></text:p>
      <text:p text:style-name="P7">  <text:span text:style-name="T21">transcription</text:span><text:span text:style-name="T12">:</text:span><text:span text:style-name="T15"> </text:span><text:span text:style-name="T19">string</text:span></text:p>
      <text:p text:style-name="P7">  <text:span text:style-name="T21">platforms</text:span><text:span text:style-name="T12">:</text:span><text:span text:style-name="T15"> </text:span><text:span text:style-name="T19">any</text:span><text:span text:style-name="T15">[]</text:span></text:p>
      <text:p text:style-name="P7">  <text:span text:style-name="T21">title</text:span><text:span text:style-name="T12">?:</text:span><text:span text:style-name="T15"> </text:span><text:span text:style-name="T19">string</text:span></text:p>
      <text:p text:style-name="P7">  <text:span text:style-name="T21">original_filename</text:span><text:span text:style-name="T12">?:</text:span><text:span text:style-name="T15"> </text:span><text:span text:style-name="T19">string</text:span></text:p>
      <text:p text:style-name="P7">  <text:span text:style-name="T21">thumbnail_url</text:span><text:span text:style-name="T12">?:</text:span><text:span text:style-name="T15"> </text:span><text:span text:style-name="T19">string</text:span></text:p>
      <text:p text:style-name="P2">}) <text:span text:style-name="T5">{</text:span></text:p>
      <text:p text:style-name="P7"><text:span text:style-name="T5">  </text:span><text:span text:style-name="T8">const</text:span><text:span text:style-name="T6"> { </text:span><text:span text:style-name="T10">data</text:span><text:span text:style-name="T6">,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video_history'</text:span><text:span text:style-name="T6">)</text:span></text:p>
      <text:p text:style-name="P7"><text:span text:style-name="T5">    </text:span><text:span text:style-name="T6">.</text:span><text:span text:style-name="T14">insert</text:span><text:span text:style-name="T6">({</text:span></text:p>
      <text:p text:style-name="P8"><text:soft-page-break/>      <text:span text:style-name="T15">user_id,</text:span></text:p>
      <text:p text:style-name="P8">      <text:span text:style-name="T15">video_url,</text:span></text:p>
      <text:p text:style-name="P8">      <text:span text:style-name="T15">transcription,</text:span></text:p>
      <text:p text:style-name="P7"><text:span text:style-name="T5">      </text:span><text:span text:style-name="T24">platforms:</text:span><text:span text:style-name="T6"> platforms </text:span><text:span text:style-name="T12">||</text:span><text:span text:style-name="T6"> [],</text:span></text:p>
      <text:p text:style-name="P7"><text:span text:style-name="T5">      </text:span><text:span text:style-name="T24">title:</text:span><text:span text:style-name="T6"> title </text:span><text:span text:style-name="T12">||</text:span><text:span text:style-name="T6"> </text:span><text:span text:style-name="T2">'Untitled Video'</text:span><text:span text:style-name="T6">,</text:span></text:p>
      <text:p text:style-name="P8">      <text:span text:style-name="T15">original_filename,</text:span></text:p>
      <text:p text:style-name="P8">      <text:span text:style-name="T15">thumbnail_url,</text:span></text:p>
      <text:p text:style-name="P8">    <text:span text:style-name="T15">})</text:span></text:p>
      <text:p text:style-name="P7"><text:span text:style-name="T5">    </text:span><text:span text:style-name="T6">.</text:span><text:span text:style-name="T14">select</text:span><text:span text:style-name="T6">()</text:span></text:p>
      <text:p text:style-name="P7"><text:span text:style-name="T5">    </text:span><text:span text:style-name="T6">.</text:span><text:span text:style-name="T14">single</text:span><text:span text:style-name="T6">()</text:span></text:p>
      <text:p text:style-name="P10"/>
      <text:p text:style-name="P7"><text:span text:style-name="T5">  </text:span><text:span text:style-name="T4">if</text:span><text:span text:style-name="T6"> (error) {</text:span></text:p>
      <text:p text:style-name="P7"><text:span text:style-name="T5">    </text:span><text:span text:style-name="T6">console.</text:span><text:span text:style-name="T14">error</text:span><text:span text:style-name="T6">(</text:span><text:span text:style-name="T2">'Error saving video history:'</text:span><text:span text:style-name="T6">, error)</text:span></text:p>
      <text:p text:style-name="P7"><text:span text:style-name="T5">    </text:span><text:span text:style-name="T4">return</text:span><text:span text:style-name="T6"> </text:span><text:span text:style-name="T23">null</text:span></text:p>
      <text:p text:style-name="P8">  <text:span text:style-name="T15">}</text:span></text:p>
      <text:p text:style-name="P7"><text:span text:style-name="T5">  </text:span><text:span text:style-name="T4">return</text:span><text:span text:style-name="T6"> data</text:span></text:p>
      <text:p text:style-name="P9">}</text:p>
      <text:p text:style-name="P10"/>
      <text:p text:style-name="P2"><text:span text:style-name="T3">export</text:span> <text:span text:style-name="T22">async</text:span> <text:span text:style-name="T7">function</text:span> <text:span text:style-name="T13">getVideoHistory</text:span>(<text:span text:style-name="T20">user_id</text:span><text:span text:style-name="T11">:</text:span> <text:span text:style-name="T18">string</text:span>)<text:span text:style-name="T11">:</text:span> <text:span text:style-name="T18">Promise</text:span>&lt;<text:span text:style-name="T18">VideoHistoryItem</text:span>[]&gt; <text:span text:style-name="T5">{</text:span></text:p>
      <text:p text:style-name="P7"><text:span text:style-name="T5">  </text:span><text:span text:style-name="T8">const</text:span><text:span text:style-name="T6"> { </text:span><text:span text:style-name="T10">data</text:span><text:span text:style-name="T6">,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video_history'</text:span><text:span text:style-name="T6">)</text:span></text:p>
      <text:p text:style-name="P7"><text:span text:style-name="T5">    </text:span><text:span text:style-name="T6">.</text:span><text:span text:style-name="T14">select</text:span><text:span text:style-name="T6">(</text:span><text:span text:style-name="T2">'*'</text:span><text:span text:style-name="T6">)</text:span></text:p>
      <text:p text:style-name="P7"><text:span text:style-name="T5">    </text:span><text:span text:style-name="T6">.</text:span><text:span text:style-name="T14">eq</text:span><text:span text:style-name="T6">(</text:span><text:span text:style-name="T2">'user_id'</text:span><text:span text:style-name="T6">, user_id)</text:span></text:p>
      <text:p text:style-name="P7"><text:span text:style-name="T5">    </text:span><text:span text:style-name="T6">.</text:span><text:span text:style-name="T14">order</text:span><text:span text:style-name="T6">(</text:span><text:span text:style-name="T2">'created_at'</text:span><text:span text:style-name="T6">, { </text:span><text:span text:style-name="T24">ascending:</text:span><text:span text:style-name="T6"> </text:span><text:span text:style-name="T23">false</text:span><text:span text:style-name="T6"> })</text:span></text:p>
      <text:p text:style-name="P10"/>
      <text:p text:style-name="P7"><text:span text:style-name="T5">  </text:span><text:span text:style-name="T4">if</text:span><text:span text:style-name="T6"> (error) console.</text:span><text:span text:style-name="T14">error</text:span><text:span text:style-name="T6">(</text:span><text:span text:style-name="T2">'Error loading video history:'</text:span><text:span text:style-name="T6">, error)</text:span></text:p>
      <text:p text:style-name="P7"><text:span text:style-name="T5">  </text:span><text:span text:style-name="T4">return</text:span><text:span text:style-name="T6"> (data </text:span><text:span text:style-name="T4">as</text:span><text:span text:style-name="T6"> </text:span><text:span text:style-name="T19">VideoHistoryItem</text:span><text:span text:style-name="T6">[]) </text:span><text:span text:style-name="T12">||</text:span><text:span text:style-name="T6"> []</text:span></text:p>
      <text:p text:style-name="P9">}</text:p>
      <text:p text:style-name="P10"/>
      <text:p text:style-name="P2"><text:span text:style-name="T3">export</text:span> <text:span text:style-name="T7">function</text:span> <text:span text:style-name="T13">getItemType</text:span>(<text:span text:style-name="T20">item</text:span><text:span text:style-name="T11">:</text:span> <text:span text:style-name="T18">any</text:span>)<text:span text:style-name="T11">:</text:span> <text:span text:style-name="T1">'text'</text:span> <text:span text:style-name="T11">|</text:span> <text:span text:style-name="T1">'video'</text:span> <text:span text:style-name="T11">|</text:span> <text:span text:style-name="T1">'audio'</text:span> <text:span text:style-name="T5">{</text:span></text:p>
      <text:p text:style-name="P7"><text:span text:style-name="T5">  </text:span><text:span text:style-name="T4">if</text:span><text:span text:style-name="T6"> (item.type) </text:span><text:span text:style-name="T4">return</text:span><text:span text:style-name="T6"> item.type</text:span></text:p>
      <text:p text:style-name="P10"/>
      <text:p text:style-name="P7"><text:span text:style-name="T5">  </text:span><text:span text:style-name="T8">const</text:span><text:span text:style-name="T6"> </text:span><text:span text:style-name="T10">filename</text:span><text:span text:style-name="T6"> </text:span><text:span text:style-name="T12">=</text:span><text:span text:style-name="T6"> (item.file_name </text:span><text:span text:style-name="T12">||</text:span><text:span text:style-name="T6"> item.original_filename </text:span><text:span text:style-name="T12">||</text:span><text:span text:style-name="T6"> item.video_url </text:span><text:span text:style-name="T12">||</text:span><text:span text:style-name="T6"> </text:span><text:span text:style-name="T2">''</text:span><text:span text:style-name="T6">).</text:span><text:span text:style-name="T14">toLowerCase</text:span><text:span text:style-name="T6">()</text:span></text:p>
      <text:p text:style-name="P7"><text:span text:style-name="T5">  </text:span><text:span text:style-name="T8">const</text:span><text:span text:style-name="T6"> </text:span><text:span text:style-name="T10">url</text:span><text:span text:style-name="T6"> </text:span><text:span text:style-name="T12">=</text:span><text:span text:style-name="T6"> item.video_url </text:span><text:span text:style-name="T12">||</text:span><text:span text:style-name="T6"> </text:span><text:span text:style-name="T2">''</text:span></text:p>
      <text:p text:style-name="P10"/>
      <text:p text:style-name="P7"><text:span text:style-name="T5">  </text:span><text:span text:style-name="T25">// Robust audio detection (covers audio-uploads bucket + common audio extensions)</text:span></text:p>
      <text:p text:style-name="P7"><text:span text:style-name="T5">  </text:span><text:span text:style-name="T4">if</text:span><text:span text:style-name="T6"> (</text:span></text:p>
      <text:p text:style-name="P7"><text:span text:style-name="T5">    </text:span><text:span text:style-name="T6">url.</text:span><text:span text:style-name="T14">includes</text:span><text:span text:style-name="T6">(</text:span><text:span text:style-name="T2">'audio-uploads'</text:span><text:span text:style-name="T6">) </text:span><text:span text:style-name="T12">||</text:span></text:p>
      <text:p text:style-name="P7"><text:span text:style-name="T5">    </text:span><text:span text:style-name="T6">filename.</text:span><text:span text:style-name="T14">match</text:span><text:span text:style-name="T6">(</text:span><text:span text:style-name="T2">/</text:span><text:span text:style-name="T29">\.</text:span><text:span text:style-name="T30">(</text:span><text:span text:style-name="T2">mp3</text:span><text:span text:style-name="T31">|</text:span><text:span text:style-name="T2">wav</text:span><text:span text:style-name="T31">|</text:span><text:span text:style-name="T2">m4a</text:span><text:span text:style-name="T31">|</text:span><text:span text:style-name="T2">webm</text:span><text:span text:style-name="T31">|</text:span><text:span text:style-name="T2">ogg</text:span><text:span text:style-name="T31">|</text:span><text:span text:style-name="T2">aac</text:span><text:span text:style-name="T31">|</text:span><text:span text:style-name="T2">flac</text:span><text:span text:style-name="T30">)</text:span><text:span text:style-name="T31">$</text:span><text:span text:style-name="T2">/</text:span><text:span text:style-name="T8">i</text:span><text:span text:style-name="T6">) </text:span><text:span text:style-name="T12">&amp;&amp;</text:span></text:p>
      <text:p text:style-name="P7"><text:span text:style-name="T5">    </text:span><text:span text:style-name="T6">(filename.</text:span><text:span text:style-name="T14">includes</text:span><text:span text:style-name="T6">(</text:span><text:span text:style-name="T2">'recording-'</text:span><text:span text:style-name="T6">) </text:span><text:span text:style-name="T12">||</text:span><text:span text:style-name="T6"> filename.</text:span><text:span text:style-name="T14">includes</text:span><text:span text:style-name="T6">(</text:span><text:span text:style-name="T2">'audio'</text:span><text:span text:style-name="T6">) </text:span><text:span text:style-name="T12">||</text:span><text:span text:style-name="T6"> url.</text:span><text:span text:style-name="T14">includes</text:span><text:span text:style-name="T6">(</text:span><text:span text:style-name="T2">'audio'</text:span><text:span text:style-name="T6">))</text:span></text:p>
      <text:p text:style-name="P8">  <text:span text:style-name="T15">) {</text:span></text:p>
      <text:p text:style-name="P7"><text:span text:style-name="T5">    </text:span><text:span text:style-name="T4">return</text:span><text:span text:style-name="T6"> </text:span><text:span text:style-name="T2">'audio'</text:span></text:p>
      <text:p text:style-name="P8">  <text:span text:style-name="T15">}</text:span></text:p>
      <text:p text:style-name="P10"/>
      <text:p text:style-name="P7"><text:span text:style-name="T5">  </text:span><text:span text:style-name="T25">// Everything else that looks like video</text:span></text:p>
      <text:p text:style-name="P7"><text:soft-page-break/><text:span text:style-name="T5">  </text:span><text:span text:style-name="T4">return</text:span><text:span text:style-name="T6"> </text:span><text:span text:style-name="T2">'video'</text:span></text:p>
      <text:p text:style-name="P9">}</text:p>
      <text:p text:style-name="P10"/>
      <text:p text:style-name="P2"><text:span text:style-name="T3">export</text:span> <text:span text:style-name="T22">async</text:span> <text:span text:style-name="T7">function</text:span> <text:span text:style-name="T13">getUnifiedHistory</text:span>(<text:span text:style-name="T20">user_id</text:span><text:span text:style-name="T11">:</text:span> <text:span text:style-name="T18">string</text:span>) <text:span text:style-name="T5">{</text:span></text:p>
      <text:p text:style-name="P7"><text:span text:style-name="T5">  </text:span><text:span text:style-name="T8">const</text:span><text:span text:style-name="T6"> [</text:span><text:span text:style-name="T10">textHistory</text:span><text:span text:style-name="T6">, </text:span><text:span text:style-name="T10">mediaHistory</text:span><text:span text:style-name="T6">] </text:span><text:span text:style-name="T12">=</text:span><text:span text:style-name="T6"> </text:span><text:span text:style-name="T4">await</text:span><text:span text:style-name="T6"> </text:span><text:span text:style-name="T19">Promise</text:span><text:span text:style-name="T6">.</text:span><text:span text:style-name="T14">all</text:span><text:span text:style-name="T6">([</text:span></text:p>
      <text:p text:style-name="P7"><text:span text:style-name="T5">    </text:span><text:span text:style-name="T14">loadTextHistory</text:span><text:span text:style-name="T6">(user_id),</text:span></text:p>
      <text:p text:style-name="P7"><text:span text:style-name="T5">    </text:span><text:span text:style-name="T14">getVideoHistory</text:span><text:span text:style-name="T6">(user_id),</text:span></text:p>
      <text:p text:style-name="P8">  <text:span text:style-name="T15">])</text:span></text:p>
      <text:p text:style-name="P10"/>
      <text:p text:style-name="P7"><text:span text:style-name="T5">  </text:span><text:span text:style-name="T8">const</text:span><text:span text:style-name="T6"> </text:span><text:span text:style-name="T10">combined</text:span><text:span text:style-name="T6"> </text:span><text:span text:style-name="T12">=</text:span><text:span text:style-name="T6"> [</text:span></text:p>
      <text:p text:style-name="P7"><text:span text:style-name="T5">    </text:span><text:span text:style-name="T12">...</text:span><text:span text:style-name="T6">textHistory.</text:span><text:span text:style-name="T14">map</text:span><text:span text:style-name="T6">(</text:span><text:span text:style-name="T21">item</text:span><text:span text:style-name="T6"> </text:span><text:span text:style-name="T8">=&gt;</text:span><text:span text:style-name="T6"> ({ </text:span><text:span text:style-name="T12">...</text:span><text:span text:style-name="T6">item, </text:span><text:span text:style-name="T24">type:</text:span><text:span text:style-name="T6"> </text:span><text:span text:style-name="T2">'text'</text:span><text:span text:style-name="T6"> </text:span><text:span text:style-name="T4">as</text:span><text:span text:style-name="T6"> </text:span><text:span text:style-name="T23">const</text:span><text:span text:style-name="T6"> })),</text:span></text:p>
      <text:p text:style-name="P7"><text:span text:style-name="T5">    </text:span><text:span text:style-name="T12">...</text:span><text:span text:style-name="T6">mediaHistory.</text:span><text:span text:style-name="T14">map</text:span><text:span text:style-name="T6">(</text:span><text:span text:style-name="T21">item</text:span><text:span text:style-name="T6"> </text:span><text:span text:style-name="T8">=&gt;</text:span><text:span text:style-name="T6"> ({ </text:span><text:span text:style-name="T12">...</text:span><text:span text:style-name="T6">item, </text:span><text:span text:style-name="T24">type:</text:span><text:span text:style-name="T6"> </text:span><text:span text:style-name="T14">getItemType</text:span><text:span text:style-name="T6">(item) })),</text:span></text:p>
      <text:p text:style-name="P7"><text:span text:style-name="T5">  </text:span><text:span text:style-name="T6">].</text:span><text:span text:style-name="T14">sort</text:span><text:span text:style-name="T6">((</text:span><text:span text:style-name="T21">a</text:span><text:span text:style-name="T6">, </text:span><text:span text:style-name="T21">b</text:span><text:span text:style-name="T6">) </text:span><text:span text:style-name="T8">=&gt;</text:span><text:span text:style-name="T6"> </text:span></text:p>
      <text:p text:style-name="P7"><text:span text:style-name="T5">    </text:span><text:span text:style-name="T23">new</text:span><text:span text:style-name="T6"> </text:span><text:span text:style-name="T14">Date</text:span><text:span text:style-name="T6">(b.created_at).</text:span><text:span text:style-name="T14">getTime</text:span><text:span text:style-name="T6">() </text:span><text:span text:style-name="T12">-</text:span><text:span text:style-name="T6"> </text:span><text:span text:style-name="T23">new</text:span><text:span text:style-name="T6"> </text:span><text:span text:style-name="T14">Date</text:span><text:span text:style-name="T6">(a.created_at).</text:span><text:span text:style-name="T14">getTime</text:span><text:span text:style-name="T6">()</text:span></text:p>
      <text:p text:style-name="P8">  <text:span text:style-name="T15">)</text:span></text:p>
      <text:p text:style-name="P10"/>
      <text:p text:style-name="P7"><text:span text:style-name="T5">  </text:span><text:span text:style-name="T4">return</text:span><text:span text:style-name="T6"> combined</text:span></text:p>
      <text:p text:style-name="P9">}</text:p>
      <text:p text:style-name="P10"/>
      <text:p text:style-name="P11">// ====================== SCHEDULED POSTS ======================</text:p>
      <text:p text:style-name="P2"><text:span text:style-name="T3">export</text:span> <text:span text:style-name="T7">interface</text:span> <text:span text:style-name="T18">ScheduledPostDB</text:span> {</text:p>
      <text:p text:style-name="P7">  <text:span text:style-name="T21">id</text:span><text:span text:style-name="T12">:</text:span><text:span text:style-name="T15"> </text:span><text:span text:style-name="T19">string</text:span></text:p>
      <text:p text:style-name="P7">  <text:span text:style-name="T21">user_id</text:span><text:span text:style-name="T12">:</text:span><text:span text:style-name="T15"> </text:span><text:span text:style-name="T19">string</text:span></text:p>
      <text:p text:style-name="P7">  <text:span text:style-name="T21">history_item</text:span><text:span text:style-name="T12">:</text:span><text:span text:style-name="T15"> </text:span><text:span text:style-name="T19">any</text:span></text:p>
      <text:p text:style-name="P7">  <text:span text:style-name="T21">scheduled_at</text:span><text:span text:style-name="T12">:</text:span><text:span text:style-name="T15"> </text:span><text:span text:style-name="T19">string</text:span></text:p>
      <text:p text:style-name="P7">  <text:span text:style-name="T21">platform</text:span><text:span text:style-name="T12">:</text:span><text:span text:style-name="T15"> </text:span><text:span text:style-name="T19">string</text:span></text:p>
      <text:p text:style-name="P7">  <text:span text:style-name="T21">status</text:span><text:span text:style-name="T12">:</text:span><text:span text:style-name="T15"> </text:span><text:span text:style-name="T2">'pending'</text:span><text:span text:style-name="T15"> </text:span><text:span text:style-name="T12">|</text:span><text:span text:style-name="T15"> </text:span><text:span text:style-name="T2">'posted'</text:span><text:span text:style-name="T15"> </text:span><text:span text:style-name="T12">|</text:span><text:span text:style-name="T15"> </text:span><text:span text:style-name="T2">'failed'</text:span></text:p>
      <text:p text:style-name="P7">  <text:span text:style-name="T21">created_at</text:span><text:span text:style-name="T12">:</text:span><text:span text:style-name="T15"> </text:span><text:span text:style-name="T19">string</text:span></text:p>
      <text:p text:style-name="P2">}</text:p>
      <text:p text:style-name="P10"/>
      <text:p text:style-name="P2"><text:span text:style-name="T3">export</text:span> <text:span text:style-name="T22">async</text:span> <text:span text:style-name="T7">function</text:span> <text:span text:style-name="T13">saveScheduledPost</text:span>({</text:p>
      <text:p text:style-name="P7">  <text:span text:style-name="T21">user_id</text:span><text:span text:style-name="T15">,</text:span></text:p>
      <text:p text:style-name="P7">  <text:span text:style-name="T21">history_item</text:span><text:span text:style-name="T15">,</text:span></text:p>
      <text:p text:style-name="P7">  <text:span text:style-name="T21">scheduled_at</text:span><text:span text:style-name="T15">,</text:span></text:p>
      <text:p text:style-name="P7">  <text:span text:style-name="T21">platform</text:span><text:span text:style-name="T15">,</text:span></text:p>
      <text:p text:style-name="P2">}<text:span text:style-name="T11">:</text:span> {</text:p>
      <text:p text:style-name="P7">  <text:span text:style-name="T21">user_id</text:span><text:span text:style-name="T12">:</text:span><text:span text:style-name="T15"> </text:span><text:span text:style-name="T19">string</text:span></text:p>
      <text:p text:style-name="P7">  <text:span text:style-name="T21">history_item</text:span><text:span text:style-name="T12">:</text:span><text:span text:style-name="T15"> </text:span><text:span text:style-name="T19">any</text:span></text:p>
      <text:p text:style-name="P7">  <text:span text:style-name="T21">scheduled_at</text:span><text:span text:style-name="T12">:</text:span><text:span text:style-name="T15"> </text:span><text:span text:style-name="T19">string</text:span></text:p>
      <text:p text:style-name="P7">  <text:span text:style-name="T21">platform</text:span><text:span text:style-name="T12">:</text:span><text:span text:style-name="T15"> </text:span><text:span text:style-name="T19">string</text:span></text:p>
      <text:p text:style-name="P2">}) <text:span text:style-name="T5">{</text:span></text:p>
      <text:p text:style-name="P7"><text:span text:style-name="T5">  </text:span><text:span text:style-name="T8">const</text:span><text:span text:style-name="T6"> { </text:span><text:span text:style-name="T10">data</text:span><text:span text:style-name="T6">,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scheduled_posts'</text:span><text:span text:style-name="T6">)</text:span></text:p>
      <text:p text:style-name="P7"><text:span text:style-name="T5">    </text:span><text:span text:style-name="T6">.</text:span><text:span text:style-name="T14">insert</text:span><text:span text:style-name="T6">({</text:span></text:p>
      <text:p text:style-name="P8">      <text:span text:style-name="T15">user_id,</text:span></text:p>
      <text:p text:style-name="P8">      <text:span text:style-name="T15">history_item,</text:span></text:p>
      <text:p text:style-name="P8">      <text:span text:style-name="T15">scheduled_at,</text:span></text:p>
      <text:p text:style-name="P8"><text:soft-page-break/>      <text:span text:style-name="T15">platform,</text:span></text:p>
      <text:p text:style-name="P7"><text:span text:style-name="T5">      </text:span><text:span text:style-name="T24">status:</text:span><text:span text:style-name="T6"> </text:span><text:span text:style-name="T2">'pending'</text:span><text:span text:style-name="T6">,</text:span></text:p>
      <text:p text:style-name="P8">    <text:span text:style-name="T15">})</text:span></text:p>
      <text:p text:style-name="P7"><text:span text:style-name="T5">    </text:span><text:span text:style-name="T6">.</text:span><text:span text:style-name="T14">select</text:span><text:span text:style-name="T6">()</text:span></text:p>
      <text:p text:style-name="P7"><text:span text:style-name="T5">    </text:span><text:span text:style-name="T6">.</text:span><text:span text:style-name="T14">single</text:span><text:span text:style-name="T6">()</text:span></text:p>
      <text:p text:style-name="P10"/>
      <text:p text:style-name="P7"><text:span text:style-name="T5">  </text:span><text:span text:style-name="T4">if</text:span><text:span text:style-name="T6"> (error) {</text:span></text:p>
      <text:p text:style-name="P7"><text:span text:style-name="T5">    </text:span><text:span text:style-name="T10">console</text:span><text:span text:style-name="T6">.</text:span><text:span text:style-name="T14">error</text:span><text:span text:style-name="T6">(</text:span><text:span text:style-name="T2">'Error saving scheduled post:'</text:span><text:span text:style-name="T6">, </text:span><text:span text:style-name="T10">error</text:span><text:span text:style-name="T6">)</text:span></text:p>
      <text:p text:style-name="P7"><text:span text:style-name="T5">    </text:span><text:span text:style-name="T4">throw</text:span><text:span text:style-name="T6"> </text:span><text:span text:style-name="T10">error</text:span></text:p>
      <text:p text:style-name="P8">  <text:span text:style-name="T15">}</text:span></text:p>
      <text:p text:style-name="P7"><text:span text:style-name="T5">  </text:span><text:span text:style-name="T4">return</text:span><text:span text:style-name="T6"> </text:span><text:span text:style-name="T10">data</text:span></text:p>
      <text:p text:style-name="P9">}</text:p>
      <text:p text:style-name="P10"/>
      <text:p text:style-name="P2"><text:span text:style-name="T3">export</text:span> <text:span text:style-name="T22">async</text:span> <text:span text:style-name="T7">function</text:span> <text:span text:style-name="T13">loadScheduledPosts</text:span>(<text:span text:style-name="T20">user_id</text:span><text:span text:style-name="T11">:</text:span> <text:span text:style-name="T18">string</text:span>) <text:span text:style-name="T5">{</text:span></text:p>
      <text:p text:style-name="P7"><text:span text:style-name="T5">  </text:span><text:span text:style-name="T8">const</text:span><text:span text:style-name="T6"> { </text:span><text:span text:style-name="T10">data</text:span><text:span text:style-name="T6">,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scheduled_posts'</text:span><text:span text:style-name="T6">)</text:span></text:p>
      <text:p text:style-name="P7"><text:span text:style-name="T5">    </text:span><text:span text:style-name="T6">.</text:span><text:span text:style-name="T14">select</text:span><text:span text:style-name="T6">(</text:span><text:span text:style-name="T2">'*'</text:span><text:span text:style-name="T6">)</text:span></text:p>
      <text:p text:style-name="P7"><text:span text:style-name="T5">    </text:span><text:span text:style-name="T6">.</text:span><text:span text:style-name="T14">eq</text:span><text:span text:style-name="T6">(</text:span><text:span text:style-name="T2">'user_id'</text:span><text:span text:style-name="T6">, </text:span><text:span text:style-name="T21">user_id</text:span><text:span text:style-name="T6">)</text:span></text:p>
      <text:p text:style-name="P7"><text:span text:style-name="T5">    </text:span><text:span text:style-name="T6">.</text:span><text:span text:style-name="T14">order</text:span><text:span text:style-name="T6">(</text:span><text:span text:style-name="T2">'scheduled_at'</text:span><text:span text:style-name="T6">, { ascending</text:span><text:span text:style-name="T24">:</text:span><text:span text:style-name="T6"> </text:span><text:span text:style-name="T23">true</text:span><text:span text:style-name="T6"> })</text:span></text:p>
      <text:p text:style-name="P10"/>
      <text:p text:style-name="P7"><text:span text:style-name="T5">  </text:span><text:span text:style-name="T4">if</text:span><text:span text:style-name="T6"> (</text:span><text:span text:style-name="T10">error</text:span><text:span text:style-name="T6">) {</text:span></text:p>
      <text:p text:style-name="P7"><text:span text:style-name="T5">    </text:span><text:span text:style-name="T10">console</text:span><text:span text:style-name="T6">.</text:span><text:span text:style-name="T14">error</text:span><text:span text:style-name="T6">(</text:span><text:span text:style-name="T2">'Error loading scheduled posts:'</text:span><text:span text:style-name="T6">, </text:span><text:span text:style-name="T10">error</text:span><text:span text:style-name="T6">)</text:span></text:p>
      <text:p text:style-name="P7"><text:span text:style-name="T5">    </text:span><text:span text:style-name="T4">return</text:span><text:span text:style-name="T6"> []</text:span></text:p>
      <text:p text:style-name="P8">  <text:span text:style-name="T15">}</text:span></text:p>
      <text:p text:style-name="P7"><text:span text:style-name="T5">  </text:span><text:span text:style-name="T4">return</text:span><text:span text:style-name="T6"> </text:span><text:span text:style-name="T10">data</text:span><text:span text:style-name="T6"> </text:span><text:span text:style-name="T12">||</text:span><text:span text:style-name="T6"> []</text:span></text:p>
      <text:p text:style-name="P9">}</text:p>
      <text:p text:style-name="P10"/>
      <text:p text:style-name="P2"><text:span text:style-name="T3">export</text:span> <text:span text:style-name="T22">async</text:span> <text:span text:style-name="T7">function</text:span> <text:span text:style-name="T13">markScheduledPostAsPosted</text:span>(<text:span text:style-name="T20">id</text:span><text:span text:style-name="T11">:</text:span> <text:span text:style-name="T18">string</text:span>) <text:span text:style-name="T5">{</text:span></text:p>
      <text:p text:style-name="P7"><text:span text:style-name="T5">  </text:span><text:span text:style-name="T8">const</text:span><text:span text:style-name="T6"> {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scheduled_posts'</text:span><text:span text:style-name="T6">)</text:span></text:p>
      <text:p text:style-name="P7"><text:span text:style-name="T5">    </text:span><text:span text:style-name="T6">.</text:span><text:span text:style-name="T14">update</text:span><text:span text:style-name="T6">({ status</text:span><text:span text:style-name="T24">:</text:span><text:span text:style-name="T6"> </text:span><text:span text:style-name="T2">'posted'</text:span><text:span text:style-name="T6"> })</text:span></text:p>
      <text:p text:style-name="P7"><text:span text:style-name="T5">    </text:span><text:span text:style-name="T6">.</text:span><text:span text:style-name="T14">eq</text:span><text:span text:style-name="T6">(</text:span><text:span text:style-name="T2">'id'</text:span><text:span text:style-name="T6">, </text:span><text:span text:style-name="T21">id</text:span><text:span text:style-name="T6">)</text:span></text:p>
      <text:p text:style-name="P7"><text:span text:style-name="T5">  </text:span><text:span text:style-name="T4">if</text:span><text:span text:style-name="T6"> (</text:span><text:span text:style-name="T10">error</text:span><text:span text:style-name="T6">) </text:span><text:span text:style-name="T10">console</text:span><text:span text:style-name="T6">.</text:span><text:span text:style-name="T14">error</text:span><text:span text:style-name="T6">(</text:span><text:span text:style-name="T2">'Error marking post as posted:'</text:span><text:span text:style-name="T6">, </text:span><text:span text:style-name="T10">error</text:span><text:span text:style-name="T6">)</text:span></text:p>
      <text:p text:style-name="P9">}</text:p>
      <text:p text:style-name="P10"/>
      <text:p text:style-name="P2"><text:span text:style-name="T3">export</text:span> <text:span text:style-name="T22">async</text:span> <text:span text:style-name="T7">function</text:span> <text:span text:style-name="T13">deleteScheduledPost</text:span>(<text:span text:style-name="T20">id</text:span><text:span text:style-name="T11">:</text:span> <text:span text:style-name="T18">string</text:span>) <text:span text:style-name="T5">{</text:span></text:p>
      <text:p text:style-name="P7"><text:span text:style-name="T5">  </text:span><text:span text:style-name="T8">const</text:span><text:span text:style-name="T6"> {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scheduled_posts'</text:span><text:span text:style-name="T6">)</text:span></text:p>
      <text:p text:style-name="P7"><text:span text:style-name="T5">    </text:span><text:span text:style-name="T6">.</text:span><text:span text:style-name="T14">delete</text:span><text:span text:style-name="T6">()</text:span></text:p>
      <text:p text:style-name="P7"><text:span text:style-name="T5">    </text:span><text:span text:style-name="T6">.</text:span><text:span text:style-name="T14">eq</text:span><text:span text:style-name="T6">(</text:span><text:span text:style-name="T2">'id'</text:span><text:span text:style-name="T6">, </text:span><text:span text:style-name="T21">id</text:span><text:span text:style-name="T6">)</text:span></text:p>
      <text:p text:style-name="P7"><text:span text:style-name="T5">  </text:span><text:span text:style-name="T4">if</text:span><text:span text:style-name="T6"> (</text:span><text:span text:style-name="T10">error</text:span><text:span text:style-name="T6">) </text:span><text:span text:style-name="T10">console</text:span><text:span text:style-name="T6">.</text:span><text:span text:style-name="T14">error</text:span><text:span text:style-name="T6">(</text:span><text:span text:style-name="T2">'Error deleting scheduled post:'</text:span><text:span text:style-name="T6">, </text:span><text:span text:style-name="T10">error</text:span><text:span text:style-name="T6">)</text:span></text:p>
      <text:p text:style-name="P9">}</text:p>
      <text:p text:style-name="P15"/>
      <text:p text:style-name="P15"/>
      <text:p text:style-name="P15"/>
      <text:p text:style-name="P16"><text:soft-page-break/>vercel.json:</text:p>
      <text:p text:style-name="P16"/>
      <text:p text:style-name="P4">{</text:p>
      <text:p text:style-name="P7">  <text:span text:style-name="T28">"crons"</text:span><text:span text:style-name="T15">: [</text:span></text:p>
      <text:p text:style-name="P7">    <text:span text:style-name="T15">{</text:span></text:p>
      <text:p text:style-name="P7">      <text:span text:style-name="T28">"path"</text:span><text:span text:style-name="T15">: </text:span><text:span text:style-name="T2">"/api/process-scheduled-posts"</text:span><text:span text:style-name="T15">,</text:span></text:p>
      <text:p text:style-name="P7">      <text:span text:style-name="T28">"schedule"</text:span><text:span text:style-name="T15">: </text:span><text:span text:style-name="T2">"*/1 * * * *"</text:span></text:p>
      <text:p text:style-name="P7">    <text:span text:style-name="T15">}</text:span></text:p>
      <text:p text:style-name="P7">  <text:span text:style-name="T15">]</text:span></text:p>
      <text:p text:style-name="P2">}</text:p>
      <text:p text:style-name="P16"/>
      <text:p text:style-name="P16"/>
      <text:p text:style-name="P16">app/api/process-scheduled-posts/route.ts:</text:p>
      <text:p text:style-name="P16"/>
      <text:p text:style-name="P13">// app/api/process-scheduled-posts/route.ts</text:p>
      <text:p text:style-name="P2"><text:span text:style-name="T3">import</text:span> <text:span text:style-name="T5">{ NextResponse }</text:span> <text:span text:style-name="T3">from</text:span> <text:span text:style-name="T1">'next/server'</text:span>;</text:p>
      <text:p text:style-name="P2"><text:span text:style-name="T3">import</text:span> <text:span text:style-name="T5">{ createClient }</text:span> <text:span text:style-name="T3">from</text:span> <text:span text:style-name="T1">'@supabase/supabase-js'</text:span>;</text:p>
      <text:p text:style-name="P2"><text:span text:style-name="T3">import</text:span> <text:span text:style-name="T5">{ markScheduledPostAsPosted }</text:span> <text:span text:style-name="T3">from</text:span> <text:span text:style-name="T1">'../../supabase'</text:span>;</text:p>
      <text:p text:style-name="P10"/>
      <text:p text:style-name="P2"><text:span text:style-name="T7">const</text:span> <text:span text:style-name="T9">supabaseUrl</text:span> <text:span text:style-name="T11">=</text:span> <text:span text:style-name="T5">process</text:span>.<text:span text:style-name="T5">env</text:span>.<text:span text:style-name="T9">NEXT_PUBLIC_SUPABASE_URL</text:span><text:span text:style-name="T11">!</text:span>;</text:p>
      <text:p text:style-name="P2"><text:span text:style-name="T7">const</text:span> <text:span text:style-name="T9">supabaseServiceKey</text:span> <text:span text:style-name="T11">=</text:span> <text:span text:style-name="T5">process</text:span>.<text:span text:style-name="T5">env</text:span>.<text:span text:style-name="T9">SUPABASE_SERVICE_ROLE_KEY</text:span><text:span text:style-name="T11">!</text:span>;</text:p>
      <text:p text:style-name="P10"/>
      <text:p text:style-name="P2"><text:span text:style-name="T7">const</text:span> <text:span text:style-name="T9">supabaseAdmin</text:span> <text:span text:style-name="T11">=</text:span> <text:span text:style-name="T13">createClient</text:span>(<text:span text:style-name="T9">supabaseUrl</text:span>, <text:span text:style-name="T9">supabaseServiceKey</text:span>, {</text:p>
      <text:p text:style-name="P7">  <text:span text:style-name="T6">auth</text:span><text:span text:style-name="T24">:</text:span><text:span text:style-name="T6"> { autoRefreshToken</text:span><text:span text:style-name="T24">:</text:span><text:span text:style-name="T6"> </text:span><text:span text:style-name="T23">false</text:span><text:span text:style-name="T6">, persistSession</text:span><text:span text:style-name="T24">:</text:span><text:span text:style-name="T6"> </text:span><text:span text:style-name="T23">false</text:span><text:span text:style-name="T6"> }</text:span></text:p>
      <text:p text:style-name="P2">});</text:p>
      <text:p text:style-name="P10"/>
      <text:p text:style-name="P2"><text:span text:style-name="T3">export</text:span> <text:span text:style-name="T22">async</text:span> <text:span text:style-name="T7">function</text:span> <text:span text:style-name="T13">GET</text:span>() <text:span text:style-name="T5">{</text:span></text:p>
      <text:p text:style-name="P7"><text:span text:style-name="T5">  </text:span><text:span text:style-name="T4">try</text:span><text:span text:style-name="T6"> {</text:span></text:p>
      <text:p text:style-name="P7"><text:span text:style-name="T5">    </text:span><text:span text:style-name="T8">const</text:span><text:span text:style-name="T6"> { data: </text:span><text:span text:style-name="T10">duePosts</text:span><text:span text:style-name="T6">,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Admin</text:span></text:p>
      <text:p text:style-name="P7"><text:span text:style-name="T5">      </text:span><text:span text:style-name="T6">.</text:span><text:span text:style-name="T14">from</text:span><text:span text:style-name="T6">(</text:span><text:span text:style-name="T2">'scheduled_posts'</text:span><text:span text:style-name="T6">)</text:span></text:p>
      <text:p text:style-name="P7"><text:span text:style-name="T5">      </text:span><text:span text:style-name="T6">.</text:span><text:span text:style-name="T14">select</text:span><text:span text:style-name="T6">(</text:span><text:span text:style-name="T2">'*'</text:span><text:span text:style-name="T6">)</text:span></text:p>
      <text:p text:style-name="P7"><text:span text:style-name="T5">      </text:span><text:span text:style-name="T6">.</text:span><text:span text:style-name="T14">lte</text:span><text:span text:style-name="T6">(</text:span><text:span text:style-name="T2">'scheduled_at'</text:span><text:span text:style-name="T6">, </text:span><text:span text:style-name="T23">new</text:span><text:span text:style-name="T6"> </text:span><text:span text:style-name="T19">Date</text:span><text:span text:style-name="T6">().</text:span><text:span text:style-name="T14">toISOString</text:span><text:span text:style-name="T6">())</text:span></text:p>
      <text:p text:style-name="P7"><text:span text:style-name="T5">      </text:span><text:span text:style-name="T6">.</text:span><text:span text:style-name="T14">eq</text:span><text:span text:style-name="T6">(</text:span><text:span text:style-name="T2">'status'</text:span><text:span text:style-name="T6">, </text:span><text:span text:style-name="T2">'pending'</text:span><text:span text:style-name="T6">);</text:span></text:p>
      <text:p text:style-name="P10"/>
      <text:p text:style-name="P7"><text:span text:style-name="T5">    </text:span><text:span text:style-name="T4">if</text:span><text:span text:style-name="T6"> (</text:span><text:span text:style-name="T10">error</text:span><text:span text:style-name="T6">) </text:span><text:span text:style-name="T4">throw</text:span><text:span text:style-name="T6"> </text:span><text:span text:style-name="T10">error</text:span><text:span text:style-name="T6">;</text:span></text:p>
      <text:p text:style-name="P10"/>
      <text:p text:style-name="P7"><text:span text:style-name="T5">    </text:span><text:span text:style-name="T4">for</text:span><text:span text:style-name="T6"> (</text:span><text:span text:style-name="T8">const</text:span><text:span text:style-name="T6"> </text:span><text:span text:style-name="T10">post</text:span><text:span text:style-name="T6"> </text:span><text:span text:style-name="T23">of</text:span><text:span text:style-name="T6"> </text:span><text:span text:style-name="T10">duePosts</text:span><text:span text:style-name="T6"> </text:span><text:span text:style-name="T12">||</text:span><text:span text:style-name="T6"> []) {</text:span></text:p>
      <text:p text:style-name="P7"><text:span text:style-name="T5">      </text:span><text:span text:style-name="T4">try</text:span><text:span text:style-name="T6"> {</text:span></text:p>
      <text:p text:style-name="P7"><text:span text:style-name="T5">        </text:span><text:span text:style-name="T8">const</text:span><text:span text:style-name="T6"> </text:span><text:span text:style-name="T10">item</text:span><text:span text:style-name="T6"> </text:span><text:span text:style-name="T12">=</text:span><text:span text:style-name="T6"> </text:span><text:span text:style-name="T10">post</text:span><text:span text:style-name="T6">.history_item;</text:span></text:p>
      <text:p text:style-name="P10"/>
      <text:p text:style-name="P7"><text:span text:style-name="T5">        </text:span><text:span text:style-name="T25">// Extract full platform-specific data exactly like the main Zernio modal does</text:span></text:p>
      <text:p text:style-name="P7"><text:span text:style-name="T5">        </text:span><text:span text:style-name="T8">let</text:span><text:span text:style-name="T6"> content </text:span><text:span text:style-name="T12">=</text:span><text:span text:style-name="T6"> </text:span><text:span text:style-name="T10">item</text:span><text:span text:style-name="T6">.type </text:span><text:span text:style-name="T12">===</text:span><text:span text:style-name="T6"> </text:span><text:span text:style-name="T2">'text'</text:span><text:span text:style-name="T6"> </text:span></text:p>
      <text:p text:style-name="P7"><text:span text:style-name="T5">          </text:span><text:span text:style-name="T12">?</text:span><text:span text:style-name="T6"> </text:span><text:span text:style-name="T10">item</text:span><text:span text:style-name="T6">.original_content </text:span></text:p>
      <text:p text:style-name="P7"><text:soft-page-break/><text:span text:style-name="T5">          </text:span><text:span text:style-name="T12">:</text:span><text:span text:style-name="T6"> (</text:span><text:span text:style-name="T10">item</text:span><text:span text:style-name="T6">.amplified_outputs?.[</text:span><text:span text:style-name="T10">post</text:span><text:span text:style-name="T6">.platform]?.caption </text:span><text:span text:style-name="T12">||</text:span><text:span text:style-name="T6"> </text:span><text:span text:style-name="T10">item</text:span><text:span text:style-name="T6">.transcription </text:span><text:span text:style-name="T12">||</text:span><text:span text:style-name="T6"> </text:span><text:span text:style-name="T10">item</text:span><text:span text:style-name="T6">.file_name </text:span><text:span text:style-name="T12">||</text:span><text:span text:style-name="T6"> </text:span><text:span text:style-name="T2">'Scheduled amplified content'</text:span><text:span text:style-name="T6">);</text:span></text:p>
      <text:p text:style-name="P10"/>
      <text:p text:style-name="P7"><text:span text:style-name="T5">        </text:span><text:span text:style-name="T8">const</text:span><text:span text:style-name="T6"> </text:span><text:span text:style-name="T10">title</text:span><text:span text:style-name="T6"> </text:span><text:span text:style-name="T12">=</text:span><text:span text:style-name="T6"> </text:span><text:span text:style-name="T10">item</text:span><text:span text:style-name="T6">.title </text:span><text:span text:style-name="T12">||</text:span><text:span text:style-name="T6"> </text:span><text:span text:style-name="T10">item</text:span><text:span text:style-name="T6">.original_filename </text:span><text:span text:style-name="T12">||</text:span><text:span text:style-name="T6"> </text:span><text:span text:style-name="T2">'Untitled'</text:span><text:span text:style-name="T6">;</text:span></text:p>
      <text:p text:style-name="P7"><text:span text:style-name="T5">        </text:span><text:span text:style-name="T8">const</text:span><text:span text:style-name="T6"> </text:span><text:span text:style-name="T10">caption</text:span><text:span text:style-name="T6"> </text:span><text:span text:style-name="T12">=</text:span><text:span text:style-name="T6"> </text:span><text:span text:style-name="T10">item</text:span><text:span text:style-name="T6">.amplified_outputs?.[</text:span><text:span text:style-name="T10">post</text:span><text:span text:style-name="T6">.platform]?.caption </text:span><text:span text:style-name="T12">||</text:span><text:span text:style-name="T6"> content;</text:span></text:p>
      <text:p text:style-name="P7"><text:span text:style-name="T5">        </text:span><text:span text:style-name="T8">const</text:span><text:span text:style-name="T6"> </text:span><text:span text:style-name="T10">hashtags</text:span><text:span text:style-name="T6"> </text:span><text:span text:style-name="T12">=</text:span><text:span text:style-name="T6"> </text:span><text:span text:style-name="T10">item</text:span><text:span text:style-name="T6">.amplified_outputs?.[</text:span><text:span text:style-name="T10">post</text:span><text:span text:style-name="T6">.platform]?.hashtags </text:span><text:span text:style-name="T12">||</text:span><text:span text:style-name="T6"> [];</text:span></text:p>
      <text:p text:style-name="P10"/>
      <text:p text:style-name="P7"><text:span text:style-name="T5">        </text:span><text:span text:style-name="T8">const</text:span><text:span text:style-name="T6"> </text:span><text:span text:style-name="T10">payload</text:span><text:span text:style-name="T6"> </text:span><text:span text:style-name="T12">=</text:span><text:span text:style-name="T6"> {</text:span></text:p>
      <text:p text:style-name="P7"><text:span text:style-name="T5">          </text:span><text:span text:style-name="T6">platform_id</text:span><text:span text:style-name="T24">:</text:span><text:span text:style-name="T6"> </text:span><text:span text:style-name="T10">post</text:span><text:span text:style-name="T6">.history_item.zernio_account_id </text:span><text:span text:style-name="T12">||</text:span><text:span text:style-name="T6"> </text:span><text:span text:style-name="T2">''</text:span><text:span text:style-name="T6">, </text:span><text:span text:style-name="T25">// fallback if missing</text:span></text:p>
      <text:p text:style-name="P7"><text:span text:style-name="T5">          </text:span><text:span text:style-name="T6">platform</text:span><text:span text:style-name="T24">:</text:span><text:span text:style-name="T6"> </text:span><text:span text:style-name="T10">post</text:span><text:span text:style-name="T6">.platform,</text:span></text:p>
      <text:p text:style-name="P7"><text:span text:style-name="T5">          </text:span><text:span text:style-name="T6">content</text:span><text:span text:style-name="T24">:</text:span><text:span text:style-name="T6"> content,</text:span></text:p>
      <text:p text:style-name="P7"><text:span text:style-name="T5">          </text:span><text:span text:style-name="T6">title</text:span><text:span text:style-name="T24">:</text:span><text:span text:style-name="T6"> </text:span><text:span text:style-name="T10">title</text:span><text:span text:style-name="T6">,</text:span></text:p>
      <text:p text:style-name="P7"><text:span text:style-name="T5">          </text:span><text:span text:style-name="T6">caption</text:span><text:span text:style-name="T24">:</text:span><text:span text:style-name="T6"> caption,</text:span></text:p>
      <text:p text:style-name="P7"><text:span text:style-name="T5">          </text:span><text:span text:style-name="T6">hashtags</text:span><text:span text:style-name="T24">:</text:span><text:span text:style-name="T6"> </text:span><text:span text:style-name="T10">hashtags</text:span><text:span text:style-name="T6">,</text:span></text:p>
      <text:p text:style-name="P7"><text:span text:style-name="T5">          </text:span><text:span text:style-name="T6">video_url</text:span><text:span text:style-name="T24">:</text:span><text:span text:style-name="T6"> </text:span><text:span text:style-name="T10">item</text:span><text:span text:style-name="T6">.video_url </text:span><text:span text:style-name="T12">||</text:span><text:span text:style-name="T6"> </text:span><text:span text:style-name="T23">undefined</text:span><text:span text:style-name="T6">,</text:span></text:p>
      <text:p text:style-name="P7"><text:span text:style-name="T5">          </text:span><text:span text:style-name="T6">user_id</text:span><text:span text:style-name="T24">:</text:span><text:span text:style-name="T6"> </text:span><text:span text:style-name="T10">post</text:span><text:span text:style-name="T6">.user_id,</text:span></text:p>
      <text:p text:style-name="P8">        <text:span text:style-name="T15">};</text:span></text:p>
      <text:p text:style-name="P10"/>
      <text:p text:style-name="P7"><text:span text:style-name="T5">        </text:span><text:span text:style-name="T8">const</text:span><text:span text:style-name="T6"> </text:span><text:span text:style-name="T10">res</text:span><text:span text:style-name="T6"> </text:span><text:span text:style-name="T12">=</text:span><text:span text:style-name="T6"> </text:span><text:span text:style-name="T4">await</text:span><text:span text:style-name="T6"> </text:span><text:span text:style-name="T31">fetch</text:span><text:span text:style-name="T6">(</text:span><text:span text:style-name="T2">`</text:span><text:span text:style-name="T23">${</text:span><text:span text:style-name="T6">process</text:span><text:span text:style-name="T12">.</text:span><text:span text:style-name="T6">env</text:span><text:span text:style-name="T12">.</text:span><text:span text:style-name="T10">NEXT_PUBLIC_SITE_URL</text:span><text:span text:style-name="T12"> || </text:span><text:span text:style-name="T2">'http://localhost:3000'</text:span><text:span text:style-name="T23">}</text:span><text:span text:style-name="T2">/api/zernio/post`</text:span><text:span text:style-name="T6">, {</text:span></text:p>
      <text:p text:style-name="P7"><text:span text:style-name="T5">          </text:span><text:span text:style-name="T6">method</text:span><text:span text:style-name="T24">:</text:span><text:span text:style-name="T6"> </text:span><text:span text:style-name="T2">'POST'</text:span><text:span text:style-name="T6">,</text:span></text:p>
      <text:p text:style-name="P7"><text:span text:style-name="T5">          </text:span><text:span text:style-name="T6">headers</text:span><text:span text:style-name="T24">:</text:span><text:span text:style-name="T6"> { </text:span><text:span text:style-name="T2">'Content-Type'</text:span><text:span text:style-name="T24">:</text:span><text:span text:style-name="T6"> </text:span><text:span text:style-name="T2">'application/json'</text:span><text:span text:style-name="T6"> },</text:span></text:p>
      <text:p text:style-name="P7"><text:span text:style-name="T5">          </text:span><text:span text:style-name="T6">body</text:span><text:span text:style-name="T24">:</text:span><text:span text:style-name="T6"> </text:span><text:span text:style-name="T10">JSON</text:span><text:span text:style-name="T6">.</text:span><text:span text:style-name="T14">stringify</text:span><text:span text:style-name="T6">(</text:span><text:span text:style-name="T10">payload</text:span><text:span text:style-name="T6">),</text:span></text:p>
      <text:p text:style-name="P8">        <text:span text:style-name="T15">});</text:span></text:p>
      <text:p text:style-name="P10"/>
      <text:p text:style-name="P7"><text:span text:style-name="T5">        </text:span><text:span text:style-name="T8">const</text:span><text:span text:style-name="T6"> </text:span><text:span text:style-name="T10">json</text:span><text:span text:style-name="T6"> </text:span><text:span text:style-name="T12">=</text:span><text:span text:style-name="T6"> </text:span><text:span text:style-name="T4">await</text:span><text:span text:style-name="T6"> </text:span><text:span text:style-name="T10">res</text:span><text:span text:style-name="T6">.</text:span><text:span text:style-name="T14">json</text:span><text:span text:style-name="T6">();</text:span></text:p>
      <text:p text:style-name="P10"/>
      <text:p text:style-name="P7"><text:span text:style-name="T5">        </text:span><text:span text:style-name="T4">if</text:span><text:span text:style-name="T6"> (</text:span><text:span text:style-name="T10">json</text:span><text:span text:style-name="T6">.success) {</text:span></text:p>
      <text:p text:style-name="P7"><text:span text:style-name="T5">          </text:span><text:span text:style-name="T4">await</text:span><text:span text:style-name="T6"> </text:span><text:span text:style-name="T14">markScheduledPostAsPosted</text:span><text:span text:style-name="T6">(</text:span><text:span text:style-name="T10">post</text:span><text:span text:style-name="T6">.id);</text:span></text:p>
      <text:p text:style-name="P7"><text:span text:style-name="T5">          </text:span><text:span text:style-name="T10">console</text:span><text:span text:style-name="T6">.</text:span><text:span text:style-name="T14">log</text:span><text:span text:style-name="T6">(</text:span><text:span text:style-name="T2">`✅ Auto-posted scheduled post </text:span><text:span text:style-name="T23">${</text:span><text:span text:style-name="T10">post</text:span><text:span text:style-name="T12">.</text:span><text:span text:style-name="T6">id</text:span><text:span text:style-name="T23">}</text:span><text:span text:style-name="T2"> to </text:span><text:span text:style-name="T23">${</text:span><text:span text:style-name="T10">post</text:span><text:span text:style-name="T12">.</text:span><text:span text:style-name="T6">platform</text:span><text:span text:style-name="T23">}</text:span><text:span text:style-name="T2">`</text:span><text:span text:style-name="T6">);</text:span></text:p>
      <text:p text:style-name="P7"><text:span text:style-name="T5">        </text:span><text:span text:style-name="T6">} </text:span><text:span text:style-name="T4">else</text:span><text:span text:style-name="T6"> {</text:span></text:p>
      <text:p text:style-name="P7"><text:span text:style-name="T5">          </text:span><text:span text:style-name="T10">console</text:span><text:span text:style-name="T6">.</text:span><text:span text:style-name="T14">error</text:span><text:span text:style-name="T6">(</text:span><text:span text:style-name="T2">`Failed to post </text:span><text:span text:style-name="T23">${</text:span><text:span text:style-name="T10">post</text:span><text:span text:style-name="T12">.</text:span><text:span text:style-name="T6">id</text:span><text:span text:style-name="T23">}</text:span><text:span text:style-name="T2">:`</text:span><text:span text:style-name="T6">, </text:span><text:span text:style-name="T10">json</text:span><text:span text:style-name="T6">.error);</text:span></text:p>
      <text:p text:style-name="P8">        <text:span text:style-name="T15">}</text:span></text:p>
      <text:p text:style-name="P7"><text:span text:style-name="T5">      </text:span><text:span text:style-name="T6">} </text:span><text:span text:style-name="T4">catch</text:span><text:span text:style-name="T6"> (postErr) {</text:span></text:p>
      <text:p text:style-name="P7"><text:span text:style-name="T5">        </text:span><text:span text:style-name="T10">console</text:span><text:span text:style-name="T6">.</text:span><text:span text:style-name="T14">error</text:span><text:span text:style-name="T6">(</text:span><text:span text:style-name="T2">'Error processing scheduled post'</text:span><text:span text:style-name="T6">, postErr);</text:span></text:p>
      <text:p text:style-name="P8">      <text:span text:style-name="T15">}</text:span></text:p>
      <text:p text:style-name="P8">    <text:span text:style-name="T15">}</text:span></text:p>
      <text:p text:style-name="P10"/>
      <text:p text:style-name="P7"><text:span text:style-name="T5">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success</text:span><text:span text:style-name="T24">:</text:span><text:span text:style-name="T6"> </text:span><text:span text:style-name="T23">true</text:span><text:span text:style-name="T6">, processed</text:span><text:span text:style-name="T24">:</text:span><text:span text:style-name="T6"> </text:span><text:span text:style-name="T10">duePosts</text:span><text:span text:style-name="T6">?.</text:span><text:span text:style-name="T10">length</text:span><text:span text:style-name="T6"> </text:span><text:span text:style-name="T12">||</text:span><text:span text:style-name="T6"> </text:span><text:span text:style-name="T17">0</text:span><text:span text:style-name="T6"> });</text:span></text:p>
      <text:p text:style-name="P7"><text:span text:style-name="T5">  </text:span><text:span text:style-name="T6">} </text:span><text:span text:style-name="T4">catch</text:span><text:span text:style-name="T6"> (err) {</text:span></text:p>
      <text:p text:style-name="P7"><text:span text:style-name="T5">    </text:span><text:span text:style-name="T10">console</text:span><text:span text:style-name="T6">.</text:span><text:span text:style-name="T14">error</text:span><text:span text:style-name="T6">(</text:span><text:span text:style-name="T2">'Scheduler error:'</text:span><text:span text:style-name="T6">, err);</text:span></text:p>
      <text:p text:style-name="P7"><text:span text:style-name="T5">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</text:span><text:span text:style-name="T2">'Scheduler failed'</text:span><text:span text:style-name="T6"> }, { status</text:span><text:span text:style-name="T24">:</text:span><text:span text:style-name="T6"> </text:span><text:span text:style-name="T17">500</text:span><text:span text:style-name="T6"> });</text:span></text:p>
      <text:p text:style-name="P8">  <text:span text:style-name="T15">}</text:span></text:p>
      <text:p text:style-name="P9">}</text:p>
      <text:p text:style-name="P16"/>
      <text:p text:style-name="P16"/>
      <text:p text:style-name="P16"><text:soft-page-break/></text:p>
      <text:p text:style-name="P16">app/api/<text:span text:style-name="T32">zernio/</text:span>post/route.ts:</text:p>
      <text:p text:style-name="P16"/>
      <text:p text:style-name="P4"><text:span text:style-name="T3">import</text:span> <text:span text:style-name="T5">{ createClient }</text:span> <text:span text:style-name="T3">from</text:span> <text:span text:style-name="T1">'@supabase/supabase-js'</text:span>;</text:p>
      <text:p text:style-name="P2"><text:span text:style-name="T3">import</text:span> <text:span text:style-name="T5">{ NextRequest, NextResponse }</text:span> <text:span text:style-name="T3">from</text:span> <text:span text:style-name="T1">'next/server'</text:span>;</text:p>
      <text:p text:style-name="P10"/>
      <text:p text:style-name="P2"><text:span text:style-name="T7">const</text:span> <text:span text:style-name="T9">supabase</text:span> <text:span text:style-name="T11">=</text:span> <text:span text:style-name="T13">createClient</text:span>(</text:p>
      <text:p text:style-name="P7">  <text:span text:style-name="T6">process</text:span><text:span text:style-name="T15">.</text:span><text:span text:style-name="T6">env</text:span><text:span text:style-name="T15">.</text:span><text:span text:style-name="T10">NEXT_PUBLIC_SUPABASE_URL</text:span><text:span text:style-name="T12">!</text:span><text:span text:style-name="T15">,</text:span></text:p>
      <text:p text:style-name="P7">  <text:span text:style-name="T6">process</text:span><text:span text:style-name="T15">.</text:span><text:span text:style-name="T6">env</text:span><text:span text:style-name="T15">.</text:span><text:span text:style-name="T10">SUPABASE_SERVICE_ROLE_KEY</text:span><text:span text:style-name="T12">!</text:span></text:p>
      <text:p text:style-name="P2">);</text:p>
      <text:p text:style-name="P10"/>
      <text:p text:style-name="P2"><text:span text:style-name="T3">export</text:span> <text:span text:style-name="T22">async</text:span> <text:span text:style-name="T7">function</text:span> <text:span text:style-name="T13">POST</text:span>(<text:span text:style-name="T20">req</text:span><text:span text:style-name="T11">:</text:span> <text:span text:style-name="T18">NextRequest</text:span>) <text:span text:style-name="T5">{</text:span></text:p>
      <text:p text:style-name="P7"><text:span text:style-name="T5">  </text:span><text:span text:style-name="T4">try</text:span><text:span text:style-name="T6"> {</text:span></text:p>
      <text:p text:style-name="P7"><text:span text:style-name="T5">    </text:span><text:span text:style-name="T8">const</text:span><text:span text:style-name="T6"> { </text:span><text:span text:style-name="T10">platform_id</text:span><text:span text:style-name="T6">, </text:span><text:span text:style-name="T10">content</text:span><text:span text:style-name="T6">, </text:span><text:span text:style-name="T10">title</text:span><text:span text:style-name="T6">, </text:span><text:span text:style-name="T10">caption</text:span><text:span text:style-name="T6">, </text:span><text:span text:style-name="T10">hashtags</text:span><text:span text:style-name="T6">, </text:span><text:span text:style-name="T10">video_url</text:span><text:span text:style-name="T6">, </text:span><text:span text:style-name="T10">user_id</text:span><text:span text:style-name="T6">, </text:span><text:span text:style-name="T10">platform</text:span><text:span text:style-name="T6"> } </text:span><text:span text:style-name="T12">=</text:span><text:span text:style-name="T6"> </text:span><text:span text:style-name="T4">await</text:span><text:span text:style-name="T6"> </text:span><text:span text:style-name="T21">req</text:span><text:span text:style-name="T6">.</text:span><text:span text:style-name="T14">json</text:span><text:span text:style-name="T6">();</text:span></text:p>
      <text:p text:style-name="P10"/>
      <text:p text:style-name="P7"><text:span text:style-name="T5">    </text:span><text:span text:style-name="T4">if</text:span><text:span text:style-name="T6"> (</text:span><text:span text:style-name="T12">!</text:span><text:span text:style-name="T10">user_id</text:span><text:span text:style-name="T6"> </text:span><text:span text:style-name="T12">||</text:span><text:span text:style-name="T6"> </text:span><text:span text:style-name="T12">!</text:span><text:span text:style-name="T10">platform_id</text:span><text:span text:style-name="T6"> </text:span><text:span text:style-name="T12">||</text:span><text:span text:style-name="T6"> </text:span><text:span text:style-name="T12">!</text:span><text:span text:style-name="T10">content</text:span><text:span text:style-name="T6">) {</text:span></text:p>
      <text:p text:style-name="P7"><text:span text:style-name="T5">  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</text:span><text:span text:style-name="T2">'Missing required fields'</text:span><text:span text:style-name="T6"> }, { status</text:span><text:span text:style-name="T24">:</text:span><text:span text:style-name="T6"> </text:span><text:span text:style-name="T17">400</text:span><text:span text:style-name="T6"> });</text:span></text:p>
      <text:p text:style-name="P8">    <text:span text:style-name="T15">}</text:span></text:p>
      <text:p text:style-name="P10"/>
      <text:p text:style-name="P7"><text:span text:style-name="T5">    </text:span><text:span text:style-name="T8">const</text:span><text:span text:style-name="T6"> { data: </text:span><text:span text:style-name="T10">zernioData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</text:span></text:p>
      <text:p text:style-name="P7"><text:span text:style-name="T5">      </text:span><text:span text:style-name="T6">.</text:span><text:span text:style-name="T14">from</text:span><text:span text:style-name="T6">(</text:span><text:span text:style-name="T2">'user_zernio'</text:span><text:span text:style-name="T6">)</text:span></text:p>
      <text:p text:style-name="P7"><text:span text:style-name="T5">      </text:span><text:span text:style-name="T6">.</text:span><text:span text:style-name="T14">select</text:span><text:span text:style-name="T6">(</text:span><text:span text:style-name="T2">'api_key'</text:span><text:span text:style-name="T6">)</text:span></text:p>
      <text:p text:style-name="P7"><text:span text:style-name="T5">      </text:span><text:span text:style-name="T6">.</text:span><text:span text:style-name="T14">eq</text:span><text:span text:style-name="T6">(</text:span><text:span text:style-name="T2">'user_id'</text:span><text:span text:style-name="T6">, </text:span><text:span text:style-name="T10">user_id</text:span><text:span text:style-name="T6">)</text:span></text:p>
      <text:p text:style-name="P7"><text:span text:style-name="T5">      </text:span><text:span text:style-name="T6">.</text:span><text:span text:style-name="T14">single</text:span><text:span text:style-name="T6">();</text:span></text:p>
      <text:p text:style-name="P10"/>
      <text:p text:style-name="P7"><text:span text:style-name="T5">    </text:span><text:span text:style-name="T4">if</text:span><text:span text:style-name="T6"> (</text:span><text:span text:style-name="T12">!</text:span><text:span text:style-name="T10">zernioData</text:span><text:span text:style-name="T6">?.api_key) {</text:span></text:p>
      <text:p text:style-name="P7"><text:span text:style-name="T5">  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</text:span><text:span text:style-name="T2">'Zernio API key not found'</text:span><text:span text:style-name="T6"> }, { status</text:span><text:span text:style-name="T24">:</text:span><text:span text:style-name="T6"> </text:span><text:span text:style-name="T17">400</text:span><text:span text:style-name="T6"> });</text:span></text:p>
      <text:p text:style-name="P8">    <text:span text:style-name="T15">}</text:span></text:p>
      <text:p text:style-name="P10"/>
      <text:p text:style-name="P7"><text:span text:style-name="T5">    </text:span><text:span text:style-name="T25">// Correct Zernio payload format</text:span></text:p>
      <text:p text:style-name="P7"><text:span text:style-name="T5">    </text:span><text:span text:style-name="T8">const</text:span><text:span text:style-name="T6"> </text:span><text:span text:style-name="T10">postPayload</text:span><text:span text:style-name="T12">:</text:span><text:span text:style-name="T6"> </text:span><text:span text:style-name="T19">any</text:span><text:span text:style-name="T6"> </text:span><text:span text:style-name="T12">=</text:span><text:span text:style-name="T6"> {</text:span></text:p>
      <text:p text:style-name="P7"><text:span text:style-name="T5">      </text:span><text:span text:style-name="T6">content</text:span><text:span text:style-name="T24">:</text:span><text:span text:style-name="T6"> </text:span><text:span text:style-name="T10">caption</text:span><text:span text:style-name="T6"> </text:span><text:span text:style-name="T12">||</text:span><text:span text:style-name="T6"> </text:span><text:span text:style-name="T10">content</text:span><text:span text:style-name="T6">,</text:span></text:p>
      <text:p text:style-name="P7"><text:span text:style-name="T5">      </text:span><text:span text:style-name="T6">title</text:span><text:span text:style-name="T24">:</text:span><text:span text:style-name="T6"> </text:span><text:span text:style-name="T10">title</text:span><text:span text:style-name="T6"> </text:span><text:span text:style-name="T12">||</text:span><text:span text:style-name="T6"> </text:span><text:span text:style-name="T23">undefined</text:span><text:span text:style-name="T6">,</text:span></text:p>
      <text:p text:style-name="P7"><text:span text:style-name="T5">      </text:span><text:span text:style-name="T6">hashtags</text:span><text:span text:style-name="T24">:</text:span><text:span text:style-name="T6"> </text:span><text:span text:style-name="T10">hashtags</text:span><text:span text:style-name="T6"> </text:span><text:span text:style-name="T12">||</text:span><text:span text:style-name="T6"> </text:span><text:span text:style-name="T23">undefined</text:span><text:span text:style-name="T6">,</text:span></text:p>
      <text:p text:style-name="P7"><text:span text:style-name="T5">      </text:span><text:span text:style-name="T6">platforms</text:span><text:span text:style-name="T24">:</text:span><text:span text:style-name="T6"> [</text:span></text:p>
      <text:p text:style-name="P8">        <text:span text:style-name="T15">{</text:span></text:p>
      <text:p text:style-name="P7"><text:span text:style-name="T5">          </text:span><text:span text:style-name="T6">platform</text:span><text:span text:style-name="T24">:</text:span><text:span text:style-name="T6"> (</text:span><text:span text:style-name="T10">platform</text:span><text:span text:style-name="T6"> </text:span><text:span text:style-name="T12">||</text:span><text:span text:style-name="T6"> </text:span><text:span text:style-name="T2">'linkedin'</text:span><text:span text:style-name="T6">).</text:span><text:span text:style-name="T14">toLowerCase</text:span><text:span text:style-name="T6">(),</text:span></text:p>
      <text:p text:style-name="P7"><text:span text:style-name="T5">          </text:span><text:span text:style-name="T6">accountId</text:span><text:span text:style-name="T24">:</text:span><text:span text:style-name="T6"> </text:span><text:span text:style-name="T10">platform_id</text:span><text:span text:style-name="T6">,</text:span></text:p>
      <text:p text:style-name="P8">        <text:span text:style-name="T15">}</text:span></text:p>
      <text:p text:style-name="P8">      <text:span text:style-name="T15">],</text:span></text:p>
      <text:p text:style-name="P7"><text:span text:style-name="T5">      </text:span><text:span text:style-name="T6">publishNow</text:span><text:span text:style-name="T24">:</text:span><text:span text:style-name="T6"> </text:span><text:span text:style-name="T23">true</text:span><text:span text:style-name="T6">,   </text:span><text:span text:style-name="T25">// auto-publish</text:span></text:p>
      <text:p text:style-name="P8">    <text:span text:style-name="T15">};</text:span></text:p>
      <text:p text:style-name="P10"/>
      <text:p text:style-name="P7"><text:span text:style-name="T5">    </text:span><text:span text:style-name="T4">if</text:span><text:span text:style-name="T6"> (</text:span><text:span text:style-name="T10">video_url</text:span><text:span text:style-name="T6">) {</text:span></text:p>
      <text:p text:style-name="P7"><text:soft-page-break/><text:span text:style-name="T5">      </text:span><text:span text:style-name="T10">postPayload</text:span><text:span text:style-name="T6">.media_urls </text:span><text:span text:style-name="T12">=</text:span><text:span text:style-name="T6"> [</text:span><text:span text:style-name="T10">video_url</text:span><text:span text:style-name="T6">];</text:span></text:p>
      <text:p text:style-name="P8">    <text:span text:style-name="T15">}</text:span></text:p>
      <text:p text:style-name="P10"/>
      <text:p text:style-name="P7"><text:span text:style-name="T5">    </text:span><text:span text:style-name="T10">console</text:span><text:span text:style-name="T6">.</text:span><text:span text:style-name="T14">log</text:span><text:span text:style-name="T6">(</text:span><text:span text:style-name="T2">"📤 Sending to Zernio:"</text:span><text:span text:style-name="T6">, </text:span><text:span text:style-name="T10">JSON</text:span><text:span text:style-name="T6">.</text:span><text:span text:style-name="T14">stringify</text:span><text:span text:style-name="T6">(</text:span><text:span text:style-name="T10">postPayload</text:span><text:span text:style-name="T6">, </text:span><text:span text:style-name="T23">null</text:span><text:span text:style-name="T6">, </text:span><text:span text:style-name="T17">2</text:span><text:span text:style-name="T6">));</text:span></text:p>
      <text:p text:style-name="P10"/>
      <text:p text:style-name="P7"><text:span text:style-name="T5">    </text:span><text:span text:style-name="T8">const</text:span><text:span text:style-name="T6"> </text:span><text:span text:style-name="T10">response</text:span><text:span text:style-name="T6"> </text:span><text:span text:style-name="T12">=</text:span><text:span text:style-name="T6"> </text:span><text:span text:style-name="T4">await</text:span><text:span text:style-name="T6"> </text:span><text:span text:style-name="T31">fetch</text:span><text:span text:style-name="T6">(</text:span><text:span text:style-name="T2">'https://zernio.com/api/v1/posts'</text:span><text:span text:style-name="T6">, {</text:span></text:p>
      <text:p text:style-name="P7"><text:span text:style-name="T5">      </text:span><text:span text:style-name="T6">method</text:span><text:span text:style-name="T24">:</text:span><text:span text:style-name="T6"> </text:span><text:span text:style-name="T2">'POST'</text:span><text:span text:style-name="T6">,</text:span></text:p>
      <text:p text:style-name="P7"><text:span text:style-name="T5">      </text:span><text:span text:style-name="T6">headers</text:span><text:span text:style-name="T24">:</text:span><text:span text:style-name="T6"> {</text:span></text:p>
      <text:p text:style-name="P7"><text:span text:style-name="T5">        </text:span><text:span text:style-name="T2">'Authorization'</text:span><text:span text:style-name="T24">:</text:span><text:span text:style-name="T6"> </text:span><text:span text:style-name="T2">`Bearer </text:span><text:span text:style-name="T23">${</text:span><text:span text:style-name="T10">zernioData</text:span><text:span text:style-name="T12">.</text:span><text:span text:style-name="T6">api_key</text:span><text:span text:style-name="T23">}</text:span><text:span text:style-name="T2">`</text:span><text:span text:style-name="T6">,</text:span></text:p>
      <text:p text:style-name="P7"><text:span text:style-name="T5">        </text:span><text:span text:style-name="T2">'Content-Type'</text:span><text:span text:style-name="T24">:</text:span><text:span text:style-name="T6"> </text:span><text:span text:style-name="T2">'application/json'</text:span><text:span text:style-name="T6">,</text:span></text:p>
      <text:p text:style-name="P8">      <text:span text:style-name="T15">},</text:span></text:p>
      <text:p text:style-name="P7"><text:span text:style-name="T5">      </text:span><text:span text:style-name="T6">body</text:span><text:span text:style-name="T24">:</text:span><text:span text:style-name="T6"> </text:span><text:span text:style-name="T10">JSON</text:span><text:span text:style-name="T6">.</text:span><text:span text:style-name="T14">stringify</text:span><text:span text:style-name="T6">(</text:span><text:span text:style-name="T10">postPayload</text:span><text:span text:style-name="T6">),</text:span></text:p>
      <text:p text:style-name="P8">    <text:span text:style-name="T15">});</text:span></text:p>
      <text:p text:style-name="P10"/>
      <text:p text:style-name="P7"><text:span text:style-name="T5">    </text:span><text:span text:style-name="T8">const</text:span><text:span text:style-name="T6"> </text:span><text:span text:style-name="T10">result</text:span><text:span text:style-name="T6"> </text:span><text:span text:style-name="T12">=</text:span><text:span text:style-name="T6"> </text:span><text:span text:style-name="T4">await</text:span><text:span text:style-name="T6"> </text:span><text:span text:style-name="T10">response</text:span><text:span text:style-name="T6">.</text:span><text:span text:style-name="T14">json</text:span><text:span text:style-name="T6">();</text:span></text:p>
      <text:p text:style-name="P10"/>
      <text:p text:style-name="P7"><text:span text:style-name="T5">    </text:span><text:span text:style-name="T10">console</text:span><text:span text:style-name="T6">.</text:span><text:span text:style-name="T14">log</text:span><text:span text:style-name="T6">(</text:span><text:span text:style-name="T2">"📥 Zernio raw response:"</text:span><text:span text:style-name="T6">, </text:span><text:span text:style-name="T10">result</text:span><text:span text:style-name="T6">);</text:span></text:p>
      <text:p text:style-name="P10"/>
      <text:p text:style-name="P7"><text:span text:style-name="T5">    </text:span><text:span text:style-name="T4">if</text:span><text:span text:style-name="T6"> (</text:span><text:span text:style-name="T12">!</text:span><text:span text:style-name="T10">response</text:span><text:span text:style-name="T6">.</text:span><text:span text:style-name="T10">ok</text:span><text:span text:style-name="T6">) {</text:span></text:p>
      <text:p text:style-name="P7"><text:span text:style-name="T5">  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</text:span></text:p>
      <text:p text:style-name="P7"><text:span text:style-name="T5">        </text:span><text:span text:style-name="T6">error</text:span><text:span text:style-name="T24">:</text:span><text:span text:style-name="T6"> </text:span><text:span text:style-name="T10">result</text:span><text:span text:style-name="T6">.message </text:span><text:span text:style-name="T12">||</text:span><text:span text:style-name="T6"> </text:span><text:span text:style-name="T10">result</text:span><text:span text:style-name="T6">.error </text:span><text:span text:style-name="T12">||</text:span><text:span text:style-name="T6"> </text:span><text:span text:style-name="T2">'Failed to post'</text:span><text:span text:style-name="T6">,</text:span></text:p>
      <text:p text:style-name="P7"><text:span text:style-name="T5">        </text:span><text:span text:style-name="T6">details</text:span><text:span text:style-name="T24">:</text:span><text:span text:style-name="T6"> </text:span><text:span text:style-name="T10">result</text:span><text:span text:style-name="T6"> </text:span></text:p>
      <text:p text:style-name="P7"><text:span text:style-name="T5">      </text:span><text:span text:style-name="T6">}, { status</text:span><text:span text:style-name="T24">:</text:span><text:span text:style-name="T6"> </text:span><text:span text:style-name="T10">response</text:span><text:span text:style-name="T6">.</text:span><text:span text:style-name="T10">status</text:span><text:span text:style-name="T6"> });</text:span></text:p>
      <text:p text:style-name="P8">    <text:span text:style-name="T15">}</text:span></text:p>
      <text:p text:style-name="P10"/>
      <text:p text:style-name="P7"><text:span text:style-name="T5">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</text:span></text:p>
      <text:p text:style-name="P7"><text:span text:style-name="T5">      </text:span><text:span text:style-name="T6">success</text:span><text:span text:style-name="T24">:</text:span><text:span text:style-name="T6"> </text:span><text:span text:style-name="T23">true</text:span><text:span text:style-name="T6">,</text:span></text:p>
      <text:p text:style-name="P7"><text:span text:style-name="T5">      </text:span><text:span text:style-name="T6">message</text:span><text:span text:style-name="T24">:</text:span><text:span text:style-name="T6"> </text:span><text:span text:style-name="T2">`✅ Successfully posted to Zernio and published!`</text:span><text:span text:style-name="T6">,</text:span></text:p>
      <text:p text:style-name="P8">    <text:span text:style-name="T15">});</text:span></text:p>
      <text:p text:style-name="P7"><text:span text:style-name="T5">  </text:span><text:span text:style-name="T6">} </text:span><text:span text:style-name="T4">catch</text:span><text:span text:style-name="T6"> (err</text:span><text:span text:style-name="T12">:</text:span><text:span text:style-name="T6"> </text:span><text:span text:style-name="T19">any</text:span><text:span text:style-name="T6">) {</text:span></text:p>
      <text:p text:style-name="P7"><text:span text:style-name="T5">    </text:span><text:span text:style-name="T10">console</text:span><text:span text:style-name="T6">.</text:span><text:span text:style-name="T14">error</text:span><text:span text:style-name="T6">(</text:span><text:span text:style-name="T2">'Zernio post error:'</text:span><text:span text:style-name="T6">, err);</text:span></text:p>
      <text:p text:style-name="P7"><text:span text:style-name="T5">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err.message </text:span><text:span text:style-name="T12">||</text:span><text:span text:style-name="T6"> </text:span><text:span text:style-name="T2">'Internal server error'</text:span><text:span text:style-name="T6"> }, { status</text:span><text:span text:style-name="T24">:</text:span><text:span text:style-name="T6"> </text:span><text:span text:style-name="T17">500</text:span><text:span text:style-name="T6"> });</text:span></text:p>
      <text:p text:style-name="P8">  <text:span text:style-name="T15">}</text:span></text:p>
      <text:p text:style-name="P9">}</text:p>
      <text:p text:style-name="P16"/>
      <text:p text:style-name="P16"/>
      <text:p text:style-name="P18">app/calendar/page.tsx:</text:p>
      <text:p text:style-name="P18"/>
      <text:p text:style-name="P6"><text:span text:style-name="T1">'use client'</text:span>;</text:p>
      <text:p text:style-name="P10"/>
      <text:p text:style-name="P2"><text:span text:style-name="T3">import</text:span> <text:span text:style-name="T5">{ useState, useEffect }</text:span> <text:span text:style-name="T3">from</text:span> <text:span text:style-name="T1">'react'</text:span>;</text:p>
      <text:p text:style-name="P2"><text:span text:style-name="T3">import</text:span> <text:span text:style-name="T5">{ CalendarIcon, Clock, Filter, FileText, Video, Mic, Plus, Trash2, X, ChevronLeft, ChevronRight, CheckCircle, AlertTriangle, Home, Info, BarChart3, CreditCard }</text:span> <text:span text:style-name="T3">from</text:span> <text:span text:style-name="T1">'lucide-react'</text:span>;</text:p>
      <text:p text:style-name="P2"><text:soft-page-break/><text:span text:style-name="T3">import</text:span> <text:span text:style-name="T5">{ supabase, getUnifiedHistory, loadScheduledPosts, saveScheduledPost, deleteScheduledPost, getItemType }</text:span> <text:span text:style-name="T3">from</text:span> <text:span text:style-name="T1">'../supabase'</text:span>;</text:p>
      <text:p text:style-name="P2"><text:span text:style-name="T3">import</text:span> <text:span text:style-name="T5">{ format, formatDistanceToNow, startOfMonth, endOfMonth, eachDayOfInterval, isSameMonth, isSameDay, addMonths, subMonths }</text:span> <text:span text:style-name="T3">from</text:span> <text:span text:style-name="T1">'date-fns'</text:span>;</text:p>
      <text:p text:style-name="P10"/>
      <text:p text:style-name="P2"><text:span text:style-name="T7">const</text:span> <text:span text:style-name="T9">platformsList</text:span> <text:span text:style-name="T11">=</text:span> [</text:p>
      <text:p text:style-name="P7">  <text:span text:style-name="T15">{ </text:span><text:span text:style-name="T6">value</text:span><text:span text:style-name="T24">:</text:span><text:span text:style-name="T6"> </text:span><text:span text:style-name="T2">'TikTok'</text:span><text:span text:style-name="T15">, </text:span><text:span text:style-name="T6">label</text:span><text:span text:style-name="T24">:</text:span><text:span text:style-name="T6"> </text:span><text:span text:style-name="T2">'TikTok / Reels (9:16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YouTube'</text:span><text:span text:style-name="T15">, </text:span><text:span text:style-name="T6">label</text:span><text:span text:style-name="T24">:</text:span><text:span text:style-name="T6"> </text:span><text:span text:style-name="T2">'YouTube / Shorts (16:9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Instagram'</text:span><text:span text:style-name="T15">, </text:span><text:span text:style-name="T6">label</text:span><text:span text:style-name="T24">:</text:span><text:span text:style-name="T6"> </text:span><text:span text:style-name="T2">'Instagram (1:1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LinkedIn'</text:span><text:span text:style-name="T15">, </text:span><text:span text:style-name="T6">label</text:span><text:span text:style-name="T24">:</text:span><text:span text:style-name="T6"> </text:span><text:span text:style-name="T2">'LinkedIn (16:9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X'</text:span><text:span text:style-name="T15">, </text:span><text:span text:style-name="T6">label</text:span><text:span text:style-name="T24">:</text:span><text:span text:style-name="T6"> </text:span><text:span text:style-name="T2">'X (Twitter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Rumble'</text:span><text:span text:style-name="T15">, </text:span><text:span text:style-name="T6">label</text:span><text:span text:style-name="T24">:</text:span><text:span text:style-name="T6"> </text:span><text:span text:style-name="T2">'Rumble (16:9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Threads'</text:span><text:span text:style-name="T15">, </text:span><text:span text:style-name="T6">label</text:span><text:span text:style-name="T24">:</text:span><text:span text:style-name="T6"> </text:span><text:span text:style-name="T2">'Threads (1:1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ShortsReels'</text:span><text:span text:style-name="T15">, </text:span><text:span text:style-name="T6">label</text:span><text:span text:style-name="T24">:</text:span><text:span text:style-name="T6"> </text:span><text:span text:style-name="T2">'Shorts / Reels (9:16)'</text:span><text:span text:style-name="T6"> </text:span><text:span text:style-name="T15">},</text:span></text:p>
      <text:p text:style-name="P2">];</text:p>
      <text:p text:style-name="P10"/>
      <text:p text:style-name="P2"><text:span text:style-name="T3">export</text:span><text:span text:style-name="T20"> </text:span><text:span text:style-name="T3">default</text:span><text:span text:style-name="T20"> </text:span><text:span text:style-name="T7">function</text:span><text:span text:style-name="T20"> </text:span><text:span text:style-name="T13">CalendarPage</text:span><text:span text:style-name="T20">() </text:span><text:span text:style-name="T5">{</text:span></text:p>
      <text:p text:style-name="P7"><text:span text:style-name="T5">  </text:span><text:span text:style-name="T8">const</text:span><text:span text:style-name="T6"> [</text:span><text:span text:style-name="T10">user</text:span><text:span text:style-name="T6">, </text:span><text:span text:style-name="T14">setUser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contentItems</text:span><text:span text:style-name="T6">, </text:span><text:span text:style-name="T14">setContentItems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[]&gt;([]);</text:span></text:p>
      <text:p text:style-name="P7"><text:span text:style-name="T5">  </text:span><text:span text:style-name="T8">const</text:span><text:span text:style-name="T6"> [</text:span><text:span text:style-name="T10">scheduledPosts</text:span><text:span text:style-name="T6">, </text:span><text:span text:style-name="T14">setScheduledPosts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[]&gt;([]);</text:span></text:p>
      <text:p text:style-name="P7"><text:span text:style-name="T5">  </text:span><text:span text:style-name="T8">const</text:span><text:span text:style-name="T6"> [</text:span><text:span text:style-name="T10">activeTab</text:span><text:span text:style-name="T6">, </text:span><text:span text:style-name="T14">setActiveTab</text:span><text:span text:style-name="T6">] </text:span><text:span text:style-name="T12">=</text:span><text:span text:style-name="T6"> </text:span><text:span text:style-name="T14">useState</text:span><text:span text:style-name="T6">&lt;</text:span><text:span text:style-name="T2">'calendar'</text:span><text:span text:style-name="T6"> </text:span><text:span text:style-name="T12">|</text:span><text:span text:style-name="T6"> </text:span><text:span text:style-name="T2">'content'</text:span><text:span text:style-name="T6"> </text:span><text:span text:style-name="T12">|</text:span><text:span text:style-name="T6"> </text:span><text:span text:style-name="T2">'scheduled'</text:span><text:span text:style-name="T6">&gt;(</text:span><text:span text:style-name="T2">'calendar'</text:span><text:span text:style-name="T6">);</text:span></text:p>
      <text:p text:style-name="P7"><text:span text:style-name="T5">  </text:span><text:span text:style-name="T8">const</text:span><text:span text:style-name="T6"> [</text:span><text:span text:style-name="T10">activeFilter</text:span><text:span text:style-name="T6">, </text:span><text:span text:style-name="T14">setActiveFilter</text:span><text:span text:style-name="T6">] </text:span><text:span text:style-name="T12">=</text:span><text:span text:style-name="T6"> </text:span><text:span text:style-name="T14">useState</text:span><text:span text:style-name="T6">&lt;</text:span><text:span text:style-name="T2">'all'</text:span><text:span text:style-name="T6"> </text:span><text:span text:style-name="T12">|</text:span><text:span text:style-name="T6"> </text:span><text:span text:style-name="T2">'text'</text:span><text:span text:style-name="T6"> </text:span><text:span text:style-name="T12">|</text:span><text:span text:style-name="T6"> </text:span><text:span text:style-name="T2">'video'</text:span><text:span text:style-name="T6"> </text:span><text:span text:style-name="T12">|</text:span><text:span text:style-name="T6"> </text:span><text:span text:style-name="T2">'audio'</text:span><text:span text:style-name="T6">&gt;(</text:span><text:span text:style-name="T2">'all'</text:span><text:span text:style-name="T6">);</text:span></text:p>
      <text:p text:style-name="P7"><text:span text:style-name="T5">  </text:span><text:span text:style-name="T8">const</text:span><text:span text:style-name="T6"> [</text:span><text:span text:style-name="T10">showScheduleModal</text:span><text:span text:style-name="T6">, </text:span><text:span text:style-name="T14">setShowScheduleModal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selectedItem</text:span><text:span text:style-name="T6">, </text:span><text:span text:style-name="T14">setSelectedItem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selectedPlatform</text:span><text:span text:style-name="T6">, </text:span><text:span text:style-name="T14">setSelectedPlatform</text:span><text:span text:style-name="T6">] </text:span><text:span text:style-name="T12">=</text:span><text:span text:style-name="T6"> </text:span><text:span text:style-name="T14">useState</text:span><text:span text:style-name="T6">(</text:span><text:span text:style-name="T2">''</text:span><text:span text:style-name="T6">);</text:span></text:p>
      <text:p text:style-name="P7"><text:span text:style-name="T5">  </text:span><text:span text:style-name="T8">const</text:span><text:span text:style-name="T6"> [</text:span><text:span text:style-name="T10">scheduledAt</text:span><text:span text:style-name="T6">, </text:span><text:span text:style-name="T14">setScheduledAt</text:span><text:span text:style-name="T6">] </text:span><text:span text:style-name="T12">=</text:span><text:span text:style-name="T6"> </text:span><text:span text:style-name="T14">useState</text:span><text:span text:style-name="T6">(</text:span><text:span text:style-name="T2">''</text:span><text:span text:style-name="T6">);</text:span></text:p>
      <text:p text:style-name="P7"><text:span text:style-name="T5">  </text:span><text:span text:style-name="T8">const</text:span><text:span text:style-name="T6"> [</text:span><text:span text:style-name="T10">toast</text:span><text:span text:style-name="T6">, </text:span><text:span text:style-name="T14">setToast</text:span><text:span text:style-name="T6">] </text:span><text:span text:style-name="T12">=</text:span><text:span text:style-name="T6"> </text:span><text:span text:style-name="T14">useState</text:span><text:span text:style-name="T6">&lt;{ message</text:span><text:span text:style-name="T12">:</text:span><text:span text:style-name="T6"> </text:span><text:span text:style-name="T19">string</text:span><text:span text:style-name="T6">; error</text:span><text:span text:style-name="T12">?:</text:span><text:span text:style-name="T6"> </text:span><text:span text:style-name="T19">boolean</text:span><text:span text:style-name="T6"> }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currentMonth</text:span><text:span text:style-name="T6">, </text:span><text:span text:style-name="T14">setCurrentMonth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new</text:span><text:span text:style-name="T6"> </text:span><text:span text:style-name="T19">Date</text:span><text:span text:style-name="T6">());</text:span></text:p>
      <text:p text:style-name="P10"/>
      <text:p text:style-name="P7"><text:span text:style-name="T5">  </text:span><text:span text:style-name="T14">useEffect</text:span><text:span text:style-name="T6">(() </text:span><text:span text:style-name="T8">=&gt;</text:span><text:span text:style-name="T6"> {</text:span></text:p>
      <text:p text:style-name="P7"><text:span text:style-name="T5">    </text:span><text:span text:style-name="T10">supabase</text:span><text:span text:style-name="T6">.auth.</text:span><text:span text:style-name="T14">getSession</text:span><text:span text:style-name="T6">().</text:span><text:span text:style-name="T14">then</text:span><text:span text:style-name="T6">(({ data: { </text:span><text:span text:style-name="T21">session</text:span><text:span text:style-name="T6"> } }) </text:span><text:span text:style-name="T8">=&gt;</text:span><text:span text:style-name="T6"> </text:span><text:span text:style-name="T14">setUser</text:span><text:span text:style-name="T6">(</text:span><text:span text:style-name="T21">session</text:span><text:span text:style-name="T6">?.user </text:span><text:span text:style-name="T12">??</text:span><text:span text:style-name="T6"> </text:span><text:span text:style-name="T23">null</text:span><text:span text:style-name="T6">));</text:span></text:p>
      <text:p text:style-name="P7"><text:span text:style-name="T5">    </text:span><text:span text:style-name="T8">const</text:span><text:span text:style-name="T6"> { data: { </text:span><text:span text:style-name="T10">subscription</text:span><text:span text:style-name="T6"> } } </text:span><text:span text:style-name="T12">=</text:span><text:span text:style-name="T6"> </text:span><text:span text:style-name="T10">supabase</text:span><text:span text:style-name="T6">.auth.</text:span><text:span text:style-name="T14">onAuthStateChange</text:span><text:span text:style-name="T6">((</text:span><text:span text:style-name="T21">_event</text:span><text:span text:style-name="T6">, </text:span><text:span text:style-name="T21">session</text:span><text:span text:style-name="T6">) </text:span><text:span text:style-name="T8">=&gt;</text:span><text:span text:style-name="T6"> </text:span><text:span text:style-name="T14">setUser</text:span><text:span text:style-name="T6">(</text:span><text:span text:style-name="T21">session</text:span><text:span text:style-name="T6">?.user </text:span><text:span text:style-name="T12">??</text:span><text:span text:style-name="T6"> </text:span><text:span text:style-name="T23">null</text:span><text:span text:style-name="T6">));</text:span></text:p>
      <text:p text:style-name="P7"><text:span text:style-name="T5">    </text:span><text:span text:style-name="T4">return</text:span><text:span text:style-name="T6"> () </text:span><text:span text:style-name="T8">=&gt;</text:span><text:span text:style-name="T6"> </text:span><text:span text:style-name="T10">subscription</text:span><text:span text:style-name="T6">.</text:span><text:span text:style-name="T14">unsubscribe</text:span><text:span text:style-name="T6">();</text:span></text:p>
      <text:p text:style-name="P8">  <text:span text:style-name="T15">}, []);</text:span></text:p>
      <text:p text:style-name="P10"/>
      <text:p text:style-name="P7"><text:span text:style-name="T5">  </text:span><text:span text:style-name="T14">useEffect</text:span><text:span text:style-name="T6">(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0">user</text:span><text:span text:style-name="T6">) {</text:span></text:p>
      <text:p text:style-name="P7"><text:span text:style-name="T5">      </text:span><text:span text:style-name="T14">loadContent</text:span><text:span text:style-name="T6">();</text:span></text:p>
      <text:p text:style-name="P7"><text:span text:style-name="T5">      </text:span><text:span text:style-name="T14">loadScheduled</text:span><text:span text:style-name="T6">();</text:span></text:p>
      <text:p text:style-name="P8">    <text:span text:style-name="T15">}</text:span></text:p>
      <text:p text:style-name="P8">  <text:span text:style-name="T15">}, [user]);</text:span></text:p>
      <text:p text:style-name="P10"/>
      <text:p text:style-name="P7"><text:soft-page-break/><text:span text:style-name="T5">  </text:span><text:span text:style-name="T8">const</text:span><text:span text:style-name="T6"> </text:span><text:span text:style-name="T14">loadContent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8">const</text:span><text:span text:style-name="T6"> </text:span><text:span text:style-name="T10">items</text:span><text:span text:style-name="T6"> </text:span><text:span text:style-name="T12">=</text:span><text:span text:style-name="T6"> </text:span><text:span text:style-name="T4">await</text:span><text:span text:style-name="T6"> </text:span><text:span text:style-name="T14">getUnifiedHistory</text:span><text:span text:style-name="T6">(user.id);</text:span></text:p>
      <text:p text:style-name="P7"><text:span text:style-name="T5">    </text:span><text:span text:style-name="T14">setContentItems</text:span><text:span text:style-name="T6">(items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loadScheduled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8">const</text:span><text:span text:style-name="T6"> </text:span><text:span text:style-name="T10">posts</text:span><text:span text:style-name="T6"> </text:span><text:span text:style-name="T12">=</text:span><text:span text:style-name="T6"> </text:span><text:span text:style-name="T4">await</text:span><text:span text:style-name="T6"> </text:span><text:span text:style-name="T14">loadScheduledPosts</text:span><text:span text:style-name="T6">(user.id);</text:span></text:p>
      <text:p text:style-name="P7"><text:span text:style-name="T5">    </text:span><text:span text:style-name="T14">setScheduledPosts</text:span><text:span text:style-name="T6">(posts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showToast</text:span><text:span text:style-name="T6"> </text:span><text:span text:style-name="T12">=</text:span><text:span text:style-name="T6"> (</text:span><text:span text:style-name="T21">message</text:span><text:span text:style-name="T12">:</text:span><text:span text:style-name="T6"> </text:span><text:span text:style-name="T19">string</text:span><text:span text:style-name="T6">, </text:span><text:span text:style-name="T21">error</text:span><text:span text:style-name="T6"> </text:span><text:span text:style-name="T12">=</text:span><text:span text:style-name="T6"> </text:span><text:span text:style-name="T23">false</text:span><text:span text:style-name="T6">) </text:span><text:span text:style-name="T8">=&gt;</text:span><text:span text:style-name="T6"> {</text:span></text:p>
      <text:p text:style-name="P7"><text:span text:style-name="T5">    </text:span><text:span text:style-name="T14">setToast</text:span><text:span text:style-name="T6">({ message, error });</text:span></text:p>
      <text:p text:style-name="P7"><text:span text:style-name="T5">    </text:span><text:span text:style-name="T14">setTimeout</text:span><text:span text:style-name="T6">(() </text:span><text:span text:style-name="T8">=&gt;</text:span><text:span text:style-name="T6"> </text:span><text:span text:style-name="T14">setToast</text:span><text:span text:style-name="T6">(</text:span><text:span text:style-name="T23">null</text:span><text:span text:style-name="T6">), </text:span><text:span text:style-name="T17">4000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handleSchedule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selectedItem </text:span><text:span text:style-name="T12">||</text:span><text:span text:style-name="T6"> </text:span><text:span text:style-name="T12">!</text:span><text:span text:style-name="T6">selectedPlatform </text:span><text:span text:style-name="T12">||</text:span><text:span text:style-name="T6"> </text:span><text:span text:style-name="T12">!</text:span><text:span text:style-name="T6">scheduledAt) </text:span><text:span text:style-name="T4">return</text:span><text:span text:style-name="T6">;</text:span></text:p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scheduledDate</text:span><text:span text:style-name="T6"> </text:span><text:span text:style-name="T12">=</text:span><text:span text:style-name="T6"> </text:span><text:span text:style-name="T23">new</text:span><text:span text:style-name="T6"> </text:span><text:span text:style-name="T14">Date</text:span><text:span text:style-name="T6">(scheduledAt);</text:span></text:p>
      <text:p text:style-name="P7"><text:span text:style-name="T5">      </text:span><text:span text:style-name="T4">await</text:span><text:span text:style-name="T6"> </text:span><text:span text:style-name="T14">saveScheduledPost</text:span><text:span text:style-name="T6">({</text:span></text:p>
      <text:p text:style-name="P7"><text:span text:style-name="T5">        </text:span><text:span text:style-name="T24">user_id:</text:span><text:span text:style-name="T6"> user.id,</text:span></text:p>
      <text:p text:style-name="P7"><text:span text:style-name="T5">        </text:span><text:span text:style-name="T24">history_item:</text:span><text:span text:style-name="T6"> selectedItem,</text:span></text:p>
      <text:p text:style-name="P7"><text:span text:style-name="T5">        </text:span><text:span text:style-name="T24">scheduled_at:</text:span><text:span text:style-name="T6"> scheduledDate.</text:span><text:span text:style-name="T14">toISOString</text:span><text:span text:style-name="T6">(),</text:span></text:p>
      <text:p text:style-name="P7"><text:span text:style-name="T5">        </text:span><text:span text:style-name="T24">platform:</text:span><text:span text:style-name="T6"> selectedPlatform,</text:span></text:p>
      <text:p text:style-name="P8">      <text:span text:style-name="T15">});</text:span></text:p>
      <text:p text:style-name="P7"><text:span text:style-name="T5">      </text:span><text:span text:style-name="T14">showToast</text:span><text:span text:style-name="T6">(</text:span><text:span text:style-name="T2">`✅ Scheduled for </text:span><text:span text:style-name="T23">${</text:span><text:span text:style-name="T14">format</text:span><text:span text:style-name="T12">(</text:span><text:span text:style-name="T6">scheduledDate</text:span><text:span text:style-name="T12">, </text:span><text:span text:style-name="T2">'MMM dd, yyyy HH:mm'</text:span><text:span text:style-name="T12">)</text:span><text:span text:style-name="T23">}</text:span><text:span text:style-name="T2">`</text:span><text:span text:style-name="T6">);</text:span></text:p>
      <text:p text:style-name="P7"><text:span text:style-name="T5">      </text:span><text:span text:style-name="T14">setShowScheduleModal</text:span><text:span text:style-name="T6">(</text:span><text:span text:style-name="T23">false</text:span><text:span text:style-name="T6">);</text:span></text:p>
      <text:p text:style-name="P7"><text:span text:style-name="T5">      </text:span><text:span text:style-name="T14">setSelectedItem</text:span><text:span text:style-name="T6">(</text:span><text:span text:style-name="T23">null</text:span><text:span text:style-name="T6">);</text:span></text:p>
      <text:p text:style-name="P7"><text:span text:style-name="T5">      </text:span><text:span text:style-name="T14">setSelectedPlatform</text:span><text:span text:style-name="T6">(</text:span><text:span text:style-name="T2">''</text:span><text:span text:style-name="T6">);</text:span></text:p>
      <text:p text:style-name="P7"><text:span text:style-name="T5">      </text:span><text:span text:style-name="T14">setScheduledAt</text:span><text:span text:style-name="T6">(</text:span><text:span text:style-name="T2">''</text:span><text:span text:style-name="T6">);</text:span></text:p>
      <text:p text:style-name="P7"><text:span text:style-name="T5">      </text:span><text:span text:style-name="T4">await</text:span><text:span text:style-name="T6"> </text:span><text:span text:style-name="T14">loadScheduled</text:span><text:span text:style-name="T6">();</text:span></text:p>
      <text:p text:style-name="P7"><text:span text:style-name="T5">      </text:span><text:span text:style-name="T14">setActiveTab</text:span><text:span text:style-name="T6">(</text:span><text:span text:style-name="T2">'scheduled'</text:span><text:span text:style-name="T6">);</text:span></text:p>
      <text:p text:style-name="P7"><text:span text:style-name="T5">    </text:span><text:span text:style-name="T6">} </text:span><text:span text:style-name="T4">catch</text:span><text:span text:style-name="T6"> (e) {</text:span></text:p>
      <text:p text:style-name="P7"><text:span text:style-name="T5">      </text:span><text:span text:style-name="T14">showToast</text:span><text:span text:style-name="T6">(</text:span><text:span text:style-name="T2">'Failed to schedule post'</text:span><text:span text:style-name="T6">, </text:span><text:span text:style-name="T23">true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0">filteredContent</text:span><text:span text:style-name="T6"> </text:span><text:span text:style-name="T12">=</text:span><text:span text:style-name="T6"> activeFilter </text:span><text:span text:style-name="T12">===</text:span><text:span text:style-name="T6"> </text:span><text:span text:style-name="T2">'all'</text:span><text:span text:style-name="T6"> </text:span></text:p>
      <text:p text:style-name="P7"><text:span text:style-name="T5">    </text:span><text:span text:style-name="T12">?</text:span><text:span text:style-name="T6"> contentItems </text:span></text:p>
      <text:p text:style-name="P7"><text:span text:style-name="T5">    </text:span><text:span text:style-name="T12">:</text:span><text:span text:style-name="T6"> contentItems.</text:span><text:span text:style-name="T14">filter</text:span><text:span text:style-name="T6">(</text:span><text:span text:style-name="T21">item</text:span><text:span text:style-name="T6"> </text:span><text:span text:style-name="T8">=&gt;</text:span><text:span text:style-name="T6"> item.type </text:span><text:span text:style-name="T12">===</text:span><text:span text:style-name="T6"> activeFilter);</text:span></text:p>
      <text:p text:style-name="P10"/>
      <text:p text:style-name="P7"><text:span text:style-name="T5">  </text:span><text:span text:style-name="T8">const</text:span><text:span text:style-name="T6"> </text:span><text:span text:style-name="T14">getTypeIcon</text:span><text:span text:style-name="T6"> </text:span><text:span text:style-name="T12">=</text:span><text:span text:style-name="T6"> (</text:span><text:span text:style-name="T21">type</text:span><text:span text:style-name="T12">:</text:span><text:span text:style-name="T6"> </text:span><text:span text:style-name="T19">string</text:span><text:span text:style-name="T6">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type </text:span><text:span text:style-name="T12">===</text:span><text:span text:style-name="T6"> </text:span><text:span text:style-name="T2">'text'</text:span><text:span text:style-name="T6">) </text:span><text:span text:style-name="T4">return</text:span><text:span text:style-name="T6"> </text:span><text:span text:style-name="T27">&lt;</text:span><text:span text:style-name="T28">FileText</text:span><text:span text:style-name="T6"> </text:span><text:span text:style-name="T24">className</text:span><text:span text:style-name="T12">=</text:span><text:span text:style-name="T2">"w-5 h-5 text-blue-400"</text:span><text:span text:style-name="T6"> </text:span><text:span text:style-name="T27">/&gt;</text:span><text:span text:style-name="T6">;</text:span></text:p>
      <text:p text:style-name="P7"><text:span text:style-name="T5">    </text:span><text:span text:style-name="T4">if</text:span><text:span text:style-name="T6"> (type </text:span><text:span text:style-name="T12">===</text:span><text:span text:style-name="T6"> </text:span><text:span text:style-name="T2">'audio'</text:span><text:span text:style-name="T6">) </text:span><text:span text:style-name="T4">return</text:span><text:span text:style-name="T6">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2">"w-5 h-5 text-purple-400"</text:span><text:span text:style-name="T6"> </text:span><text:span text:style-name="T27">/&gt;</text:span><text:span text:style-name="T6">;</text:span></text:p>
      <text:p text:style-name="P7"><text:span text:style-name="T5">    </text:span><text:span text:style-name="T4">return</text:span><text:span text:style-name="T6"> </text:span><text:span text:style-name="T27">&lt;</text:span><text:span text:style-name="T28">Video</text:span><text:span text:style-name="T6"> </text:span><text:span text:style-name="T24">className</text:span><text:span text:style-name="T12">=</text:span><text:span text:style-name="T2">"w-5 h-5 text-green-400"</text:span><text:span text:style-name="T6"> </text:span><text:span text:style-name="T27">/&gt;</text:span><text:span text:style-name="T6">;</text:span></text:p>
      <text:p text:style-name="P8">  <text:span text:style-name="T15">};</text:span></text:p>
      <text:p text:style-name="P10"/>
      <text:p text:style-name="P7"><text:soft-page-break/><text:span text:style-name="T5">  </text:span><text:span text:style-name="T25">// Real monthly calendar grid</text:span></text:p>
      <text:p text:style-name="P7"><text:span text:style-name="T5">  </text:span><text:span text:style-name="T8">const</text:span><text:span text:style-name="T6"> </text:span><text:span text:style-name="T10">monthStart</text:span><text:span text:style-name="T6"> </text:span><text:span text:style-name="T12">=</text:span><text:span text:style-name="T6"> </text:span><text:span text:style-name="T14">startOfMonth</text:span><text:span text:style-name="T6">(currentMonth);</text:span></text:p>
      <text:p text:style-name="P7"><text:span text:style-name="T5">  </text:span><text:span text:style-name="T8">const</text:span><text:span text:style-name="T6"> </text:span><text:span text:style-name="T10">monthEnd</text:span><text:span text:style-name="T6"> </text:span><text:span text:style-name="T12">=</text:span><text:span text:style-name="T6"> </text:span><text:span text:style-name="T14">endOfMonth</text:span><text:span text:style-name="T6">(currentMonth);</text:span></text:p>
      <text:p text:style-name="P7"><text:span text:style-name="T5">  </text:span><text:span text:style-name="T8">const</text:span><text:span text:style-name="T6"> </text:span><text:span text:style-name="T10">days</text:span><text:span text:style-name="T6"> </text:span><text:span text:style-name="T12">=</text:span><text:span text:style-name="T6"> </text:span><text:span text:style-name="T14">eachDayOfInterval</text:span><text:span text:style-name="T6">({ </text:span><text:span text:style-name="T24">start:</text:span><text:span text:style-name="T6"> monthStart, </text:span><text:span text:style-name="T24">end:</text:span><text:span text:style-name="T6"> monthEnd });</text:span></text:p>
      <text:p text:style-name="P10"/>
      <text:p text:style-name="P7"><text:span text:style-name="T5">  </text:span><text:span text:style-name="T8">const</text:span><text:span text:style-name="T6"> </text:span><text:span text:style-name="T14">hasScheduledOnDay</text:span><text:span text:style-name="T6"> </text:span><text:span text:style-name="T12">=</text:span><text:span text:style-name="T6"> (</text:span><text:span text:style-name="T21">day</text:span><text:span text:style-name="T12">:</text:span><text:span text:style-name="T6"> </text:span><text:span text:style-name="T19">Date</text:span><text:span text:style-name="T6">) </text:span><text:span text:style-name="T8">=&gt;</text:span><text:span text:style-name="T6"> {</text:span></text:p>
      <text:p text:style-name="P7"><text:span text:style-name="T5">    </text:span><text:span text:style-name="T4">return</text:span><text:span text:style-name="T6"> scheduledPosts.</text:span><text:span text:style-name="T14">some</text:span><text:span text:style-name="T6">(</text:span><text:span text:style-name="T21">post</text:span><text:span text:style-name="T6"> </text:span><text:span text:style-name="T8">=&gt;</text:span><text:span text:style-name="T6"> </text:span><text:span text:style-name="T14">isSameDay</text:span><text:span text:style-name="T6">(</text:span><text:span text:style-name="T23">new</text:span><text:span text:style-name="T6"> </text:span><text:span text:style-name="T14">Date</text:span><text:span text:style-name="T6">(post.scheduled_at), day));</text:span></text:p>
      <text:p text:style-name="P8">  <text:span text:style-name="T15">};</text:span></text:p>
      <text:p text:style-name="P10"/>
      <text:p text:style-name="P7"><text:span text:style-name="T5">  </text:span><text:span text:style-name="T4">return</text:span><text:span text:style-name="T6"> (</text:span></text:p>
      <text:p text:style-name="P7"><text:span text:style-name="T5">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in-h-screen bg-zinc-950 text-white"</text:span><text:span text:style-name="T27">&gt;</text:span></text:p>
      <text:p text:style-name="P7"><text:span text:style-name="T5">      </text:span><text:span text:style-name="T8">{</text:span><text:span text:style-name="T25">/* FULL TOP NAV BAR - matches main site */</text:span><text:span text:style-name="T8">}</text:span></text:p>
      <text:p text:style-name="P7"><text:span text:style-name="T5">      </text:span><text:span text:style-name="T27">&lt;</text:span><text:span text:style-name="T28">nav</text:span><text:span text:style-name="T6"> </text:span><text:span text:style-name="T24">className</text:span><text:span text:style-name="T12">=</text:span><text:span text:style-name="T2">"border-b border-zinc-800 bg-zinc-950"</text:span><text:span text:style-name="T27">&gt;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ax-w-7xl mx-auto px-8 py-4 flex items-center justify-between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gap-8"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gap-2"</text:span><text:span text:style-name="T27">&gt;</text:span></text:p>
      <text:p text:style-name="P7"><text:span text:style-name="T5">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2xl"</text:span><text:span text:style-name="T27">&gt;</text:span><text:span text:style-name="T6">✦</text:span><text:span text:style-name="T27">&lt;/</text:span><text:span text:style-name="T28">span</text:span><text:span text:style-name="T27">&gt;</text:span></text:p>
      <text:p text:style-name="P7"><text:span text:style-name="T5">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font-bold text-2xl tracking-tighter"</text:span><text:span text:style-name="T27">&gt;</text:span><text:span text:style-name="T6">ContentAmplifier</text:span><text:span text:style-name="T27">&lt;/</text:span><text:span text:style-name="T28">span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</text:span><text:span text:style-name="T28">a</text:span><text:span text:style-name="T6"> </text:span><text:span text:style-name="T24">href</text:span><text:span text:style-name="T12">=</text:span><text:span text:style-name="T2">"/"</text:span><text:span text:style-name="T6"> </text:span><text:span text:style-name="T24">className</text:span><text:span text:style-name="T12">=</text:span><text:span text:style-name="T2">"flex items-center gap-2 text-zinc-400 hover:text-white transition-colors"</text:span><text:span text:style-name="T27">&gt;&lt;</text:span><text:span text:style-name="T28">Home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Home</text:span><text:span text:style-name="T27">&lt;/</text:span><text:span text:style-name="T28">a</text:span><text:span text:style-name="T27">&gt;</text:span></text:p>
      <text:p text:style-name="P7"><text:span text:style-name="T5">            </text:span><text:span text:style-name="T27">&lt;</text:span><text:span text:style-name="T28">a</text:span><text:span text:style-name="T6"> </text:span><text:span text:style-name="T24">href</text:span><text:span text:style-name="T12">=</text:span><text:span text:style-name="T2">"/why-zernio"</text:span><text:span text:style-name="T6"> </text:span><text:span text:style-name="T24">className</text:span><text:span text:style-name="T12">=</text:span><text:span text:style-name="T2">"flex items-center gap-2 text-zinc-400 hover:text-white transition-colors"</text:span><text:span text:style-name="T27">&gt;&lt;</text:span><text:span text:style-name="T28">Info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Why Amplify with Zernio</text:span><text:span text:style-name="T27">&lt;/</text:span><text:span text:style-name="T28">a</text:span><text:span text:style-name="T27">&gt;</text:span></text:p>
      <text:p text:style-name="P7"><text:span text:style-name="T5">            </text:span><text:span text:style-name="T27">&lt;</text:span><text:span text:style-name="T28">a</text:span><text:span text:style-name="T6"> </text:span><text:span text:style-name="T24">href</text:span><text:span text:style-name="T12">=</text:span><text:span text:style-name="T2">"/dashboard"</text:span><text:span text:style-name="T6"> </text:span><text:span text:style-name="T24">className</text:span><text:span text:style-name="T12">=</text:span><text:span text:style-name="T2">"flex items-center gap-2 text-zinc-400 hover:text-white transition-colors"</text:span><text:span text:style-name="T27">&gt;&lt;</text:span><text:span text:style-name="T28">BarChart3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Dashboard</text:span><text:span text:style-name="T27">&lt;/</text:span><text:span text:style-name="T28">a</text:span><text:span text:style-name="T27">&gt;</text:span></text:p>
      <text:p text:style-name="P7"><text:span text:style-name="T5">            </text:span><text:span text:style-name="T27">&lt;</text:span><text:span text:style-name="T28">a</text:span><text:span text:style-name="T6"> </text:span><text:span text:style-name="T24">href</text:span><text:span text:style-name="T12">=</text:span><text:span text:style-name="T2">"/pricing"</text:span><text:span text:style-name="T6"> </text:span><text:span text:style-name="T24">className</text:span><text:span text:style-name="T12">=</text:span><text:span text:style-name="T2">"flex items-center gap-2 text-zinc-400 hover:text-white transition-colors"</text:span><text:span text:style-name="T27">&gt;&lt;</text:span><text:span text:style-name="T28">CreditCard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Pricing</text:span><text:span text:style-name="T27">&lt;/</text:span><text:span text:style-name="T28">a</text:span><text:span text:style-name="T27">&gt;</text:span></text:p>
      <text:p text:style-name="P7"><text:span text:style-name="T5">            </text:span><text:span text:style-name="T27">&lt;</text:span><text:span text:style-name="T28">a</text:span><text:span text:style-name="T6"> </text:span><text:span text:style-name="T24">href</text:span><text:span text:style-name="T12">=</text:span><text:span text:style-name="T2">"/calendar"</text:span><text:span text:style-name="T6"> </text:span><text:span text:style-name="T24">className</text:span><text:span text:style-name="T12">=</text:span><text:span text:style-name="T2">"flex items-center gap-2 text-blue-400 font-medium"</text:span><text:span text:style-name="T27">&gt;&lt;</text:span><text:span text:style-name="T28">CalendarIcon</text:span><text:span text:style-name="T6"> </text:span><text:span text:style-name="T24">className</text:span><text:span text:style-name="T12">=</text:span><text:span text:style-name="T2">"w-5 h-5 text-blue-400"</text:span><text:span text:style-name="T6"> </text:span><text:span text:style-name="T27">/&gt;</text:span><text:span text:style-name="T6"> Calendar</text:span><text:span text:style-name="T27">&lt;/</text:span><text:span text:style-name="T28">a</text:span><text:span text:style-name="T27">&gt;</text:span></text:p>
      <text:p text:style-name="P7"><text:span text:style-name="T5">            </text:span><text:span text:style-name="T27">&lt;</text:span><text:span text:style-name="T28">a</text:span><text:span text:style-name="T6"> </text:span><text:span text:style-name="T24">href</text:span><text:span text:style-name="T12">=</text:span><text:span text:style-name="T2">"/"</text:span><text:span text:style-name="T6"> </text:span><text:span text:style-name="T24">className</text:span><text:span text:style-name="T12">=</text:span><text:span text:style-name="T2">"flex items-center gap-2 text-zinc-400 hover:text-white transition-colors"</text:span><text:span text:style-name="T27">&gt;</text:span><text:span text:style-name="T6">History</text:span><text:span text:style-name="T27">&lt;/</text:span><text:span text:style-name="T28">a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gap-4"</text:span><text:span text:style-name="T27">&gt;</text:span></text:p>
      <text:p text:style-name="P7"><text:span text:style-name="T5">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sm text-zinc-400"</text:span><text:span text:style-name="T27">&gt;</text:span><text:span text:style-name="T6">samsoko91@gmail.com</text:span><text:span text:style-name="T27">&lt;/</text:span><text:span text:style-name="T28">span</text:span><text:span text:style-name="T27">&gt;</text:span></text:p>
      <text:p text:style-name="P7"><text:span text:style-name="T5">            </text:span><text:span text:style-name="T27">&lt;</text:span><text:span text:style-name="T28">button</text:span><text:span text:style-name="T6"> </text:span><text:span text:style-name="T24">className</text:span><text:span text:style-name="T12">=</text:span><text:span text:style-name="T2">"px-6 py-2 bg-white text-black rounded-2xl font-medium"</text:span><text:span text:style-name="T27">&gt;</text:span><text:span text:style-name="T6">Sign out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27">&lt;/</text:span><text:span text:style-name="T28">nav</text:span><text:span text:style-name="T27">&gt;</text:span></text:p>
      <text:p text:style-name="P10"/>
      <text:p text:style-name="P7"><text:span text:style-name="T5">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ax-w-7xl mx-auto p-8"</text:span><text:span text:style-name="T27">&gt;</text:span></text:p>
      <text:p text:style-name="P7"><text:span text:style-name="T5">        </text:span><text:span text:style-name="T8">{</text:span><text:span text:style-name="T25">/* Header */</text:span><text:span text:style-name="T8">}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justify-between mb-8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gap-4"</text:span><text:span text:style-name="T27">&gt;</text:span></text:p>
      <text:p text:style-name="P7"><text:span text:style-name="T5">            </text:span><text:span text:style-name="T27">&lt;</text:span><text:span text:style-name="T28">CalendarIcon</text:span><text:span text:style-name="T6"> </text:span><text:span text:style-name="T24">className</text:span><text:span text:style-name="T12">=</text:span><text:span text:style-name="T2">"w-10 h-10 text-blue-400"</text:span><text:span text:style-name="T6"> </text:span><text:span text:style-name="T27">/&gt;</text:span></text:p>
      <text:p text:style-name="P7"><text:span text:style-name="T5">            </text:span><text:span text:style-name="T27">&lt;</text:span><text:span text:style-name="T28">h1</text:span><text:span text:style-name="T6"> </text:span><text:span text:style-name="T24">className</text:span><text:span text:style-name="T12">=</text:span><text:span text:style-name="T2">"text-5xl font-bold tracking-tighter"</text:span><text:span text:style-name="T27">&gt;</text:span><text:span text:style-name="T6">Content Calendar</text:span><text:span text:style-name="T27">&lt;/</text:span><text:span text:style-name="T28">h1</text:span><text:span text:style-name="T27">&gt;</text:span></text:p>
      <text:p text:style-name="P7"><text:soft-page-break/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</text:span><text:span text:style-name="T8">{</text:span><text:span text:style-name="T25">/* Main Tabs */</text:span><text:span text:style-name="T8">}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border-b border-zinc-800 mb-8"</text:span><text:span text:style-name="T27">&gt;</text:span></text:p>
      <text:p text:style-name="P7"><text:span text:style-name="T5">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ActiveTab</text:span><text:span text:style-name="T6">(</text:span><text:span text:style-name="T2">'calendar'</text:span><text:span text:style-name="T6">)</text:span><text:span text:style-name="T8">}</text:span><text:span text:style-name="T6"> </text:span><text:span text:style-name="T24">className</text:span><text:span text:style-name="T12">=</text:span><text:span text:style-name="T8">{</text:span><text:span text:style-name="T2">`px-8 py-4 text-lg font-medium transition-colors </text:span><text:span text:style-name="T23">${</text:span><text:span text:style-name="T6">activeTab</text:span><text:span text:style-name="T12"> === </text:span><text:span text:style-name="T2">'calendar'</text:span><text:span text:style-name="T12"> ? </text:span><text:span text:style-name="T2">'border-b-4 border-blue-500 text-white'</text:span><text:span text:style-name="T12"> : </text:span><text:span text:style-name="T2">'text-zinc-400 hover:text-white'</text:span><text:span text:style-name="T23">}</text:span><text:span text:style-name="T2">`</text:span><text:span text:style-name="T8">}</text:span><text:span text:style-name="T27">&gt;</text:span><text:span text:style-name="T6">Calendar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ActiveTab</text:span><text:span text:style-name="T6">(</text:span><text:span text:style-name="T2">'content'</text:span><text:span text:style-name="T6">)</text:span><text:span text:style-name="T8">}</text:span><text:span text:style-name="T6"> </text:span><text:span text:style-name="T24">className</text:span><text:span text:style-name="T12">=</text:span><text:span text:style-name="T8">{</text:span><text:span text:style-name="T2">`px-8 py-4 text-lg font-medium transition-colors </text:span><text:span text:style-name="T23">${</text:span><text:span text:style-name="T6">activeTab</text:span><text:span text:style-name="T12"> === </text:span><text:span text:style-name="T2">'content'</text:span><text:span text:style-name="T12"> ? </text:span><text:span text:style-name="T2">'border-b-4 border-blue-500 text-white'</text:span><text:span text:style-name="T12"> : </text:span><text:span text:style-name="T2">'text-zinc-400 hover:text-white'</text:span><text:span text:style-name="T23">}</text:span><text:span text:style-name="T2">`</text:span><text:span text:style-name="T8">}</text:span><text:span text:style-name="T27">&gt;</text:span><text:span text:style-name="T6">Content History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ActiveTab</text:span><text:span text:style-name="T6">(</text:span><text:span text:style-name="T2">'scheduled'</text:span><text:span text:style-name="T6">)</text:span><text:span text:style-name="T8">}</text:span><text:span text:style-name="T6"> </text:span><text:span text:style-name="T24">className</text:span><text:span text:style-name="T12">=</text:span><text:span text:style-name="T8">{</text:span><text:span text:style-name="T2">`px-8 py-4 text-lg font-medium transition-colors </text:span><text:span text:style-name="T23">${</text:span><text:span text:style-name="T6">activeTab</text:span><text:span text:style-name="T12"> === </text:span><text:span text:style-name="T2">'scheduled'</text:span><text:span text:style-name="T12"> ? </text:span><text:span text:style-name="T2">'border-b-4 border-blue-500 text-white'</text:span><text:span text:style-name="T12"> : </text:span><text:span text:style-name="T2">'text-zinc-400 hover:text-white'</text:span><text:span text:style-name="T23">}</text:span><text:span text:style-name="T2">`</text:span><text:span text:style-name="T8">}</text:span><text:span text:style-name="T27">&gt;</text:span><text:span text:style-name="T6">Scheduled Posts</text:span><text:span text:style-name="T27">&lt;/</text:span><text:span text:style-name="T28">button</text:span><text:span text:style-name="T27">&gt;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</text:span><text:span text:style-name="T8">{</text:span><text:span text:style-name="T25">/* CALENDAR VIEW TAB */</text:span><text:span text:style-name="T8">}</text:span></text:p>
      <text:p text:style-name="P7"><text:span text:style-name="T5">        </text:span><text:span text:style-name="T8">{</text:span><text:span text:style-name="T6">activeTab </text:span><text:span text:style-name="T12">===</text:span><text:span text:style-name="T6"> </text:span><text:span text:style-name="T2">'calendar'</text:span><text:span text:style-name="T6">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rounded-3xl p-8"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justify-between mb-6"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CurrentMonth</text:span><text:span text:style-name="T6">(</text:span><text:span text:style-name="T14">subMonths</text:span><text:span text:style-name="T6">(currentMonth, </text:span><text:span text:style-name="T17">1</text:span><text:span text:style-name="T6">))</text:span><text:span text:style-name="T8">}</text:span><text:span text:style-name="T6"> </text:span><text:span text:style-name="T24">className</text:span><text:span text:style-name="T12">=</text:span><text:span text:style-name="T2">"p-3 hover:bg-zinc-800 rounded-2xl"</text:span><text:span text:style-name="T27">&gt;&lt;</text:span><text:span text:style-name="T28">ChevronLeft</text:span><text:span text:style-name="T6"> </text:span><text:span text:style-name="T24">className</text:span><text:span text:style-name="T12">=</text:span><text:span text:style-name="T2">"w-6 h-6"</text:span><text:span text:style-name="T6"> </text:span><text:span text:style-name="T27">/&gt;&lt;/</text:span><text:span text:style-name="T28">button</text:span><text:span text:style-name="T27">&gt;</text:span></text:p>
      <text:p text:style-name="P7"><text:span text:style-name="T5">              </text:span><text:span text:style-name="T27">&lt;</text:span><text:span text:style-name="T28">h2</text:span><text:span text:style-name="T6"> </text:span><text:span text:style-name="T24">className</text:span><text:span text:style-name="T12">=</text:span><text:span text:style-name="T2">"text-3xl font-semibold"</text:span><text:span text:style-name="T27">&gt;</text:span><text:span text:style-name="T8">{</text:span><text:span text:style-name="T14">format</text:span><text:span text:style-name="T6">(currentMonth, </text:span><text:span text:style-name="T2">'MMMM yyyy'</text:span><text:span text:style-name="T6">)</text:span><text:span text:style-name="T8">}</text:span><text:span text:style-name="T27">&lt;/</text:span><text:span text:style-name="T28">h2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CurrentMonth</text:span><text:span text:style-name="T6">(</text:span><text:span text:style-name="T14">addMonths</text:span><text:span text:style-name="T6">(currentMonth, </text:span><text:span text:style-name="T17">1</text:span><text:span text:style-name="T6">))</text:span><text:span text:style-name="T8">}</text:span><text:span text:style-name="T6"> </text:span><text:span text:style-name="T24">className</text:span><text:span text:style-name="T12">=</text:span><text:span text:style-name="T2">"p-3 hover:bg-zinc-800 rounded-2xl"</text:span><text:span text:style-name="T27">&gt;&lt;</text:span><text:span text:style-name="T28">ChevronRight</text:span><text:span text:style-name="T6"> </text:span><text:span text:style-name="T24">className</text:span><text:span text:style-name="T12">=</text:span><text:span text:style-name="T2">"w-6 h-6"</text:span><text:span text:style-name="T6"> </text:span><text:span text:style-name="T27">/&gt;&lt;/</text:span><text:span text:style-name="T28">button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grid grid-cols-7 gap-px text-center text-zinc-400 text-sm mb-2"</text:span><text:span text:style-name="T27">&gt;</text:span></text:p>
      <text:p text:style-name="P7"><text:span text:style-name="T5">              </text:span><text:span text:style-name="T8">{</text:span><text:span text:style-name="T6">[</text:span><text:span text:style-name="T2">'Sun'</text:span><text:span text:style-name="T6">, </text:span><text:span text:style-name="T2">'Mon'</text:span><text:span text:style-name="T6">, </text:span><text:span text:style-name="T2">'Tue'</text:span><text:span text:style-name="T6">, </text:span><text:span text:style-name="T2">'Wed'</text:span><text:span text:style-name="T6">, </text:span><text:span text:style-name="T2">'Thu'</text:span><text:span text:style-name="T6">, </text:span><text:span text:style-name="T2">'Fri'</text:span><text:span text:style-name="T6">, </text:span><text:span text:style-name="T2">'Sat'</text:span><text:span text:style-name="T6">].</text:span><text:span text:style-name="T14">map</text:span><text:span text:style-name="T6">(</text:span><text:span text:style-name="T21">d</text:span><text:span text:style-name="T6"> </text:span><text:span text:style-name="T8">=&gt;</text:span><text:span text:style-name="T6">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d</text:span><text:span text:style-name="T8">}</text:span><text:span text:style-name="T27">&gt;</text:span><text:span text:style-name="T8">{</text:span><text:span text:style-name="T6">d</text:span><text:span text:style-name="T8">}</text:span><text:span text:style-name="T27">&lt;/</text:span><text:span text:style-name="T28">div</text:span><text:span text:style-name="T27">&gt;</text:span><text:span text:style-name="T6">)</text:span><text:span text:style-name="T8">}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grid grid-cols-7 gap-px bg-zinc-800 rounded-3xl overflow-hidden"</text:span><text:span text:style-name="T27">&gt;</text:span></text:p>
      <text:p text:style-name="P7"><text:span text:style-name="T5">              </text:span><text:span text:style-name="T8">{</text:span><text:span text:style-name="T6">days.</text:span><text:span text:style-name="T14">map</text:span><text:span text:style-name="T6">((</text:span><text:span text:style-name="T21">day</text:span><text:span text:style-name="T6">, </text:span><text:span text:style-name="T21">i</text:span><text:span text:style-name="T6">) </text:span><text:span text:style-name="T8">=&gt;</text:span><text:span text:style-name="T6"> {</text:span></text:p>
      <text:p text:style-name="P7"><text:span text:style-name="T5">                </text:span><text:span text:style-name="T8">const</text:span><text:span text:style-name="T6"> </text:span><text:span text:style-name="T10">hasItem</text:span><text:span text:style-name="T6"> </text:span><text:span text:style-name="T12">=</text:span><text:span text:style-name="T6"> </text:span><text:span text:style-name="T14">hasScheduledOnDay</text:span><text:span text:style-name="T6">(day);</text:span></text:p>
      <text:p text:style-name="P7"><text:span text:style-name="T5">                </text:span><text:span text:style-name="T4">return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i</text:span><text:span text:style-name="T8">}</text:span><text:span text:style-name="T6"> </text:span><text:span text:style-name="T24">className</text:span><text:span text:style-name="T12">=</text:span><text:span text:style-name="T8">{</text:span><text:span text:style-name="T2">`min-h-[120px] p-3 bg-zinc-900 hover:bg-zinc-800 transition-colors flex flex-col </text:span><text:span text:style-name="T23">${</text:span><text:span text:style-name="T12">!</text:span><text:span text:style-name="T14">isSameMonth</text:span><text:span text:style-name="T12">(</text:span><text:span text:style-name="T6">day</text:span><text:span text:style-name="T12">, </text:span><text:span text:style-name="T6">currentMonth</text:span><text:span text:style-name="T12">) ? </text:span><text:span text:style-name="T2">'opacity-30'</text:span><text:span text:style-name="T12"> : </text:span><text:span text:style-name="T2">''</text:span><text:span text:style-name="T23">}</text:span><text:span text:style-name="T2">`</text:span><text:span text:style-name="T8">}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right text-sm"</text:span><text:span text:style-name="T27">&gt;</text:span><text:span text:style-name="T8">{</text:span><text:span text:style-name="T14">format</text:span><text:span text:style-name="T6">(day, </text:span><text:span text:style-name="T2">'d'</text:span><text:span text:style-name="T6">)</text:span><text:span text:style-name="T8">}</text:span><text:span text:style-name="T27">&lt;/</text:span><text:span text:style-name="T28">div</text:span><text:span text:style-name="T27">&gt;</text:span></text:p>
      <text:p text:style-name="P7"><text:span text:style-name="T5">                    </text:span><text:span text:style-name="T8">{</text:span><text:span text:style-name="T6">hasItem </text:span><text:span text:style-name="T12">&amp;&amp;</text:span><text:span text:style-name="T6">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t-auto w-3 h-3 bg-blue-400 rounded-full mx-auto"</text:span><text:span text:style-name="T27">&gt;&lt;/</text:span><text:span text:style-name="T28">div</text:span><text:span text:style-name="T27">&gt;</text:span><text:span text:style-name="T8">}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8">                <text:span text:style-name="T15">);</text:span></text:p>
      <text:p text:style-name="P7"><text:soft-page-break/><text:span text:style-name="T5">              </text:span><text:span text:style-name="T6">})</text:span><text:span text:style-name="T8">}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6">)</text:span><text:span text:style-name="T8">}</text:span></text:p>
      <text:p text:style-name="P10"/>
      <text:p text:style-name="P7"><text:span text:style-name="T5">        </text:span><text:span text:style-name="T8">{</text:span><text:span text:style-name="T25">/* CONTENT HISTORY TAB */</text:span><text:span text:style-name="T8">}</text:span></text:p>
      <text:p text:style-name="P7"><text:span text:style-name="T5">        </text:span><text:span text:style-name="T8">{</text:span><text:span text:style-name="T6">activeTab </text:span><text:span text:style-name="T12">===</text:span><text:span text:style-name="T6"> </text:span><text:span text:style-name="T2">'content'</text:span><text:span text:style-name="T6"> </text:span><text:span text:style-name="T12">&amp;&amp;</text:span><text:span text:style-name="T6"> (</text:span></text:p>
      <text:p text:style-name="P7"><text:span text:style-name="T5">          </text:span><text:span text:style-name="T27">&lt;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gap-2 mb-6"</text:span><text:span text:style-name="T27">&gt;</text:span></text:p>
      <text:p text:style-name="P7"><text:span text:style-name="T5">              </text:span><text:span text:style-name="T8">{</text:span><text:span text:style-name="T6">([</text:span><text:span text:style-name="T2">'all'</text:span><text:span text:style-name="T6">, </text:span><text:span text:style-name="T2">'text'</text:span><text:span text:style-name="T6">, </text:span><text:span text:style-name="T2">'video'</text:span><text:span text:style-name="T6">, </text:span><text:span text:style-name="T2">'audio'</text:span><text:span text:style-name="T6">] </text:span><text:span text:style-name="T4">as</text:span><text:span text:style-name="T6"> </text:span><text:span text:style-name="T23">const</text:span><text:span text:style-name="T6">).</text:span><text:span text:style-name="T14">map</text:span><text:span text:style-name="T6">(</text:span><text:span text:style-name="T21">f</text:span><text:span text:style-name="T6"> </text:span><text:span text:style-name="T8">=&gt;</text:span><text:span text:style-name="T6"> (</text:span></text:p>
      <text:p text:style-name="P7"><text:span text:style-name="T5">                </text:span><text:span text:style-name="T27">&lt;</text:span><text:span text:style-name="T28">button</text:span></text:p>
      <text:p text:style-name="P7"><text:span text:style-name="T5">                  </text:span><text:span text:style-name="T24">key</text:span><text:span text:style-name="T12">=</text:span><text:span text:style-name="T8">{</text:span><text:span text:style-name="T6">f</text:span><text:span text:style-name="T8">}</text:span></text:p>
      <text:p text:style-name="P7"><text:span text:style-name="T5">                 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ActiveFilter</text:span><text:span text:style-name="T6">(f)</text:span><text:span text:style-name="T8">}</text:span></text:p>
      <text:p text:style-name="P7"><text:span text:style-name="T5">                  </text:span><text:span text:style-name="T24">className</text:span><text:span text:style-name="T12">=</text:span><text:span text:style-name="T8">{</text:span><text:span text:style-name="T2">`px-5 py-2 rounded-2xl text-sm flex items-center gap-2 transition-all </text:span><text:span text:style-name="T23">${</text:span><text:span text:style-name="T6">activeFilter</text:span><text:span text:style-name="T12"> === </text:span><text:span text:style-name="T6">f</text:span><text:span text:style-name="T12"> ? </text:span><text:span text:style-name="T2">'bg-blue-600 text-white'</text:span><text:span text:style-name="T12"> : </text:span><text:span text:style-name="T2">'bg-zinc-900 hover:bg-zinc-800'</text:span><text:span text:style-name="T23">}</text:span><text:span text:style-name="T2">`</text:span><text:span text:style-name="T8">}</text:span></text:p>
      <text:p text:style-name="P7"><text:span text:style-name="T5">                </text:span><text:span text:style-name="T27">&gt;</text:span></text:p>
      <text:p text:style-name="P7"><text:span text:style-name="T5">                  </text:span><text:span text:style-name="T8">{</text:span><text:span text:style-name="T6">f </text:span><text:span text:style-name="T12">===</text:span><text:span text:style-name="T6"> </text:span><text:span text:style-name="T2">'all'</text:span><text:span text:style-name="T6"> </text:span><text:span text:style-name="T12">&amp;&amp;</text:span><text:span text:style-name="T6"> </text:span><text:span text:style-name="T27">&lt;</text:span><text:span text:style-name="T28">Filter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8">}</text:span></text:p>
      <text:p text:style-name="P7"><text:span text:style-name="T5">                  </text:span><text:span text:style-name="T8">{</text:span><text:span text:style-name="T6">f </text:span><text:span text:style-name="T12">===</text:span><text:span text:style-name="T6"> </text:span><text:span text:style-name="T2">'text'</text:span><text:span text:style-name="T6"> </text:span><text:span text:style-name="T12">&amp;&amp;</text:span><text:span text:style-name="T6"> </text:span><text:span text:style-name="T27">&lt;</text:span><text:span text:style-name="T28">FileText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8">}</text:span></text:p>
      <text:p text:style-name="P7"><text:span text:style-name="T5">                  </text:span><text:span text:style-name="T8">{</text:span><text:span text:style-name="T6">f </text:span><text:span text:style-name="T12">===</text:span><text:span text:style-name="T6"> </text:span><text:span text:style-name="T2">'video'</text:span><text:span text:style-name="T6"> </text:span><text:span text:style-name="T12">&amp;&amp;</text:span><text:span text:style-name="T6"> </text:span><text:span text:style-name="T27">&lt;</text:span><text:span text:style-name="T28">Video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8">}</text:span></text:p>
      <text:p text:style-name="P7"><text:span text:style-name="T5">                  </text:span><text:span text:style-name="T8">{</text:span><text:span text:style-name="T6">f </text:span><text:span text:style-name="T12">===</text:span><text:span text:style-name="T6"> </text:span><text:span text:style-name="T2">'audio'</text:span><text:span text:style-name="T6"> </text:span><text:span text:style-name="T12">&amp;&amp;</text:span><text:span text:style-name="T6">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8">}</text:span></text:p>
      <text:p text:style-name="P7"><text:span text:style-name="T5">                  </text:span><text:span text:style-name="T8">{</text:span><text:span text:style-name="T6">f </text:span><text:span text:style-name="T12">===</text:span><text:span text:style-name="T6"> </text:span><text:span text:style-name="T2">'all'</text:span><text:span text:style-name="T6"> </text:span><text:span text:style-name="T12">?</text:span><text:span text:style-name="T6"> </text:span><text:span text:style-name="T2">'All'</text:span><text:span text:style-name="T6"> </text:span><text:span text:style-name="T12">:</text:span><text:span text:style-name="T6"> f.</text:span><text:span text:style-name="T14">charAt</text:span><text:span text:style-name="T6">(</text:span><text:span text:style-name="T17">0</text:span><text:span text:style-name="T6">).</text:span><text:span text:style-name="T14">toUpperCase</text:span><text:span text:style-name="T6">() </text:span><text:span text:style-name="T12">+</text:span><text:span text:style-name="T6"> f.</text:span><text:span text:style-name="T14">slice</text:span><text:span text:style-name="T6">(</text:span><text:span text:style-name="T17">1</text:span><text:span text:style-name="T6">)</text:span><text:span text:style-name="T8">}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6">))</text:span><text:span text:style-name="T8">}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grid grid-cols-1 md:grid-cols-2 lg:grid-cols-3 gap-6"</text:span><text:span text:style-name="T27">&gt;</text:span></text:p>
      <text:p text:style-name="P7"><text:span text:style-name="T5">              </text:span><text:span text:style-name="T8">{</text:span><text:span text:style-name="T6">filteredContent.</text:span><text:span text:style-name="T14">map</text:span><text:span text:style-name="T6">(</text:span><text:span text:style-name="T21">item</text:span><text:span text:style-name="T6"> </text:span><text:span text:style-name="T8">=&gt;</text:span><text:span text:style-name="T6"> (</text:span></text:p>
      <text:p text:style-name="P7"><text:span text:style-name="T5">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item.id</text:span><text:span text:style-name="T8">}</text:span><text:span text:style-name="T6"> </text:span><text:span text:style-name="T24">className</text:span><text:span text:style-name="T12">=</text:span><text:span text:style-name="T2">"bg-zinc-900 rounded-3xl p-6 hover:bg-zinc-800 transition-all group"</text:span><text:span text:style-name="T27">&gt;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gap-3 mb-4"</text:span><text:span text:style-name="T27">&gt;</text:span></text:p>
      <text:p text:style-name="P7"><text:span text:style-name="T5">                    </text:span><text:span text:style-name="T8">{</text:span><text:span text:style-name="T14">getTypeIcon</text:span><text:span text:style-name="T6">(item.type)</text:span><text:span text:style-name="T8">}</text:span></text:p>
      <text:p text:style-name="P7"><text:span text:style-name="T5">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font-medium capitalize"</text:span><text:span text:style-name="T27">&gt;</text:span><text:span text:style-name="T8">{</text:span><text:span text:style-name="T6">item.type</text:span><text:span text:style-name="T8">}</text:span><text:span text:style-name="T27">&lt;/</text:span><text:span text:style-name="T28">span</text:span><text:span text:style-name="T27">&gt;</text:span></text:p>
      <text:p text:style-name="P7"><text:span text:style-name="T5">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xs text-zinc-500 ml-auto"</text:span><text:span text:style-name="T27">&gt;</text:span><text:span text:style-name="T8">{</text:span><text:span text:style-name="T14">formatDistanceToNow</text:span><text:span text:style-name="T6">(</text:span><text:span text:style-name="T23">new</text:span><text:span text:style-name="T6"> </text:span><text:span text:style-name="T14">Date</text:span><text:span text:style-name="T6">(item.created_at))</text:span><text:span text:style-name="T8">}</text:span><text:span text:style-name="T6"> ago</text:span><text:span text:style-name="T27">&lt;/</text:span><text:span text:style-name="T28">span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ont-semibold text-lg mb-2 line-clamp-2"</text:span><text:span text:style-name="T27">&gt;</text:span></text:p>
      <text:p text:style-name="P7"><text:span text:style-name="T5">                    </text:span><text:span text:style-name="T8">{</text:span><text:span text:style-name="T6">item.type </text:span><text:span text:style-name="T12">===</text:span><text:span text:style-name="T6"> </text:span><text:span text:style-name="T2">'text'</text:span><text:span text:style-name="T6"> </text:span></text:p>
      <text:p text:style-name="P7"><text:span text:style-name="T5">                      </text:span><text:span text:style-name="T12">?</text:span><text:span text:style-name="T6"> (item.original_content </text:span><text:span text:style-name="T12">||</text:span><text:span text:style-name="T6"> item.title </text:span><text:span text:style-name="T12">||</text:span><text:span text:style-name="T6"> </text:span><text:span text:style-name="T2">'Untitled Text'</text:span><text:span text:style-name="T6">)</text:span></text:p>
      <text:p text:style-name="P7"><text:span text:style-name="T5">                      </text:span><text:span text:style-name="T12">:</text:span><text:span text:style-name="T6"> (item.title </text:span><text:span text:style-name="T12">||</text:span><text:span text:style-name="T6"> item.original_filename </text:span><text:span text:style-name="T12">||</text:span><text:span text:style-name="T6"> item.file_name </text:span><text:span text:style-name="T12">||</text:span><text:span text:style-name="T6"> </text:span><text:span text:style-name="T2">'Untitled'</text:span><text:span text:style-name="T6">)</text:span><text:span text:style-name="T8">}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</text:span><text:span text:style-name="T8">{</text:span><text:span text:style-name="T6">item.video_url </text:span><text:span text:style-name="T12">&amp;&amp;</text:span><text:span text:style-name="T6"> (</text:span></text:p>
      <text:p text:style-name="P7"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aspect-video bg-black rounded-2xl mb-4 flex items-center justify-center overflow-hidden"</text:span><text:span text:style-name="T27">&gt;</text:span></text:p>
      <text:p text:style-name="P7"><text:span text:style-name="T5">                      </text:span><text:span text:style-name="T8">{</text:span><text:span text:style-name="T6">item.type </text:span><text:span text:style-name="T12">===</text:span><text:span text:style-name="T6"> </text:span><text:span text:style-name="T2">'audio'</text:span><text:span text:style-name="T6"> </text:span><text:span text:style-name="T12">?</text:span><text:span text:style-name="T6"> (</text:span></text:p>
      <text:p text:style-name="P7"><text:span text:style-name="T5">                       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2">"w-12 h-12 text-purple-400"</text:span><text:span text:style-name="T6"> </text:span><text:span text:style-name="T27">/&gt;</text:span></text:p>
      <text:p text:style-name="P7"><text:span text:style-name="T5">                      </text:span><text:span text:style-name="T6">) </text:span><text:span text:style-name="T12">:</text:span><text:span text:style-name="T6"> (</text:span></text:p>
      <text:p text:style-name="P7"><text:soft-page-break/><text:span text:style-name="T5">                        </text:span><text:span text:style-name="T27">&lt;</text:span><text:span text:style-name="T28">video</text:span><text:span text:style-name="T6"> </text:span><text:span text:style-name="T24">src</text:span><text:span text:style-name="T12">=</text:span><text:span text:style-name="T8">{</text:span><text:span text:style-name="T6">item.video_url</text:span><text:span text:style-name="T8">}</text:span><text:span text:style-name="T6"> </text:span><text:span text:style-name="T24">className</text:span><text:span text:style-name="T12">=</text:span><text:span text:style-name="T2">"w-full h-full object-cover"</text:span><text:span text:style-name="T6"> </text:span><text:span text:style-name="T24">muted</text:span><text:span text:style-name="T6"> </text:span><text:span text:style-name="T27">/&gt;</text:span></text:p>
      <text:p text:style-name="P7"><text:span text:style-name="T5">                      </text:span><text:span text:style-name="T6">)</text:span><text:span text:style-name="T8">}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</text:span><text:span text:style-name="T6">)</text:span><text:span text:style-name="T8">}</text:span></text:p>
      <text:p text:style-name="P7"><text:span text:style-name="T5">                  </text:span><text:span text:style-name="T27">&lt;</text:span><text:span text:style-name="T28">button</text:span></text:p>
      <text:p text:style-name="P7"><text:span text:style-name="T5">                   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{ </text:span><text:span text:style-name="T14">setSelectedItem</text:span><text:span text:style-name="T6">(item); </text:span><text:span text:style-name="T14">setShowScheduleModal</text:span><text:span text:style-name="T6">(</text:span><text:span text:style-name="T23">true</text:span><text:span text:style-name="T6">); }</text:span><text:span text:style-name="T8">}</text:span></text:p>
      <text:p text:style-name="P7"><text:span text:style-name="T5">                    </text:span><text:span text:style-name="T24">className</text:span><text:span text:style-name="T12">=</text:span><text:span text:style-name="T2">"w-full mt-4 bg-white text-black py-4 rounded-2xl font-semibold flex items-center justify-center gap-2 hover:scale-105 transition-transform"</text:span></text:p>
      <text:p text:style-name="P7"><text:span text:style-name="T5">                  </text:span><text:span text:style-name="T27">&gt;</text:span></text:p>
      <text:p text:style-name="P7"><text:span text:style-name="T5">                    </text:span><text:span text:style-name="T27">&lt;</text:span><text:span text:style-name="T28">Plus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/text:p>
      <text:p text:style-name="P8">                    <text:span text:style-name="T15">Add to Calendar</text:span></text:p>
      <text:p text:style-name="P7"><text:span text:style-name="T5">  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6">))</text:span><text:span text:style-name="T8">}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/&gt;</text:span></text:p>
      <text:p text:style-name="P7"><text:span text:style-name="T5">        </text:span><text:span text:style-name="T6">)</text:span><text:span text:style-name="T8">}</text:span></text:p>
      <text:p text:style-name="P10"/>
      <text:p text:style-name="P7"><text:span text:style-name="T5">        </text:span><text:span text:style-name="T8">{</text:span><text:span text:style-name="T25">/* SCHEDULED POSTS TAB */</text:span><text:span text:style-name="T8">}</text:span></text:p>
      <text:p text:style-name="P7"><text:span text:style-name="T5">        </text:span><text:span text:style-name="T8">{</text:span><text:span text:style-name="T6">activeTab </text:span><text:span text:style-name="T12">===</text:span><text:span text:style-name="T6"> </text:span><text:span text:style-name="T2">'scheduled'</text:span><text:span text:style-name="T6">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4"</text:span><text:span text:style-name="T27">&gt;</text:span></text:p>
      <text:p text:style-name="P7"><text:span text:style-name="T5">            </text:span><text:span text:style-name="T8">{</text:span><text:span text:style-name="T6">scheduledPosts.</text:span><text:span text:style-name="T10">length</text:span><text:span text:style-name="T6"> </text:span><text:span text:style-name="T12">===</text:span><text:span text:style-name="T6"> </text:span><text:span text:style-name="T17">0</text:span><text:span text:style-name="T6"> </text:span><text:span text:style-name="T12">?</text:span><text:span text:style-name="T6"> (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rounded-3xl p-12 text-center"</text:span><text:span text:style-name="T27">&gt;</text:span></text:p>
      <text:p text:style-name="P7"><text:span text:style-name="T5">                </text:span><text:span text:style-name="T27">&lt;</text:span><text:span text:style-name="T28">Clock</text:span><text:span text:style-name="T6"> </text:span><text:span text:style-name="T24">className</text:span><text:span text:style-name="T12">=</text:span><text:span text:style-name="T2">"w-16 h-16 mx-auto text-zinc-600 mb-4"</text:span><text:span text:style-name="T6"> </text:span><text:span text:style-name="T27">/&gt;</text:span></text:p>
      <text:p text:style-name="P7"><text:span text:style-name="T5">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zinc-400"</text:span><text:span text:style-name="T27">&gt;</text:span><text:span text:style-name="T6">No scheduled posts yet</text:span><text:span text:style-name="T27">&lt;/</text:span><text:span text:style-name="T28">p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6">) </text:span><text:span text:style-name="T12">:</text:span><text:span text:style-name="T6"> (</text:span></text:p>
      <text:p text:style-name="P7"><text:span text:style-name="T5">              </text:span><text:span text:style-name="T6">scheduledPosts.</text:span><text:span text:style-name="T14">map</text:span><text:span text:style-name="T6">(</text:span><text:span text:style-name="T21">post</text:span><text:span text:style-name="T6"> </text:span><text:span text:style-name="T8">=&gt;</text:span><text:span text:style-name="T6"> (</text:span></text:p>
      <text:p text:style-name="P7"><text:span text:style-name="T5">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post.id</text:span><text:span text:style-name="T8">}</text:span><text:span text:style-name="T6"> </text:span><text:span text:style-name="T24">className</text:span><text:span text:style-name="T12">=</text:span><text:span text:style-name="T2">"bg-zinc-900 rounded-3xl p-6 flex items-center gap-6"</text:span><text:span text:style-name="T27">&gt;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-1"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gap-3"</text:span><text:span text:style-name="T27">&gt;</text:span></text:p>
      <text:p text:style-name="P7"><text:span text:style-name="T5">  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sm font-mono bg-zinc-800 px-3 py-1 rounded-2xl"</text:span><text:span text:style-name="T27">&gt;</text:span><text:span text:style-name="T8">{</text:span><text:span text:style-name="T6">post.platform</text:span><text:span text:style-name="T8">}</text:span><text:span text:style-name="T27">&lt;/</text:span><text:span text:style-name="T28">span</text:span><text:span text:style-name="T27">&gt;</text:span></text:p>
      <text:p text:style-name="P7"><text:span text:style-name="T5">  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xs text-zinc-500"</text:span><text:span text:style-name="T27">&gt;</text:span><text:span text:style-name="T8">{</text:span><text:span text:style-name="T14">format</text:span><text:span text:style-name="T6">(</text:span><text:span text:style-name="T23">new</text:span><text:span text:style-name="T6"> </text:span><text:span text:style-name="T14">Date</text:span><text:span text:style-name="T6">(post.scheduled_at), </text:span><text:span text:style-name="T2">'MMM dd, yyyy • HH:mm'</text:span><text:span text:style-name="T6">)</text:span><text:span text:style-name="T8">}</text:span><text:span text:style-name="T27">&lt;/</text:span><text:span text:style-name="T28">span</text:span><text:span text:style-name="T27">&gt;</text:span></text:p>
      <text:p text:style-name="P7"><text:span text:style-name="T5">                      </text:span><text:span text:style-name="T8">{</text:span><text:span text:style-name="T6">post.status </text:span><text:span text:style-name="T12">===</text:span><text:span text:style-name="T6"> </text:span><text:span text:style-name="T2">'pending'</text:span><text:span text:style-name="T6"> </text:span><text:span text:style-name="T12">&amp;&amp;</text:span><text:span text:style-name="T6">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amber-400 text-xs flex items-center gap-1"</text:span><text:span text:style-name="T27">&gt;&lt;</text:span><text:span text:style-name="T28">Clock</text:span><text:span text:style-name="T6"> </text:span><text:span text:style-name="T24">className</text:span><text:span text:style-name="T12">=</text:span><text:span text:style-name="T2">"w-3 h-3"</text:span><text:span text:style-name="T6"> </text:span><text:span text:style-name="T27">/&gt;</text:span><text:span text:style-name="T6">Pending</text:span><text:span text:style-name="T27">&lt;/</text:span><text:span text:style-name="T28">span</text:span><text:span text:style-name="T27">&gt;</text:span><text:span text:style-name="T8">}</text:span></text:p>
      <text:p text:style-name="P7"><text:span text:style-name="T5">                      </text:span><text:span text:style-name="T8">{</text:span><text:span text:style-name="T6">post.status </text:span><text:span text:style-name="T12">===</text:span><text:span text:style-name="T6"> </text:span><text:span text:style-name="T2">'posted'</text:span><text:span text:style-name="T6"> </text:span><text:span text:style-name="T12">&amp;&amp;</text:span><text:span text:style-name="T6">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green-400 text-xs flex items-center gap-1"</text:span><text:span text:style-name="T27">&gt;&lt;</text:span><text:span text:style-name="T28">CheckCircle</text:span><text:span text:style-name="T6"> </text:span><text:span text:style-name="T24">className</text:span><text:span text:style-name="T12">=</text:span><text:span text:style-name="T2">"w-3 h-3"</text:span><text:span text:style-name="T6"> </text:span><text:span text:style-name="T27">/&gt;</text:span><text:span text:style-name="T6">Posted</text:span><text:span text:style-name="T27">&lt;/</text:span><text:span text:style-name="T28">span</text:span><text:span text:style-name="T27">&gt;</text:span><text:span text:style-name="T8">}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mt-2 text-lg font-medium line-clamp-1"</text:span><text:span text:style-name="T27">&gt;</text:span></text:p>
      <text:p text:style-name="P7"><text:span text:style-name="T5">                      </text:span><text:span text:style-name="T8">{</text:span><text:span text:style-name="T6">post.history_item.title </text:span><text:span text:style-name="T12">||</text:span><text:span text:style-name="T6"> post.history_item.file_name </text:span><text:span text:style-name="T12">||</text:span><text:span text:style-name="T6"> post.history_item.original_filename </text:span><text:span text:style-name="T12">||</text:span><text:span text:style-name="T6"> </text:span><text:span text:style-name="T2">'Scheduled content'</text:span><text:span text:style-name="T8">}</text:span></text:p>
      <text:p text:style-name="P7"><text:span text:style-name="T5">                    </text:span><text:span text:style-name="T27">&lt;/</text:span><text:span text:style-name="T28">p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oft-page-break/><text:span text:style-name="T5">                  </text:span><text:span text:style-name="T27">&lt;</text:span><text:span text:style-name="T28">button</text:span></text:p>
      <text:p text:style-name="P7"><text:span text:style-name="T5">                   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deleteScheduledPost</text:span><text:span text:style-name="T6">(post.id).</text:span><text:span text:style-name="T14">then</text:span><text:span text:style-name="T6">(() </text:span><text:span text:style-name="T8">=&gt;</text:span><text:span text:style-name="T6"> </text:span><text:span text:style-name="T14">loadScheduled</text:span><text:span text:style-name="T6">())</text:span><text:span text:style-name="T8">}</text:span></text:p>
      <text:p text:style-name="P7"><text:span text:style-name="T5">                    </text:span><text:span text:style-name="T24">className</text:span><text:span text:style-name="T12">=</text:span><text:span text:style-name="T2">"text-red-400 hover:text-red-300 transition-colors"</text:span></text:p>
      <text:p text:style-name="P7"><text:span text:style-name="T5">                  </text:span><text:span text:style-name="T27">&gt;</text:span></text:p>
      <text:p text:style-name="P7"><text:span text:style-name="T5">                    </text:span><text:span text:style-name="T27">&lt;</text:span><text:span text:style-name="T28">Trash2</text:span><text:span text:style-name="T6"> </text:span><text:span text:style-name="T24">className</text:span><text:span text:style-name="T12">=</text:span><text:span text:style-name="T2">"w-6 h-6"</text:span><text:span text:style-name="T6"> </text:span><text:span text:style-name="T27">/&gt;</text:span></text:p>
      <text:p text:style-name="P7"><text:span text:style-name="T5">  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8">              <text:span text:style-name="T15">))</text:span></text:p>
      <text:p text:style-name="P7"><text:span text:style-name="T5">            </text:span><text:span text:style-name="T6">)</text:span><text:span text:style-name="T8">}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6">)</text:span><text:span text:style-name="T8">}</text:span></text:p>
      <text:p text:style-name="P10"/>
      <text:p text:style-name="P7"><text:span text:style-name="T5">        </text:span><text:span text:style-name="T8">{</text:span><text:span text:style-name="T25">/* Schedule Modal */</text:span><text:span text:style-name="T8">}</text:span></text:p>
      <text:p text:style-name="P7"><text:span text:style-name="T5">        </text:span><text:span text:style-name="T8">{</text:span><text:span text:style-name="T6">showScheduleModal </text:span><text:span text:style-name="T12">&amp;&amp;</text:span><text:span text:style-name="T6"> selectedItem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ixed inset-0 bg-black/80 flex items-center justify-center z-50"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rounded-3xl w-full max-w-lg mx-4 p-8"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items-center mb-6"</text:span><text:span text:style-name="T27">&gt;</text:span></text:p>
      <text:p text:style-name="P7"><text:span text:style-name="T5">                </text:span><text:span text:style-name="T27">&lt;</text:span><text:span text:style-name="T28">h2</text:span><text:span text:style-name="T6"> </text:span><text:span text:style-name="T24">className</text:span><text:span text:style-name="T12">=</text:span><text:span text:style-name="T2">"text-2xl font-bold"</text:span><text:span text:style-name="T27">&gt;</text:span><text:span text:style-name="T6">Schedule Post</text:span><text:span text:style-name="T27">&lt;/</text:span><text:span text:style-name="T28">h2</text:span><text:span text:style-name="T27">&gt;</text:span></text:p>
      <text:p text:style-name="P7"><text:span text:style-name="T5">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ShowScheduleModal</text:span><text:span text:style-name="T6">(</text:span><text:span text:style-name="T23">false</text:span><text:span text:style-name="T6">)</text:span><text:span text:style-name="T8">}</text:span><text:span text:style-name="T27">&gt;&lt;</text:span><text:span text:style-name="T28">X</text:span><text:span text:style-name="T6"> </text:span><text:span text:style-name="T24">className</text:span><text:span text:style-name="T12">=</text:span><text:span text:style-name="T2">"w-6 h-6"</text:span><text:span text:style-name="T6"> </text:span><text:span text:style-name="T27">/&gt;&lt;/</text:span><text:span text:style-name="T28">button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6"</text:span><text:span text:style-name="T27">&gt;</text:span></text:p>
      <text:p text:style-name="P7"><text:span text:style-name="T5">                </text:span><text:span text:style-name="T27">&lt;</text:span><text:span text:style-name="T28">div</text:span><text:span text:style-name="T27">&gt;</text:span></text:p>
      <text:p text:style-name="P7"><text:span text:style-name="T5">                  </text:span><text:span text:style-name="T27">&lt;</text:span><text:span text:style-name="T28">label</text:span><text:span text:style-name="T6"> </text:span><text:span text:style-name="T24">className</text:span><text:span text:style-name="T12">=</text:span><text:span text:style-name="T2">"block text-sm text-zinc-400 mb-2"</text:span><text:span text:style-name="T27">&gt;</text:span><text:span text:style-name="T6">Platform</text:span><text:span text:style-name="T27">&lt;/</text:span><text:span text:style-name="T28">label</text:span><text:span text:style-name="T27">&gt;</text:span></text:p>
      <text:p text:style-name="P7"><text:span text:style-name="T5">                  </text:span><text:span text:style-name="T27">&lt;</text:span><text:span text:style-name="T28">select</text:span><text:span text:style-name="T6"> </text:span><text:span text:style-name="T24">value</text:span><text:span text:style-name="T12">=</text:span><text:span text:style-name="T8">{</text:span><text:span text:style-name="T10">selectedPlatform</text:span><text:span text:style-name="T8">}</text:span><text:span text:style-name="T6"> </text:span><text:span text:style-name="T24">onChange</text:span><text:span text:style-name="T12">=</text:span><text:span text:style-name="T8">{</text:span><text:span text:style-name="T21">e</text:span><text:span text:style-name="T6"> </text:span><text:span text:style-name="T8">=&gt;</text:span><text:span text:style-name="T6"> </text:span><text:span text:style-name="T14">setSelectedPlatform</text:span><text:span text:style-name="T6">(</text:span><text:span text:style-name="T21">e</text:span><text:span text:style-name="T6">.target.</text:span><text:span text:style-name="T10">value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w-full bg-zinc-800 border border-zinc-700 rounded-2xl px-4 py-4 text-white"</text:span><text:span text:style-name="T27">&gt;</text:span></text:p>
      <text:p text:style-name="P7"><text:span text:style-name="T5">                    </text:span><text:span text:style-name="T27">&lt;</text:span><text:span text:style-name="T28">option</text:span><text:span text:style-name="T6"> </text:span><text:span text:style-name="T24">value</text:span><text:span text:style-name="T12">=</text:span><text:span text:style-name="T2">""</text:span><text:span text:style-name="T27">&gt;</text:span><text:span text:style-name="T6">Select platform...</text:span><text:span text:style-name="T27">&lt;/</text:span><text:span text:style-name="T28">option</text:span><text:span text:style-name="T27">&gt;</text:span></text:p>
      <text:p text:style-name="P7"><text:span text:style-name="T5">                    </text:span><text:span text:style-name="T8">{</text:span><text:span text:style-name="T10">platformsList</text:span><text:span text:style-name="T6">.</text:span><text:span text:style-name="T14">map</text:span><text:span text:style-name="T6">(</text:span><text:span text:style-name="T21">p</text:span><text:span text:style-name="T6"> </text:span><text:span text:style-name="T8">=&gt;</text:span><text:span text:style-name="T6"> </text:span><text:span text:style-name="T27">&lt;</text:span><text:span text:style-name="T28">option</text:span><text:span text:style-name="T6"> </text:span><text:span text:style-name="T24">key</text:span><text:span text:style-name="T12">=</text:span><text:span text:style-name="T8">{</text:span><text:span text:style-name="T21">p</text:span><text:span text:style-name="T6">.value</text:span><text:span text:style-name="T8">}</text:span><text:span text:style-name="T6"> </text:span><text:span text:style-name="T24">value</text:span><text:span text:style-name="T12">=</text:span><text:span text:style-name="T8">{</text:span><text:span text:style-name="T21">p</text:span><text:span text:style-name="T6">.value</text:span><text:span text:style-name="T8">}</text:span><text:span text:style-name="T27">&gt;</text:span><text:span text:style-name="T8">{</text:span><text:span text:style-name="T21">p</text:span><text:span text:style-name="T6">.label</text:span><text:span text:style-name="T8">}</text:span><text:span text:style-name="T27">&lt;/</text:span><text:span text:style-name="T28">option</text:span><text:span text:style-name="T27">&gt;</text:span><text:span text:style-name="T6">)</text:span><text:span text:style-name="T8">}</text:span></text:p>
      <text:p text:style-name="P7"><text:span text:style-name="T5">                  </text:span><text:span text:style-name="T27">&lt;/</text:span><text:span text:style-name="T28">select</text:span><text:span text:style-name="T27">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27">&lt;</text:span><text:span text:style-name="T28">div</text:span><text:span text:style-name="T27">&gt;</text:span></text:p>
      <text:p text:style-name="P7"><text:span text:style-name="T5">                  </text:span><text:span text:style-name="T27">&lt;</text:span><text:span text:style-name="T28">label</text:span><text:span text:style-name="T6"> </text:span><text:span text:style-name="T24">className</text:span><text:span text:style-name="T12">=</text:span><text:span text:style-name="T2">"block text-sm text-zinc-400 mb-2"</text:span><text:span text:style-name="T27">&gt;</text:span><text:span text:style-name="T6">Schedule date </text:span><text:span text:style-name="T8">&amp;amp;</text:span><text:span text:style-name="T6"> time</text:span><text:span text:style-name="T27">&lt;/</text:span><text:span text:style-name="T28">label</text:span><text:span text:style-name="T27">&gt;</text:span></text:p>
      <text:p text:style-name="P7"><text:span text:style-name="T5">                  </text:span><text:span text:style-name="T27">&lt;</text:span><text:span text:style-name="T28">input</text:span><text:span text:style-name="T6"> </text:span><text:span text:style-name="T24">type</text:span><text:span text:style-name="T12">=</text:span><text:span text:style-name="T2">"datetime-local"</text:span><text:span text:style-name="T6"> </text:span><text:span text:style-name="T24">value</text:span><text:span text:style-name="T12">=</text:span><text:span text:style-name="T8">{</text:span><text:span text:style-name="T10">scheduledAt</text:span><text:span text:style-name="T8">}</text:span><text:span text:style-name="T6"> </text:span><text:span text:style-name="T24">onChange</text:span><text:span text:style-name="T12">=</text:span><text:span text:style-name="T8">{</text:span><text:span text:style-name="T21">e</text:span><text:span text:style-name="T6"> </text:span><text:span text:style-name="T8">=&gt;</text:span><text:span text:style-name="T6"> </text:span><text:span text:style-name="T14">setScheduledAt</text:span><text:span text:style-name="T6">(</text:span><text:span text:style-name="T21">e</text:span><text:span text:style-name="T6">.target.</text:span><text:span text:style-name="T10">value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w-full bg-zinc-800 border border-zinc-700 rounded-2xl px-4 py-4 text-white"</text:span><text:span text:style-name="T6"> </text:span><text:span text:style-name="T27">/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14">handleSchedule</text:span><text:span text:style-name="T8">}</text:span><text:span text:style-name="T6"> </text:span><text:span text:style-name="T24">disabled</text:span><text:span text:style-name="T12">=</text:span><text:span text:style-name="T8">{</text:span><text:span text:style-name="T12">!</text:span><text:span text:style-name="T10">selectedPlatform</text:span><text:span text:style-name="T6"> </text:span><text:span text:style-name="T12">||</text:span><text:span text:style-name="T6"> </text:span><text:span text:style-name="T12">!</text:span><text:span text:style-name="T10">scheduledAt</text:span><text:span text:style-name="T8">}</text:span><text:span text:style-name="T6"> </text:span><text:span text:style-name="T24">className</text:span><text:span text:style-name="T12">=</text:span><text:span text:style-name="T2">"w-full bg-blue-600 hover:bg-blue-500 disabled:bg-zinc-700 py-5 rounded-2xl text-lg font-semibold transition-colors"</text:span><text:span text:style-name="T27">&gt;</text:span></text:p>
      <text:p text:style-name="P8">                  <text:span text:style-name="T15">Schedule Post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oft-page-break/><text:span text:style-name="T5">        </text:span><text:span text:style-name="T6">)</text:span><text:span text:style-name="T8">}</text:span></text:p>
      <text:p text:style-name="P10"/>
      <text:p text:style-name="P7"><text:span text:style-name="T5">        </text:span><text:span text:style-name="T8">{</text:span><text:span text:style-name="T25">/* Toast */</text:span><text:span text:style-name="T8">}</text:span></text:p>
      <text:p text:style-name="P7"><text:span text:style-name="T5">        </text:span><text:span text:style-name="T8">{</text:span><text:span text:style-name="T10">toast</text:span><text:span text:style-name="T6">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8">{</text:span><text:span text:style-name="T2">`fixed bottom-6 right-6 px-8 py-4 rounded-3xl flex items-center gap-3 shadow-2xl </text:span><text:span text:style-name="T23">${</text:span><text:span text:style-name="T10">toast</text:span><text:span text:style-name="T12">.</text:span><text:span text:style-name="T6">error</text:span><text:span text:style-name="T12"> ? </text:span><text:span text:style-name="T2">'bg-red-600'</text:span><text:span text:style-name="T12"> : </text:span><text:span text:style-name="T2">'bg-emerald-600'</text:span><text:span text:style-name="T23">}</text:span><text:span text:style-name="T2">`</text:span><text:span text:style-name="T8">}</text:span><text:span text:style-name="T27">&gt;</text:span></text:p>
      <text:p text:style-name="P7"><text:span text:style-name="T5">            </text:span><text:span text:style-name="T8">{</text:span><text:span text:style-name="T10">toast</text:span><text:span text:style-name="T6">.error </text:span><text:span text:style-name="T12">?</text:span><text:span text:style-name="T6"> </text:span><text:span text:style-name="T27">&lt;</text:span><text:span text:style-name="T28">AlertTriangle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</text:span><text:span text:style-name="T12">:</text:span><text:span text:style-name="T6"> </text:span><text:span text:style-name="T27">&lt;</text:span><text:span text:style-name="T28">CheckCircle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8">}</text:span></text:p>
      <text:p text:style-name="P7"><text:span text:style-name="T5">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font-medium"</text:span><text:span text:style-name="T27">&gt;</text:span><text:span text:style-name="T8">{</text:span><text:span text:style-name="T10">toast</text:span><text:span text:style-name="T6">.message</text:span><text:span text:style-name="T8">}</text:span><text:span text:style-name="T27">&lt;/</text:span><text:span text:style-name="T28">span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6">)</text:span><text:span text:style-name="T8">}</text:span></text:p>
      <text:p text:style-name="P7"><text:span text:style-name="T5">      </text:span><text:span text:style-name="T27">&lt;/</text:span><text:span text:style-name="T28">div</text:span><text:span text:style-name="T27">&gt;</text:span></text:p>
      <text:p text:style-name="P7"><text:span text:style-name="T5">    </text:span><text:span text:style-name="T27">&lt;/</text:span><text:span text:style-name="T28">div</text:span><text:span text:style-name="T27">&gt;</text:span></text:p>
      <text:p text:style-name="P8">  <text:span text:style-name="T15">);</text:span></text:p>
      <text:p text:style-name="P9">}</text:p>
      <text:p text:style-name="P18"/>
      <text:p text:style-name="P18"/>
      <text:p text:style-name="P18"/>
      <text:p text:style-name="P17">app/api/<text:span text:style-name="T32">zernio/accounts</text:span>/route.ts:</text:p>
      <text:p text:style-name="P17"/>
      <text:p text:style-name="P5"><text:span text:style-name="T3">import</text:span> <text:span text:style-name="T5">{ createClient }</text:span> <text:span text:style-name="T3">from</text:span> <text:span text:style-name="T1">'@supabase/supabase-js'</text:span>;</text:p>
      <text:p text:style-name="P2"><text:span text:style-name="T3">import</text:span> <text:span text:style-name="T5">{ NextRequest, NextResponse }</text:span> <text:span text:style-name="T3">from</text:span> <text:span text:style-name="T1">'next/server'</text:span>;</text:p>
      <text:p text:style-name="P10"/>
      <text:p text:style-name="P2"><text:span text:style-name="T7">const</text:span> <text:span text:style-name="T9">supabase</text:span> <text:span text:style-name="T11">=</text:span> <text:span text:style-name="T13">createClient</text:span>(</text:p>
      <text:p text:style-name="P7">  <text:span text:style-name="T6">process</text:span><text:span text:style-name="T15">.</text:span><text:span text:style-name="T6">env</text:span><text:span text:style-name="T15">.</text:span><text:span text:style-name="T10">NEXT_PUBLIC_SUPABASE_URL</text:span><text:span text:style-name="T12">!</text:span><text:span text:style-name="T15">,</text:span></text:p>
      <text:p text:style-name="P7">  <text:span text:style-name="T6">process</text:span><text:span text:style-name="T15">.</text:span><text:span text:style-name="T6">env</text:span><text:span text:style-name="T15">.</text:span><text:span text:style-name="T10">SUPABASE_SERVICE_ROLE_KEY</text:span><text:span text:style-name="T12">!</text:span></text:p>
      <text:p text:style-name="P2">);</text:p>
      <text:p text:style-name="P10"/>
      <text:p text:style-name="P2"><text:span text:style-name="T3">export</text:span> <text:span text:style-name="T22">async</text:span> <text:span text:style-name="T7">function</text:span> <text:span text:style-name="T13">GET</text:span>(<text:span text:style-name="T20">req</text:span><text:span text:style-name="T11">:</text:span> <text:span text:style-name="T18">NextRequest</text:span>) <text:span text:style-name="T5">{</text:span></text:p>
      <text:p text:style-name="P7"><text:span text:style-name="T5">  </text:span><text:span text:style-name="T4">try</text:span><text:span text:style-name="T6"> {</text:span></text:p>
      <text:p text:style-name="P7"><text:span text:style-name="T5">    </text:span><text:span text:style-name="T8">const</text:span><text:span text:style-name="T6"> </text:span><text:span text:style-name="T10">userId</text:span><text:span text:style-name="T6"> </text:span><text:span text:style-name="T12">=</text:span><text:span text:style-name="T6"> </text:span><text:span text:style-name="T21">req</text:span><text:span text:style-name="T6">.nextUrl.searchParams.</text:span><text:span text:style-name="T14">get</text:span><text:span text:style-name="T6">(</text:span><text:span text:style-name="T2">'user_id'</text:span><text:span text:style-name="T6">);</text:span></text:p>
      <text:p text:style-name="P7"><text:span text:style-name="T5">    </text:span><text:span text:style-name="T4">if</text:span><text:span text:style-name="T6"> (</text:span><text:span text:style-name="T12">!</text:span><text:span text:style-name="T10">userId</text:span><text:span text:style-name="T6">) {</text:span></text:p>
      <text:p text:style-name="P7"><text:span text:style-name="T5">  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</text:span><text:span text:style-name="T2">'user_id is required'</text:span><text:span text:style-name="T6"> }, { status</text:span><text:span text:style-name="T24">:</text:span><text:span text:style-name="T6"> </text:span><text:span text:style-name="T17">400</text:span><text:span text:style-name="T6"> });</text:span></text:p>
      <text:p text:style-name="P8">    <text:span text:style-name="T15">}</text:span></text:p>
      <text:p text:style-name="P10"/>
      <text:p text:style-name="P7"><text:span text:style-name="T5">    </text:span><text:span text:style-name="T8">const</text:span><text:span text:style-name="T6"> { data: </text:span><text:span text:style-name="T10">zernioData</text:span><text:span text:style-name="T6">, error: </text:span><text:span text:style-name="T10">keyError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</text:span></text:p>
      <text:p text:style-name="P7"><text:span text:style-name="T5">      </text:span><text:span text:style-name="T6">.</text:span><text:span text:style-name="T14">from</text:span><text:span text:style-name="T6">(</text:span><text:span text:style-name="T2">'user_zernio'</text:span><text:span text:style-name="T6">)</text:span></text:p>
      <text:p text:style-name="P7"><text:span text:style-name="T5">      </text:span><text:span text:style-name="T6">.</text:span><text:span text:style-name="T14">select</text:span><text:span text:style-name="T6">(</text:span><text:span text:style-name="T2">'api_key'</text:span><text:span text:style-name="T6">)</text:span></text:p>
      <text:p text:style-name="P7"><text:span text:style-name="T5">      </text:span><text:span text:style-name="T6">.</text:span><text:span text:style-name="T14">eq</text:span><text:span text:style-name="T6">(</text:span><text:span text:style-name="T2">'user_id'</text:span><text:span text:style-name="T6">, </text:span><text:span text:style-name="T10">userId</text:span><text:span text:style-name="T6">)</text:span></text:p>
      <text:p text:style-name="P7"><text:span text:style-name="T5">      </text:span><text:span text:style-name="T6">.</text:span><text:span text:style-name="T14">single</text:span><text:span text:style-name="T6">();</text:span></text:p>
      <text:p text:style-name="P10"/>
      <text:p text:style-name="P7"><text:span text:style-name="T5">    </text:span><text:span text:style-name="T4">if</text:span><text:span text:style-name="T6"> (</text:span><text:span text:style-name="T10">keyError</text:span><text:span text:style-name="T6"> </text:span><text:span text:style-name="T12">||</text:span><text:span text:style-name="T6"> </text:span><text:span text:style-name="T12">!</text:span><text:span text:style-name="T10">zernioData</text:span><text:span text:style-name="T6">?.api_key) {</text:span></text:p>
      <text:p text:style-name="P7"><text:span text:style-name="T5">  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</text:span><text:span text:style-name="T2">'Zernio API key not found. Please add it via the ⚡ Zernio button.'</text:span><text:span text:style-name="T6"> }, { status</text:span><text:span text:style-name="T24">:</text:span><text:span text:style-name="T6"> </text:span><text:span text:style-name="T17">400</text:span><text:span text:style-name="T6"> });</text:span></text:p>
      <text:p text:style-name="P8"><text:soft-page-break/>    <text:span text:style-name="T15">}</text:span></text:p>
      <text:p text:style-name="P10"/>
      <text:p text:style-name="P7"><text:span text:style-name="T5">    </text:span><text:span text:style-name="T8">const</text:span><text:span text:style-name="T6"> </text:span><text:span text:style-name="T10">response</text:span><text:span text:style-name="T6"> </text:span><text:span text:style-name="T12">=</text:span><text:span text:style-name="T6"> </text:span><text:span text:style-name="T4">await</text:span><text:span text:style-name="T6"> </text:span><text:span text:style-name="T31">fetch</text:span><text:span text:style-name="T6">(</text:span><text:span text:style-name="T2">'https://zernio.com/api/v1/accounts'</text:span><text:span text:style-name="T6">, {</text:span></text:p>
      <text:p text:style-name="P7"><text:span text:style-name="T5">      </text:span><text:span text:style-name="T6">headers</text:span><text:span text:style-name="T24">:</text:span><text:span text:style-name="T6"> {</text:span></text:p>
      <text:p text:style-name="P7"><text:span text:style-name="T5">        </text:span><text:span text:style-name="T2">'Authorization'</text:span><text:span text:style-name="T24">:</text:span><text:span text:style-name="T6"> </text:span><text:span text:style-name="T2">`Bearer </text:span><text:span text:style-name="T23">${</text:span><text:span text:style-name="T10">zernioData</text:span><text:span text:style-name="T12">.</text:span><text:span text:style-name="T6">api_key</text:span><text:span text:style-name="T23">}</text:span><text:span text:style-name="T2">`</text:span><text:span text:style-name="T6">,</text:span></text:p>
      <text:p text:style-name="P7"><text:span text:style-name="T5">        </text:span><text:span text:style-name="T2">'Content-Type'</text:span><text:span text:style-name="T24">:</text:span><text:span text:style-name="T6"> </text:span><text:span text:style-name="T2">'application/json'</text:span><text:span text:style-name="T6">,</text:span></text:p>
      <text:p text:style-name="P8">      <text:span text:style-name="T15">},</text:span></text:p>
      <text:p text:style-name="P8">    <text:span text:style-name="T15">});</text:span></text:p>
      <text:p text:style-name="P10"/>
      <text:p text:style-name="P7"><text:span text:style-name="T5">    </text:span><text:span text:style-name="T4">if</text:span><text:span text:style-name="T6"> (</text:span><text:span text:style-name="T12">!</text:span><text:span text:style-name="T10">response</text:span><text:span text:style-name="T6">.</text:span><text:span text:style-name="T10">ok</text:span><text:span text:style-name="T6">) {</text:span></text:p>
      <text:p text:style-name="P7"><text:span text:style-name="T5">      </text:span><text:span text:style-name="T8">const</text:span><text:span text:style-name="T6"> </text:span><text:span text:style-name="T10">errorText</text:span><text:span text:style-name="T6"> </text:span><text:span text:style-name="T12">=</text:span><text:span text:style-name="T6"> </text:span><text:span text:style-name="T4">await</text:span><text:span text:style-name="T6"> </text:span><text:span text:style-name="T10">response</text:span><text:span text:style-name="T6">.</text:span><text:span text:style-name="T14">text</text:span><text:span text:style-name="T6">();</text:span></text:p>
      <text:p text:style-name="P7"><text:span text:style-name="T5">      </text:span><text:span text:style-name="T10">console</text:span><text:span text:style-name="T6">.</text:span><text:span text:style-name="T14">error</text:span><text:span text:style-name="T6">(</text:span><text:span text:style-name="T2">'Zernio accounts error:'</text:span><text:span text:style-name="T6">, </text:span><text:span text:style-name="T10">errorText</text:span><text:span text:style-name="T6">);</text:span></text:p>
      <text:p text:style-name="P7"><text:span text:style-name="T5">  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</text:span><text:span text:style-name="T2">'Failed to fetch accounts from Zernio'</text:span><text:span text:style-name="T6"> }, { status</text:span><text:span text:style-name="T24">:</text:span><text:span text:style-name="T6"> </text:span><text:span text:style-name="T10">response</text:span><text:span text:style-name="T6">.</text:span><text:span text:style-name="T10">status</text:span><text:span text:style-name="T6"> });</text:span></text:p>
      <text:p text:style-name="P8">    <text:span text:style-name="T15">}</text:span></text:p>
      <text:p text:style-name="P10"/>
      <text:p text:style-name="P7"><text:span text:style-name="T5">    </text:span><text:span text:style-name="T8">const</text:span><text:span text:style-name="T6"> </text:span><text:span text:style-name="T10">data</text:span><text:span text:style-name="T6"> </text:span><text:span text:style-name="T12">=</text:span><text:span text:style-name="T6"> </text:span><text:span text:style-name="T4">await</text:span><text:span text:style-name="T6"> </text:span><text:span text:style-name="T10">response</text:span><text:span text:style-name="T6">.</text:span><text:span text:style-name="T14">json</text:span><text:span text:style-name="T6">();</text:span></text:p>
      <text:p text:style-name="P7"><text:span text:style-name="T5">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accounts</text:span><text:span text:style-name="T24">:</text:span><text:span text:style-name="T6"> </text:span><text:span text:style-name="T10">data</text:span><text:span text:style-name="T6">.accounts </text:span><text:span text:style-name="T12">||</text:span><text:span text:style-name="T6"> </text:span><text:span text:style-name="T10">data</text:span><text:span text:style-name="T6"> </text:span><text:span text:style-name="T12">||</text:span><text:span text:style-name="T6"> [] });</text:span></text:p>
      <text:p text:style-name="P7"><text:span text:style-name="T5">  </text:span><text:span text:style-name="T6">} </text:span><text:span text:style-name="T4">catch</text:span><text:span text:style-name="T6"> (err</text:span><text:span text:style-name="T12">:</text:span><text:span text:style-name="T6"> </text:span><text:span text:style-name="T19">any</text:span><text:span text:style-name="T6">) {</text:span></text:p>
      <text:p text:style-name="P7"><text:span text:style-name="T5">    </text:span><text:span text:style-name="T10">console</text:span><text:span text:style-name="T6">.</text:span><text:span text:style-name="T14">error</text:span><text:span text:style-name="T6">(</text:span><text:span text:style-name="T2">'Zernio accounts fetch error:'</text:span><text:span text:style-name="T6">, err);</text:span></text:p>
      <text:p text:style-name="P7"><text:span text:style-name="T5">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err.message </text:span><text:span text:style-name="T12">||</text:span><text:span text:style-name="T6"> </text:span><text:span text:style-name="T2">'Internal server error'</text:span><text:span text:style-name="T6"> }, { status</text:span><text:span text:style-name="T24">:</text:span><text:span text:style-name="T6"> </text:span><text:span text:style-name="T17">500</text:span><text:span text:style-name="T6"> });</text:span></text:p>
      <text:p text:style-name="P8">  <text:span text:style-name="T15">}</text:span></text:p>
      <text:p text:style-name="P9">}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3T10:30:12.643000000</meta:creation-date>
    <dc:date>2026-05-23T12:41:13.619000000</dc:date>
    <meta:editing-duration>PT13M58S</meta:editing-duration>
    <meta:editing-cycles>1</meta:editing-cycles>
    <meta:document-statistic meta:table-count="0" meta:image-count="0" meta:object-count="0" meta:page-count="43" meta:paragraph-count="1584" meta:word-count="6050" meta:character-count="69321" meta:non-whitespace-character-count="52480"/>
    <meta:generator>LibreOffice/7.3.2.2$Windows_X86_64 LibreOffice_project/49f2b1bff42cfccbd8f788c8dc32c1c309559be0</meta:generator>
  </office:meta>
</office:document-meta>
</file>
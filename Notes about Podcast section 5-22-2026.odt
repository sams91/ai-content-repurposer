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1b58" officeooo:paragraph-rsid="001c1b58"/>
    </style:style>
    <style:style style:name="P2" style:family="paragraph" style:parent-style-name="Standard">
      <style:text-properties officeooo:rsid="001d4274" officeooo:paragraph-rsid="001d4274"/>
    </style:style>
    <style:style style:name="P3" style:family="paragraph" style:parent-style-name="Standard" style:list-style-name="L1">
      <style:text-properties officeooo:rsid="001d4274" officeooo:paragraph-rsid="001d4274"/>
    </style:style>
    <style:style style:name="P4" style:family="paragraph" style:parent-style-name="Standard" style:list-style-name="L1">
      <style:text-properties officeooo:rsid="001efcea" officeooo:paragraph-rsid="001efcea"/>
    </style:style>
    <style:style style:name="P5" style:family="paragraph" style:parent-style-name="Standard">
      <style:text-properties officeooo:rsid="001efcea" officeooo:paragraph-rsid="001efcea"/>
    </style:style>
    <style:style style:name="P6" style:family="paragraph" style:parent-style-name="Standard" style:list-style-name="L1">
      <style:text-properties officeooo:rsid="001f1821" officeooo:paragraph-rsid="001f1821"/>
    </style:style>
    <style:style style:name="P7" style:family="paragraph" style:parent-style-name="Standard">
      <style:text-properties officeooo:rsid="001f1821" officeooo:paragraph-rsid="001f1821"/>
    </style:style>
    <style:style style:name="P8" style:family="paragraph" style:parent-style-name="Standard">
      <style:text-properties officeooo:rsid="00236dfa" officeooo:paragraph-rsid="00236dfa"/>
    </style:style>
    <style:style style:name="P9" style:family="paragraph" style:parent-style-name="Standard" style:list-style-name="L2">
      <style:text-properties officeooo:rsid="0023a67c" officeooo:paragraph-rsid="0023a67c"/>
    </style:style>
    <style:style style:name="P10" style:family="paragraph" style:parent-style-name="Standard">
      <style:text-properties officeooo:rsid="0023a67c" officeooo:paragraph-rsid="0023a67c"/>
    </style:style>
    <style:style style:name="P11" style:family="paragraph" style:parent-style-name="Standard" style:list-style-name="L2">
      <style:text-properties officeooo:paragraph-rsid="0023a67c"/>
    </style:style>
    <style:style style:name="P12" style:family="paragraph" style:parent-style-name="Standard">
      <style:text-properties officeooo:paragraph-rsid="0023a67c"/>
    </style:style>
    <style:style style:name="P13" style:family="paragraph" style:parent-style-name="Standard">
      <style:text-properties officeooo:rsid="0025553c" officeooo:paragraph-rsid="0025553c"/>
    </style:style>
    <style:style style:name="P14" style:family="paragraph" style:parent-style-name="Text_20_body">
      <style:paragraph-properties fo:margin-top="0in" fo:margin-bottom="0in" style:contextual-spacing="false"/>
    </style:style>
    <style:style style:name="P15" style:family="paragraph" style:parent-style-name="Text_20_body">
      <style:text-properties officeooo:rsid="0023a67c" officeooo:paragraph-rsid="0023a67c"/>
    </style:style>
    <style:style style:name="P16" style:family="paragraph" style:parent-style-name="Text_20_body" style:list-style-name="L6">
      <style:text-properties officeooo:rsid="0023a67c" officeooo:paragraph-rsid="0023a67c"/>
    </style:style>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6">
      <style:text-properties officeooo:paragraph-rsid="0024d203"/>
    </style:style>
    <style:style style:name="P19" style:family="paragraph" style:parent-style-name="Text_20_body">
      <style:text-properties officeooo:paragraph-rsid="0024d203"/>
    </style:style>
    <style:style style:name="P20" style:family="paragraph" style:parent-style-name="Text_20_body">
      <style:text-properties officeooo:rsid="0025553c" officeooo:paragraph-rsid="0025553c"/>
    </style:style>
    <style:style style:name="P21" style:family="paragraph" style:parent-style-name="Text_20_body">
      <style:text-properties fo:font-size="12pt" officeooo:paragraph-rsid="0025553c" style:font-size-asian="12pt" style:font-size-complex="12pt"/>
    </style:style>
    <style:style style:name="P22" style:family="paragraph" style:parent-style-name="Text_20_body">
      <style:text-properties officeooo:paragraph-rsid="00265716"/>
    </style:style>
    <style:style style:name="P23" style:family="paragraph" style:parent-style-name="Text_20_body">
      <style:text-properties officeooo:rsid="0028b49f" officeooo:paragraph-rsid="0028b49f"/>
    </style:style>
    <style:style style:name="P24" style:family="paragraph" style:parent-style-name="Text_20_body">
      <style:text-properties officeooo:rsid="00290595" officeooo:paragraph-rsid="00290595"/>
    </style:style>
    <style:style style:name="P25" style:family="paragraph" style:parent-style-name="Text_20_body" style:list-style-name="L7">
      <style:text-properties officeooo:rsid="00290595" officeooo:paragraph-rsid="00290595"/>
    </style:style>
    <style:style style:name="P26" style:family="paragraph" style:parent-style-name="Text_20_body" style:list-style-name="L7">
      <style:text-properties officeooo:rsid="002a6e01" officeooo:paragraph-rsid="002a6e01"/>
    </style:style>
    <style:style style:name="P27" style:family="paragraph" style:parent-style-name="Text_20_body">
      <style:text-properties officeooo:rsid="002c4d45" officeooo:paragraph-rsid="002c4d45"/>
    </style:style>
    <style:style style:name="P28" style:family="paragraph" style:parent-style-name="Text_20_body" style:list-style-name="L7">
      <style:text-properties officeooo:paragraph-rsid="002c4d45"/>
    </style:style>
    <style:style style:name="P29" style:family="paragraph" style:parent-style-name="Text_20_body">
      <style:text-properties officeooo:rsid="002dabdd" officeooo:paragraph-rsid="002dabdd"/>
    </style:style>
    <style:style style:name="P30" style:family="paragraph" style:parent-style-name="Text_20_body">
      <style:text-properties officeooo:rsid="002f33d3" officeooo:paragraph-rsid="002f33d3"/>
    </style:style>
    <style:style style:name="P31" style:family="paragraph" style:parent-style-name="Text_20_body" style:list-style-name="L8">
      <style:text-properties officeooo:rsid="002f33d3" officeooo:paragraph-rsid="002f33d3"/>
    </style:style>
    <style:style style:name="P32" style:family="paragraph" style:parent-style-name="Text_20_body">
      <style:text-properties officeooo:rsid="0031c6a3" officeooo:paragraph-rsid="0031c6a3"/>
    </style:style>
    <style:style style:name="P33" style:family="paragraph" style:parent-style-name="Text_20_body" style:list-style-name="L9">
      <style:text-properties officeooo:rsid="0031c6a3" officeooo:paragraph-rsid="0031c6a3"/>
    </style:style>
    <style:style style:name="P34" style:family="paragraph" style:parent-style-name="Text_20_body" style:list-style-name="L9">
      <style:text-properties officeooo:rsid="0031e768" officeooo:paragraph-rsid="0031e768"/>
    </style:style>
    <style:style style:name="P35" style:family="paragraph" style:parent-style-name="Text_20_body">
      <style:text-properties officeooo:rsid="0031e768" officeooo:paragraph-rsid="0031e768"/>
    </style:style>
    <style:style style:name="T1" style:family="text">
      <style:text-properties officeooo:rsid="001efcea"/>
    </style:style>
    <style:style style:name="T2" style:family="text">
      <style:text-properties officeooo:rsid="002048c8"/>
    </style:style>
    <style:style style:name="T3" style:family="text">
      <style:text-properties officeooo:rsid="0020ae4e"/>
    </style:style>
    <style:style style:name="T4" style:family="text">
      <style:text-properties officeooo:rsid="00223161"/>
    </style:style>
    <style:style style:name="T5" style:family="text">
      <style:text-properties officeooo:rsid="0023a67c"/>
    </style:style>
    <style:style style:name="T6" style:family="text">
      <style:text-properties fo:font-variant="normal" fo:text-transform="none" style:font-name="Arial" fo:font-size="10.5pt" fo:letter-spacing="normal" fo:font-style="normal"/>
    </style:style>
    <style:style style:name="T7" style:family="text">
      <style:text-properties fo:font-variant="normal" fo:text-transform="none" style:font-name="Arial" fo:font-size="10.5pt" fo:letter-spacing="normal" fo:font-style="normal" fo:font-weight="normal"/>
    </style:style>
    <style:style style:name="T8" style:family="text">
      <style:text-properties fo:font-variant="normal" fo:text-transform="none" style:font-name="Arial" fo:font-size="10.5pt" fo:letter-spacing="normal" fo:font-style="normal" fo:font-weight="normal" officeooo:rsid="0023a67c"/>
    </style:style>
    <style:style style:name="T9" style:family="text">
      <style:text-properties fo:font-variant="normal" fo:text-transform="none" style:font-name="Arial" fo:font-size="10.5pt" fo:letter-spacing="normal" fo:font-style="normal" fo:font-weight="normal" officeooo:rsid="0024d203"/>
    </style:style>
    <style:style style:name="T10" style:family="text">
      <style:text-properties fo:font-variant="normal" fo:text-transform="none" style:font-name="Arial" fo:letter-spacing="normal" fo:font-style="normal" fo:font-weight="normal"/>
    </style:style>
    <style:style style:name="T11" style:family="text">
      <style:text-properties fo:font-variant="normal" fo:text-transform="none" style:font-name="Arial" fo:letter-spacing="normal" fo:font-style="normal" fo:font-weight="normal" officeooo:rsid="002560d1"/>
    </style:style>
    <style:style style:name="T12" style:family="text">
      <style:text-properties fo:font-variant="normal" fo:text-transform="none" style:font-name="Arial" fo:font-size="12pt" fo:letter-spacing="normal" fo:font-style="normal" fo:font-weight="normal" style:font-size-asian="12pt" style:font-size-complex="12pt"/>
    </style:style>
    <style:style style:name="T13" style:family="text">
      <style:text-properties fo:font-variant="normal" fo:text-transform="none" style:font-name="Arial" fo:font-size="12pt" fo:letter-spacing="normal" fo:font-style="normal" fo:font-weight="normal" officeooo:rsid="002560d1" style:font-size-asian="12pt" style:font-size-complex="12pt"/>
    </style:style>
    <style:style style:name="T14" style:family="text">
      <style:text-properties fo:font-variant="normal" fo:text-transform="none" style:font-name="Arial" fo:font-size="12pt" fo:letter-spacing="normal" fo:font-style="normal" fo:font-weight="normal" officeooo:rsid="00265716" style:font-size-asian="12pt" style:font-size-complex="12pt"/>
    </style:style>
    <style:style style:name="T15" style:family="text">
      <style:text-properties fo:font-variant="normal" fo:text-transform="none" style:font-name="Arial" fo:font-size="12pt" fo:letter-spacing="normal" fo:font-style="normal" fo:font-weight="normal" officeooo:rsid="0028e488" style:font-size-asian="12pt" style:font-size-complex="12pt"/>
    </style:style>
    <style:style style:name="T16" style:family="text">
      <style:text-properties fo:font-variant="normal" fo:text-transform="none" style:font-name="Arial" fo:font-size="12pt" fo:letter-spacing="normal" fo:font-style="normal" fo:font-weight="normal" officeooo:rsid="002a6e01" style:font-size-asian="12pt" style:font-size-complex="12pt"/>
    </style:style>
    <style:style style:name="T17" style:family="text">
      <style:text-properties fo:font-variant="normal" fo:text-transform="none" style:font-name="Arial" fo:font-size="12pt" fo:letter-spacing="normal" fo:font-style="normal" fo:font-weight="normal" officeooo:rsid="002c4d45" style:font-size-asian="12pt" style:font-size-complex="12pt"/>
    </style:style>
    <style:style style:name="T18" style:family="text">
      <style:text-properties fo:font-variant="normal" fo:text-transform="none" style:font-name="Arial" fo:font-size="12pt" fo:letter-spacing="normal" fo:font-style="normal" fo:font-weight="normal" officeooo:rsid="0030b0a4" style:font-size-asian="12pt" style:font-size-complex="12pt"/>
    </style:style>
    <style:style style:name="T19" style:family="text">
      <style:text-properties fo:font-variant="normal" fo:text-transform="none" style:font-name="Arial" fo:font-size="12pt" fo:letter-spacing="normal" fo:font-style="normal" fo:font-weight="normal" officeooo:rsid="0031e768" style:font-size-asian="12pt" style:font-size-complex="12pt"/>
    </style:style>
    <style:style style:name="T20" style:family="text">
      <style:text-properties officeooo:rsid="0024d203"/>
    </style:style>
    <style:style style:name="T21" style:family="text">
      <style:text-properties officeooo:rsid="0025553c"/>
    </style:style>
    <style:style style:name="T22" style:family="text">
      <style:text-properties officeooo:rsid="002560d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about Podcast section 5-22-2026</text:p>
      <text:p text:style-name="P1"/>
      <text:p text:style-name="P1"/>
      <text:p text:style-name="P1"/>
      <text:p text:style-name="P1"/>
      <text:p text:style-name="P1"/>
      <text:p text:style-name="P2">Audio files are now being loaded to history! Here are some observations:</text:p>
      <text:p text:style-name="P2"/>
      <text:list xml:id="list1605870521" text:style-name="L1">
        <text:list-item>
          <text:p text:style-name="P3">What is the point of the “Smart Clips” function? I was thinking AI was selecting the best 15, 30, and 60 seconds of the video or audio, but it looks more like smart clips is just taking the first 15, 30, and 60 seconds of it, not the “best” 15, 30, and 60 seconds if that makes sense.</text:p>
        </text:list-item>
      </text:list>
      <text:p text:style-name="P2"/>
      <text:p text:style-name="P2"/>
      <text:list xml:id="list155602426408792" text:continue-numbering="true" text:style-name="L1">
        <text:list-item>
          <text:p text:style-name="P3">The Burn Captions function isn’t working for audio. A file is downloaded, but there’s no captioning. I’m wondering if <text:span text:style-name="T1">a</text:span>udio would need the captions. I can see the purpose of them for video, but I’m not sure about audio. I’m not saying I want to remove the functionality yet, I just want to understand the purpose before devoting 4 hours to debugging.</text:p>
        </text:list-item>
      </text:list>
      <text:p text:style-name="P2"/>
      <text:p text:style-name="P2"/>
      <text:list xml:id="list155601351623941" text:continue-numbering="true" text:style-name="L1">
        <text:list-item>
          <text:p text:style-name="P4">Thumbnail isn’t working for audio either, but I wouldn’t expect it to since it isn’t using AI. If it was connected to AI, how would it work? Would it generate an image on the fly, based on the audio? If so, am I correct in assuming that would burn through a lot of tokens? In the Open AI dashboard, in the recommended models section, I see an image model (screenshot). Is this included with what I’ve currently paid for, or is this an upgrade I’d need to pay extra for? Either way, could this be used to generate the thumbnails for video and audio? <text:span text:style-name="T3">If this is an upgrade I’d need to pay extra for, what do you recommend we do for now since I don’t want to pay extra for anything until we are closer to deployment (or after)? We could code it as though we are connecting to AI already, but we wouldn’t be able to test, which is a bad idea. How hard is it to push changes post deployment? </text:span><text:span text:style-name="T4">Would it be better to leave this functionality as is, then upgrade to AI after deploying to production?</text:span></text:p>
        </text:list-item>
      </text:list>
      <text:p text:style-name="P5"/>
      <text:p text:style-name="P5"/>
      <text:list xml:id="list155603164559987" text:continue-numbering="true" text:style-name="L1">
        <text:list-item>
          <text:p text:style-name="P6">3 more things about the smart clips section: 1) when I use it for audio, it says “Smart Clips for this video”. We’ll need to change this so it says audio when it’s an audio file, and video when it’s a video file. 2) Is there any merit to generating “smart clips” of text from the text part of the app? I’m not sure how that would work, or if it would be useful, but I’m curious what your thoughts are on the subject. 3) Once smart clips are generated, a box with 3 smart clip sections pops up. Once you click outside of this box it disappears forever <text:span text:style-name="T2">and the only way to bring it up again is to regenerate the smart clips. I’m guessing this is because we haven’t created a storage place for them in Supabase. If that is the case, approximately how much time and frustration would it cost to save smart clips in history along with the audio or video file itself? The idea would be once a user generates smart clips, then clicks out of the smart clips box, the generated smart clips would be saved along with the file in history. The “Smart Clips” button would still be available for them to generate new smart clips if they chose to, but what they had already generated would also be available. Now that I’m thinking this through, maybe this isn’t needed because the user has already </text:span><text:span text:style-name="T3">downloaded what files they wanted so there’s no need to maintain a persistent history of them. I think I just talked myself out of this. What are your thoughts, would adding smart clips to the history be more trouble than it’s worth? I do think we should </text:span><text:soft-page-break/><text:span text:style-name="T3">add some kind of tool tip at the top that lets users know if they click out of the smart clips section they’ll have to regenerate them. That may be the best approach. </text:span></text:p>
        </text:list-item>
      </text:list>
      <text:p text:style-name="P7"/>
      <text:p text:style-name="P7"/>
      <text:p text:style-name="P7"/>
      <text:p text:style-name="P7"/>
      <text:p text:style-name="P7"/>
      <text:p text:style-name="P7"/>
      <text:p text:style-name="P7"/>
      <text:p text:style-name="P8">Ok, this is looking great, but here’s <text:span text:style-name="T5">a few</text:span> more thing<text:span text:style-name="T5">s</text:span> to fix: </text:p>
      <text:p text:style-name="P8"/>
      <text:list xml:id="list2415038392" text:style-name="L2">
        <text:list-item>
          <text:p text:style-name="P11"><text:span text:style-name="T5">In the text mode box, it should say “</text:span><text:span text:style-name="T8">Upload or drag &amp; drop”, not “drag &amp; drop, or paste “</text:span></text:p>
        </text:list-item>
      </text:list>
      <text:p text:style-name="P12"><text:span text:style-name="T8"/></text:p>
      <text:p text:style-name="P12"><text:span text:style-name="T8"/></text:p>
      <text:list xml:id="list155602558982244" text:continue-numbering="true" text:style-name="L2">
        <text:list-item>
          <text:p text:style-name="P9"><text:span text:style-name="T7">In each of the “Mode” boxes (text, video, audio), after the arrow, there should be some kind of verbiage that explains that what is after the arrow is what the app is doing for the user.</text:span></text:p>
        </text:list-item>
      </text:list>
      <text:p text:style-name="P10"><text:span text:style-name="T7"/></text:p>
      <text:p text:style-name="P10"><text:span text:style-name="T7"/></text:p>
      <text:p text:style-name="P10"><text:span text:style-name="T7">Before posting any code, please give me some options to solve for point 2, let me pick one, then you generate the code based on my choice. Does that sound wavy gravy Cochise? </text:span></text:p>
      <text:p text:style-name="P10"><text:span text:style-name="T7"/></text:p>
      <text:p text:style-name="P10"><text:span text:style-name="T7"/></text:p>
      <text:p text:style-name="P10"><text:span text:style-name="T7"/></text:p>
      <text:p text:style-name="P13"><text:span text:style-name="T7">Let’s roll with what I have below:</text:span></text:p>
      <text:p text:style-name="P10"><text:span text:style-name="T7"/></text:p>
      <text:p text:style-name="P10"><text:span text:style-name="T7"/></text:p>
      <text:list xml:id="list4089226001" text:style-name="L6">
        <text:list-item>
          <text:p text:style-name="P16"><text:span text:style-name="Strong_20_Emphasis"><text:span text:style-name="T6">Text</text:span></text:span><text:span text:style-name="T7">: Type </text:span><text:span text:style-name="T9">or paste</text:span><text:span text:style-name="T7"> directly in the app, upload or drag &amp; drop → </text:span><text:span text:style-name="Strong_20_Emphasis"><text:span text:style-name="T6">we repurpose it instantly into perfectly optimized posts</text:span></text:span><text:span text:style-name="T7"> </text:span><text:span text:style-name="T9">for 8 different platforms</text:span></text:p>
        </text:list-item>
      </text:list>
      <text:p text:style-name="P15"><text:span text:style-name="T7"/></text:p>
      <text:list xml:id="list155603205194988" text:continue-numbering="true" text:style-name="L6">
        <text:list-item>
          <text:p text:style-name="P17"><text:span text:style-name="Strong_20_Emphasis">Video</text:span>: Record directly in the app or upload your video → <text:span text:style-name="Strong_20_Emphasis">we turn it into Smart Clips </text:span><text:span text:style-name="Strong_20_Emphasis"><text:span text:style-name="T20">with hooks,</text:span></text:span><text:span text:style-name="Strong_20_Emphasis"> platform-formatted videos </text:span><text:span text:style-name="Strong_20_Emphasis"><text:span text:style-name="T20">with test</text:span></text:span><text:span text:style-name="Strong_20_Emphasis">, </text:span><text:span text:style-name="Strong_20_Emphasis"><text:span text:style-name="T20">and</text:span></text:span><text:span text:style-name="Strong_20_Emphasis"> burned captions.</text:span> </text:p>
        </text:list-item>
      </text:list>
      <text:p text:style-name="P14"/>
      <text:list xml:id="list155602081133797" text:continue-numbering="true" text:style-name="L6">
        <text:list-item>
          <text:p text:style-name="P18"><text:span text:style-name="Strong_20_Emphasis">Audio</text:span>: Record podcast/voiceover directly in the app or upload your audio → <text:span text:style-name="Strong_20_Emphasis">we transform it into show notes, chapters, clips &amp; ready-to-post text</text:span> </text:p>
        </text:list-item>
      </text:list>
      <text:p text:style-name="P19"/>
      <text:p text:style-name="P20">Below all of this add a section that talks about users being able to post to all their platforms all from the app, talk about the calendar and scheduling function. Really lay it on thick so that after reading it, people want to throw many at me.</text:p>
      <text:p text:style-name="P19"/>
      <text:p text:style-name="P21"><text:span text:style-name="T21">The “supported file types” section looks sort of…….ugly compared to the rest of the page. Is there a way to clean it up, maybe make it look like the Mona Lisa of web pages? </text:span><text:span text:style-name="T22">Keep the “</text:span><text:span text:style-name="T10">Create directly inside ContentAmplifier…..” </text:span><text:span text:style-name="T11">part, that is good information. Let’s see what you can do Pedro.</text:span></text:p>
      <text:p text:style-name="P21"><text:span text:style-name="T11"/></text:p>
      <text:p text:style-name="P21"><text:span text:style-name="T11"/></text:p>
      <text:p text:style-name="P21"><text:soft-page-break/><text:span text:style-name="T11"/></text:p>
      <text:p text:style-name="P21"><text:span text:style-name="T11"/></text:p>
      <text:p text:style-name="P22"><text:span text:style-name="T13">I </text:span><text:span text:style-name="T14">know I used AVI in my example of a frustrated user that couldn’t get there file to upload, and that is likely why you reference it, but since AVI is listed as a supported file type on the page now, I feel like I’d better confirm it’s actually supported before moving on. If it is supported, then please roll to </text:span><text:span text:style-name="T10">Add Audio to Dashboard metrics</text:span><text:span text:style-name="T14">, and remember to make to whole dashboard so beautiful it brings a tear to Kenny G’s saxophone. </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3"><text:span text:style-name="T14">O</text:span><text:span text:style-name="T12">k I see the calendar, but nothing seems to be functional, and </text:span><text:span text:style-name="T15">the content ideas section only has text.There should be a toggle for all, text, video, and audio, just like history. The drag to calendar function doesn’t work There’s no way load content to this section, users should be able to pull content from history.The “New Idea” button only puts me in the content ideas section. What is the purpose of this button? To me, it would make sense to use this button to load content the user would like to schedule to be pushed to a social media platform. For some reason, when I reload the page, there are 2 items sitting in the Scheduled section that I didn’t put there. If I delete them, then refresh the page, they are back. The “send to Zernio” button doesn’t work either.There should also be simple, clear instructions for how to use the calendar, how to schedule things etc.</text:span></text:p>
      <text:p text:style-name="P23"><text:span text:style-name="T15"/></text:p>
      <text:p text:style-name="P24"><text:span text:style-name="T15">H</text:span><text:span text:style-name="T12">ere is the error from clicking on the send to zernio button:</text:span></text:p>
      <text:p text:style-name="P24"><text:span text:style-name="T12"/></text:p>
      <text:p text:style-name="P24"><text:span text:style-name="T12"/></text:p>
      <text:p text:style-name="P24"><text:span text:style-name="T12"/></text:p>
      <text:p text:style-name="P24"><text:span text:style-name="T12"/></text:p>
      <text:p text:style-name="P24"><text:span text:style-name="T12"/></text:p>
      <text:p text:style-name="P24"><text:span text:style-name="T12"/></text:p>
      <text:p text:style-name="P24"><text:span text:style-name="T12"/></text:p>
      <text:p text:style-name="P24"><text:span text:style-name="T12"/></text:p>
      <text:p text:style-name="P24"><text:span text:style-name="T12"/></text:p>
      <text:p text:style-name="P24"><text:span text:style-name="T12"/></text:p>
      <text:p text:style-name="P24"><text:soft-page-break/><text:span text:style-name="T12"/></text:p>
      <text:p text:style-name="P24"><text:span text:style-name="T12"/></text:p>
      <text:p text:style-name="P24"><text:span text:style-name="T12">Here are the next round of issues:</text:span></text:p>
      <text:p text:style-name="P24"><text:span text:style-name="T12"/></text:p>
      <text:list xml:id="list261551267" text:style-name="L7">
        <text:list-item>
          <text:p text:style-name="P25"><text:span text:style-name="T12">In content ideas, <text:s/>see a toggle for all, text, video, and audio, but only text is available. If I click on video or audio, it doesn’t show anything. </text:span></text:p>
        </text:list-item>
        <text:list-item>
          <text:p text:style-name="P26"><text:span text:style-name="T12">The browse history button doesn’t do anything but take users to the content ideas section. Is that all it’s supposed to do? If so, it can probably be removed. </text:span></text:p>
        </text:list-item>
        <text:list-item>
          <text:p text:style-name="P26"><text:span text:style-name="T12">How is the content ideas section being populated with content? I think the <text:s/>content ideas section should be renamed to content history. </text:span></text:p>
        </text:list-item>
        <text:list-item>
          <text:p text:style-name="P25"><text:span text:style-name="T12">I see a flaw in this design. If there is a long list of content in the content ideas section, users may need to scroll down, moving the calendar tab out of view, </text:span><text:span text:style-name="T16">making it impossible to drag the content and drop it in the calendar. Instead, there should be an “Add to Calendar” button for each content box. </text:span><text:span text:style-name="T17">When users click on that button a small calendar should appear, allowing users to select any date they choose. Once a date is selected, they should be prompted for a time. Once the time is selected, an entry for that scheduled post should be put on the correct day on the calendar. The entry should note the title of the content, the time it will be pushed, and what platform it will be pushed to. The scheduled section should be populated with content, in the same order it will be pushed to social media, with the soonest release on top. The instructions should reflect all of this.</text:span></text:p>
        </text:list-item>
        <text:list-item>
          <text:p text:style-name="P28"><text:span text:style-name="T17">The instructions sitting below where it says </text:span><text:span text:style-name="T12">Content Calendar: </text:span><text:span text:style-name="T17">drag ideas schedule auto-post with zernio, should be changed to reflect the new process. The instructions in the green box should be removed, and so should the green box.</text:span></text:p>
        </text:list-item>
      </text:list>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oft-page-break/><text:span text:style-name="T17"/></text:p>
      <text:p text:style-name="P27"><text:span text:style-name="T17"/></text:p>
      <text:p text:style-name="P27"><text:span text:style-name="T17"/></text:p>
      <text:p text:style-name="P27"><text:span text:style-name="T17"/></text:p>
      <text:p text:style-name="P27"><text:span text:style-name="T17"/></text:p>
      <text:p text:style-name="P29"><text:span text:style-name="T12">Audio and video still aren’t loading into content history. I tested the schedule feature. I scheduled some content to get posted, but it didn’t post. Also, when scheduling a post Users should select what platforms they want to post to, and all should also be an option. When selecting all, the content should post to all the platforms the user has registered through Zernio.</text:span></text:p>
      <text:p text:style-name="P29"><text:span text:style-name="T12"/></text:p>
      <text:p text:style-name="P29"><text:span text:style-name="T12">The send to Zernio button does work though.</text:span></text:p>
      <text:p text:style-name="P29"><text:span text:style-name="T12"/></text:p>
      <text:p text:style-name="P29"><text:span text:style-name="T12"/></text:p>
      <text:p text:style-name="P29"><text:span text:style-name="T12"/></text:p>
      <text:p text:style-name="P30"><text:span text:style-name="T12">This is a little better, but here are some issues:</text:span></text:p>
      <text:p text:style-name="P30"><text:span text:style-name="T12"/></text:p>
      <text:list xml:id="list3228145793" text:style-name="L8">
        <text:list-item>
          <text:p text:style-name="P31"><text:span text:style-name="T12">The calendar is gone. There should be a calendar so users can see what they have scheduled. </text:span></text:p>
        </text:list-item>
        <text:list-item>
          <text:p text:style-name="P31"><text:span text:style-name="T12">Text and audio are available, but there’s still no video.</text:span></text:p>
        </text:list-item>
        <text:list-item>
          <text:p text:style-name="P31"><text:span text:style-name="T12">I scheduled a post, but it never sent. </text:span><text:span text:style-name="T18">Clicking post now on a scheduled does work though.</text:span></text:p>
        </text:list-item>
        <text:list-item>
          <text:p text:style-name="P31"><text:span text:style-name="T12">The clock and calendar inside the Schedule Post box are too dark, it’s hard to see them. They should be a little bigger and a little brighter so they are easier to see. <text:s/></text:span></text:p>
        </text:list-item>
      </text:list>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oft-page-break/><text:span text:style-name="T12"/></text:p>
      <text:p text:style-name="P30"><text:span text:style-name="T12"/></text:p>
      <text:p text:style-name="P30"><text:span text:style-name="T12"/></text:p>
      <text:p text:style-name="P32"><text:span text:style-name="T12">Grok, we have some work to do:</text:span></text:p>
      <text:p text:style-name="P32"><text:span text:style-name="T12"/></text:p>
      <text:list xml:id="list1215572425" text:style-name="L9">
        <text:list-item>
          <text:p text:style-name="P33"><text:span text:style-name="T12">In the main page, I created a video and amplified it. I pull up history, and there’s no videos listed. I go to audio, and the video I just created is listed, but it’s only an audio track, not video. </text:span></text:p>
        </text:list-item>
        <text:list-item>
          <text:p text:style-name="P33"><text:span text:style-name="T12">On the calendar page, I can see text listed. There’s nothing listed under audio. Under Video</text:span><text:span text:style-name="T19">s I’ve created. They say they are .webm, <text:s/>but I’m not sure if they are really videos since they are only saving in history as audio.</text:span></text:p>
        </text:list-item>
        <text:list-item>
          <text:p text:style-name="P34"><text:span text:style-name="T12">When I click add to calendar and the Schedule Post box appears, I can’t see the calendar or clock, but I can click on them.</text:span></text:p>
        </text:list-item>
        <text:list-item>
          <text:p text:style-name="P34"><text:span text:style-name="T12">I scheduled a post, it did not post.</text:span></text:p>
        </text:list-item>
        <text:list-item>
          <text:p text:style-name="P34"><text:span text:style-name="T12">When I click on the post now button, it did not post. Instead I got a pop up that said it was a simulated post. Very little of this calendar worked, but the post now button did. Why is it now turned off?</text:span></text:p>
        </text:list-item>
      </text:list>
      <text:p text:style-name="P35"><text:span text:style-name="T12"/></text:p>
      <text:p text:style-name="P35"><text:span text:style-name="T12">I need this app to work so please focus up and see what we can do. Do not post more code, instead I need you to analyze all code in my GitHub repo for this app, if needed I can post some or al of the code here, and I need to to debug this for me please. Can you do this chief? </text:span></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22T01:19:57.098000000</meta:creation-date>
    <dc:date>2026-05-22T15:56:00.668000000</dc:date>
    <meta:editing-duration>PT56M54S</meta:editing-duration>
    <meta:editing-cycles>3</meta:editing-cycles>
    <meta:generator>LibreOffice/7.3.2.2$Windows_X86_64 LibreOffice_project/49f2b1bff42cfccbd8f788c8dc32c1c309559be0</meta:generator>
    <meta:document-statistic meta:table-count="0" meta:image-count="0" meta:object-count="0" meta:page-count="6" meta:paragraph-count="39" meta:word-count="1886" meta:character-count="9940" meta:non-whitespace-character-count="8099"/>
  </office:meta>
</office:document-meta>
</file>
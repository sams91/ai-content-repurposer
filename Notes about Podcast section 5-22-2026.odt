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1b58" officeooo:paragraph-rsid="001c1b58"/>
    </style:style>
    <style:style style:name="P2" style:family="paragraph" style:parent-style-name="Standard">
      <style:text-properties officeooo:rsid="001d4274" officeooo:paragraph-rsid="001d4274"/>
    </style:style>
    <style:style style:name="P3" style:family="paragraph" style:parent-style-name="Standard" style:list-style-name="L1">
      <style:text-properties officeooo:rsid="001d4274" officeooo:paragraph-rsid="001d4274"/>
    </style:style>
    <style:style style:name="P4" style:family="paragraph" style:parent-style-name="Standard" style:list-style-name="L1">
      <style:text-properties officeooo:rsid="001efcea" officeooo:paragraph-rsid="001efcea"/>
    </style:style>
    <style:style style:name="P5" style:family="paragraph" style:parent-style-name="Standard">
      <style:text-properties officeooo:rsid="001efcea" officeooo:paragraph-rsid="001efcea"/>
    </style:style>
    <style:style style:name="P6" style:family="paragraph" style:parent-style-name="Standard" style:list-style-name="L1">
      <style:text-properties officeooo:rsid="001f1821" officeooo:paragraph-rsid="001f1821"/>
    </style:style>
    <style:style style:name="T1" style:family="text">
      <style:text-properties officeooo:rsid="001efcea"/>
    </style:style>
    <style:style style:name="T2" style:family="text">
      <style:text-properties officeooo:rsid="002048c8"/>
    </style:style>
    <style:style style:name="T3" style:family="text">
      <style:text-properties officeooo:rsid="0020ae4e"/>
    </style:style>
    <style:style style:name="T4" style:family="text">
      <style:text-properties officeooo:rsid="0022316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about Podcast section 5-22-2026</text:p>
      <text:p text:style-name="P1"/>
      <text:p text:style-name="P1"/>
      <text:p text:style-name="P1"/>
      <text:p text:style-name="P1"/>
      <text:p text:style-name="P1"/>
      <text:p text:style-name="P2">Audio files are now being loaded to history! Here are some observations:</text:p>
      <text:p text:style-name="P2"/>
      <text:list xml:id="list1605870521" text:style-name="L1">
        <text:list-item>
          <text:p text:style-name="P3">What is the point of the “Smart Clips” function? I was thinking AI was selecting the best 15, 30, and 60 seconds of the video or audio, but it looks more like smart clips is just taking the first 15, 30, and 60 seconds of it, not the “best” 15, 30, and 60 seconds if that makes sense.</text:p>
        </text:list-item>
      </text:list>
      <text:p text:style-name="P2"/>
      <text:p text:style-name="P2"/>
      <text:list xml:id="list21539088709842" text:continue-numbering="true" text:style-name="L1">
        <text:list-item>
          <text:p text:style-name="P3">The Burn Captions function isn’t working for audio. A file is downloaded, but there’s no captioning. I’m wondering if <text:span text:style-name="T1">a</text:span>udio would need the captions. I can see the purpose of them for video, but I’m not sure about audio. I’m not saying I want to remove the functionality yet, I just want to understand the purpose before devoting 4 hours to debugging.</text:p>
        </text:list-item>
      </text:list>
      <text:p text:style-name="P2"/>
      <text:p text:style-name="P2"/>
      <text:list xml:id="list21539690276675" text:continue-numbering="true" text:style-name="L1">
        <text:list-item>
          <text:p text:style-name="P4">Thumbnail isn’t working for audio either, but I wouldn’t expect it to since it isn’t using AI. If it was connected to AI, how would it work? Would it generate an image on the fly, based on the audio? If so, am I correct in assuming that would burn through a lot of tokens? In the Open AI dashboard, in the recommended models section, I see an image model (screenshot). Is this included with what I’ve currently paid for, or is this an upgrade I’d need to pay extra for? Either way, could this be used to generate the thumbnails for video and audio? <text:span text:style-name="T3">If this is an upgrade I’d need to pay extra for, what do you recommend we do for now since I don’t want to pay extra for anything until we are closer to deployment (or after)? We could code it as though we are connecting to AI already, but we wouldn’t be able to test, which is a bad idea. How hard is it to push changes post deployment? </text:span><text:span text:style-name="T4">Would it be better to leave this functionality as is, then upgrade to AI after deploying to production?</text:span></text:p>
        </text:list-item>
      </text:list>
      <text:p text:style-name="P5"/>
      <text:p text:style-name="P5"/>
      <text:list xml:id="list21538242312714" text:continue-numbering="true" text:style-name="L1">
        <text:list-item>
          <text:p text:style-name="P6">3 more things about the smart clips section: 1) when I use it for audio, it says “Smart Clips for this video”. We’ll need to change this so it says audio when it’s an audio file, and video when it’s a video file. 2) Is there any merit to generating “smart clips” of text from the text part of the app? I’m not sure how that would work, or if it would be useful, but I’m curious what your thoughts are on the subject. 3) Once smart clips are generated, a box with 3 smart clip sections pops up. Once you click outside of this box it disappears forever <text:span text:style-name="T2">and the only way to bring it up again is to regenerate the smart clips. I’m guessing this is because we haven’t created a storage place for them in Supabase. If that is the case, approximately how much time and frustration would it cost to save smart clips in history along with the audio or video file itself? The idea would be once a user generates smart clips, then clicks out of the smart clips box, the generated smart clips would be saved along with the file in history. The “Smart Clips” button would still be available for them to generate new smart clips if they chose to, but what they had already generated would also be available. Now that I’m thinking this through, maybe this isn’t needed because the user has already </text:span><text:span text:style-name="T3">downloaded what files they wanted so there’s no need to maintain a persistent history of them. I think I just talked myself out of this. What are your thoughts, would adding smart clips to the history be more trouble than it’s worth? I do think we should </text:span><text:soft-page-break/><text:span text:style-name="T3">add some kind of tool tip at the top that lets users know if they click out of the smart clips section they’ll have to regenerate them. That may be the best approach. </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22T01:19:57.098000000</meta:creation-date>
    <dc:date>2026-05-22T02:15:37.325000000</dc:date>
    <meta:editing-duration>PT3M39S</meta:editing-duration>
    <meta:editing-cycles>2</meta:editing-cycles>
    <meta:generator>LibreOffice/7.3.2.2$Windows_X86_64 LibreOffice_project/49f2b1bff42cfccbd8f788c8dc32c1c309559be0</meta:generator>
    <meta:document-statistic meta:table-count="0" meta:image-count="0" meta:object-count="0" meta:page-count="2" meta:paragraph-count="6" meta:word-count="654" meta:character-count="3442" meta:non-whitespace-character-count="2797"/>
  </office:meta>
</office:document-meta>
</file>
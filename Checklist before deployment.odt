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20687d" officeooo:paragraph-rsid="0020687d"/>
    </style:style>
    <style:style style:name="P2" style:family="paragraph" style:parent-style-name="Standard" style:list-style-name="L7">
      <style:text-properties officeooo:rsid="0020687d" officeooo:paragraph-rsid="0020687d"/>
    </style:style>
    <style:style style:name="P3" style:family="paragraph" style:parent-style-name="Standard" style:list-style-name="L7">
      <style:text-properties officeooo:rsid="00207c95" officeooo:paragraph-rsid="00207c95"/>
    </style:style>
    <style:style style:name="P4" style:family="paragraph" style:parent-style-name="Standard" style:list-style-name="L7">
      <style:text-properties officeooo:rsid="00210fdf" officeooo:paragraph-rsid="00210fdf"/>
    </style:style>
    <style:style style:name="P5" style:family="paragraph" style:parent-style-name="Standard">
      <style:text-properties officeooo:rsid="00210fdf" officeooo:paragraph-rsid="00210fdf"/>
    </style:style>
    <style:style style:name="P6" style:family="paragraph" style:parent-style-name="Standard">
      <style:text-properties officeooo:rsid="0022d2c0" officeooo:paragraph-rsid="0022d2c0"/>
    </style:style>
    <style:style style:name="T1" style:family="text">
      <style:text-properties officeooo:rsid="00207c95"/>
    </style:style>
    <style:style style:name="T2" style:family="text">
      <style:text-properties officeooo:rsid="00210fdf"/>
    </style:style>
    <style:style style:name="T3" style:family="text">
      <style:text-properties officeooo:rsid="0022d2c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Ok please lists the steps as a checklist for the following:</text:p>
      <text:p text:style-name="P1"/>
      <text:list xml:id="list3769763830" text:style-name="L7">
        <text:list-item>
          <text:p text:style-name="P2">retool the pricing page to reflect what we have discussed earlier, <text:span text:style-name="T1">with a trial tier and a paid tier.</text:span></text:p>
        </text:list-item>
        <text:list-item>
          <text:p text:style-name="P3">The paid tier should have options form monthly and annual billing. Monthly should be $15 and annual should be $153. Do you agree those are good prices?</text:p>
        </text:list-item>
        <text:list-item>
          <text:p text:style-name="P4">I feel like there is some kind of logical flow from users going to the why amplify, going to the pricing page, signing up for an account, then using the app. I need you to map this out in detail <text:s/>and ensure everything is in place and in the correct order before we deploy the app to prod.</text:p>
        </text:list-item>
        <text:list-item>
          <text:p text:style-name="P3">I don’t know which should be done first, deploy the app, or connect to lemon squeezy. I will list them below as needed steps, but please list them in the order they should be done in. also, currently the app is set up so I don’t need to log in. This was for testing purposes. Before we deploy, this should be changed so users need to create an account and log in before then can use the app. This does not apply to the marketing/why amplify page or the billing/pricing page, users should not need an account to view either of those pages. If a user clicks on one of the pricing options on the pricing page (trial or pro) they should be required to create an account before <text:span text:style-name="T2">processing a payment or</text:span> being able to proceed with using a trial or paid version of the app. <text:span text:style-name="T2">I hope all of this makes sense. Please ask for clarification if needed.</text:span></text:p>
        </text:list-item>
        <text:list-item>
          <text:p text:style-name="P3">connect the app to lemon squeezy</text:p>
        </text:list-item>
        <text:list-item>
          <text:p text:style-name="P3">deploy the app using vercel</text:p>
        </text:list-item>
        <text:list-item>
          <text:p text:style-name="P4">once the app is deployed to prod, I get that URL, sign up for a Zernio affiliate link. I give that link to you. You bake it into the app in a logical way and place that makes sense and has the highest potential for use.</text:p>
        </text:list-item>
        <text:list-item>
          <text:p text:style-name="P2">You give me the prompts and everything I need to create the hero/demo video for our why amplify page using creatify.</text:p>
        </text:list-item>
        <text:list-item>
          <text:p text:style-name="P3">I take everything to creatify. I need a list of everything I need to give them. They create the video.</text:p>
        </text:list-item>
        <text:list-item>
          <text:p text:style-name="P3">I give you the video.</text:p>
        </text:list-item>
        <text:list-item>
          <text:p text:style-name="P3">You take the video and turn the why amplify page <text:span text:style-name="T2">into</text:span> the kind of marketing page that leads to lighting cigars with $100.</text:p>
        </text:list-item>
        <text:list-item>
          <text:p text:style-name="P3">the why amplify page needs to be set up so users can access it and the billing/subscription page without logging in, but to use the rest of the app, they need an account. <text:span text:style-name="T2">Once a user has an account, trial or pro, they should then have full access to the app. If it is a trial version, they should loose that full access after 14 days.</text:span></text:p>
        </text:list-item>
        <text:list-item>
          <text:p text:style-name="P4">Once we have the hero/demo video and you have the why amplify page looking rock star solid, <text:span text:style-name="T3">I then take the URL to my app and go to tic tok and meta for the ad campaigns. I’ll need a step by step check list for doing option “A” you have listed.</text:span></text:p>
        </text:list-item>
      </text:list>
      <text:p text:style-name="P5"/>
      <text:p text:style-name="P5"/>
      <text:p text:style-name="P6">Please analyze everything I have listed above and list anything I may have left out. Then give me a rough estimate for completing each task, and for completing everything. Once you have done all of this, do another deep dive analysis to ensure everything is correct and nothing is missing, then give me a detailed, step by step, checklist of everything I have listed above, every thing I need to do to get to where we currently are, to full deployment with paying users. When I have this checklist, I’ll bake it into the project instructions so we can keep track of what is needed and track our progres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5-24T03:25:00.125000000</meta:creation-date>
    <dc:date>2026-05-24T05:52:49.837000000</dc:date>
    <meta:editing-duration>PT3M26S</meta:editing-duration>
    <meta:editing-cycles>1</meta:editing-cycles>
    <meta:document-statistic meta:table-count="0" meta:image-count="0" meta:object-count="0" meta:page-count="1" meta:paragraph-count="15" meta:word-count="640" meta:character-count="3269" meta:non-whitespace-character-count="2656"/>
    <meta:generator>LibreOffice/7.3.2.2$Windows_X86_64 LibreOffice_project/49f2b1bff42cfccbd8f788c8dc32c1c309559be0</meta:generator>
  </office:meta>
</office:document-meta>
</file>
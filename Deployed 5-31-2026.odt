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eist" svg:font-family="Geist, Arial, 'Apple Color Emoji', 'Segoe UI Emoji', 'Segoe UI Symbo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eistMonoFont" svg:font-family="geistMonoFont, ui-monospace, SFMono-Regular, 'Roboto Mono', Menlo, Monaco, 'Liberation Mono', 'DejaVu Sans Mono', 'Courier New', monospace, 'Apple Color Emoji', 'Segoe UI Emoji', 'Segoe UI Symbol', ui-monospace, SFMono-Regular, Menlo, Monaco, Consolas, 'Liberation Mono', 'Courier New', monospace"/>
  </office:font-face-decls>
  <office:automatic-styles>
    <style:style style:name="P1" style:family="paragraph" style:parent-style-name="Standard">
      <style:text-properties fo:font-variant="normal" fo:text-transform="none" fo:color="#171717" loext:opacity="100%" style:font-name="geistMonoFont" fo:font-size="10.5pt" fo:letter-spacing="normal" fo:font-style="normal" fo:font-weight="normal" officeooo:rsid="0025b4bc" officeooo:paragraph-rsid="0025b4bc" loext:padding="0in" loext:border="none"/>
    </style:style>
    <style:style style:name="P2" style:family="paragraph" style:parent-style-name="Standard">
      <style:paragraph-properties fo:orphans="2" fo:widows="2"/>
      <style:text-properties fo:font-variant="normal" fo:text-transform="none" fo:color="#171717" loext:opacity="100%" style:font-name="Geist" fo:font-size="10.5pt" fo:letter-spacing="normal" fo:font-style="normal" fo:font-weight="normal" loext:padding="0in" loext:border="none"/>
    </style:style>
    <style:style style:name="P3" style:family="paragraph" style:parent-style-name="Standard">
      <style:paragraph-properties fo:line-height="125%" fo:orphans="2" fo:widows="2"/>
      <style:text-properties fo:font-variant="normal" fo:text-transform="none" fo:color="#cb2a2f" loext:opacity="100%" style:font-name="geistMonoFont" fo:font-size="10.5pt" fo:letter-spacing="normal" fo:font-style="normal" fo:font-weight="normal" fo:background-color="#ffebeb" loext:padding="0in" loext:border="none"/>
    </style:style>
    <style:style style:name="P4" style:family="paragraph" style:parent-style-name="Standard">
      <style:text-properties officeooo:rsid="0025b4bc" officeooo:paragraph-rsid="0025b4bc"/>
    </style:style>
    <style:style style:name="P5" style:family="paragraph" style:parent-style-name="Text_20_body">
      <style:text-properties officeooo:rsid="0020e053" officeooo:paragraph-rsid="0020e053"/>
    </style:style>
    <style:style style:name="P6" style:family="paragraph" style:parent-style-name="Text_20_body">
      <style:text-properties officeooo:rsid="0021409c" officeooo:paragraph-rsid="0021409c"/>
    </style:style>
    <style:style style:name="P7" style:family="paragraph" style:parent-style-name="Text_20_body">
      <style:text-properties officeooo:rsid="0021409c" officeooo:paragraph-rsid="0022b225"/>
    </style:style>
    <style:style style:name="P8" style:family="paragraph" style:parent-style-name="Text_20_body">
      <style:text-properties officeooo:rsid="0022b225" officeooo:paragraph-rsid="0022b225"/>
    </style:style>
    <style:style style:name="P9" style:family="paragraph" style:parent-style-name="Text_20_body">
      <style:text-properties officeooo:rsid="002397ae" officeooo:paragraph-rsid="002397ae"/>
    </style:style>
    <style:style style:name="P10" style:family="paragraph" style:parent-style-name="Text_20_body" style:list-style-name="L1">
      <style:text-properties officeooo:rsid="002397ae" officeooo:paragraph-rsid="002397ae"/>
    </style:style>
    <style:style style:name="P11" style:family="paragraph" style:parent-style-name="Text_20_body" style:list-style-name="L1">
      <style:text-properties officeooo:rsid="002397ae" officeooo:paragraph-rsid="00242e2c"/>
    </style:style>
    <style:style style:name="P12" style:family="paragraph" style:parent-style-name="Text_20_body" style:list-style-name="L1">
      <style:text-properties officeooo:rsid="002397ae" officeooo:paragraph-rsid="00298f15"/>
    </style:style>
    <style:style style:name="P13" style:family="paragraph" style:parent-style-name="Text_20_body">
      <style:text-properties officeooo:rsid="002397ae" officeooo:paragraph-rsid="00242e2c"/>
    </style:style>
    <style:style style:name="P14" style:family="paragraph" style:parent-style-name="Text_20_body">
      <style:text-properties officeooo:rsid="00242e2c" officeooo:paragraph-rsid="00242e2c"/>
    </style:style>
    <style:style style:name="P15" style:family="paragraph" style:parent-style-name="Text_20_body">
      <style:text-properties officeooo:paragraph-rsid="00254e46"/>
    </style:style>
    <style:style style:name="P16" style:family="paragraph" style:parent-style-name="Text_20_body">
      <style:text-properties officeooo:rsid="0025b4bc" officeooo:paragraph-rsid="0025b4bc"/>
    </style:style>
    <style:style style:name="P17" style:family="paragraph" style:parent-style-name="Text_20_body">
      <style:text-properties officeooo:paragraph-rsid="0027002b"/>
    </style:style>
    <style:style style:name="P18" style:family="paragraph" style:parent-style-name="Text_20_body">
      <style:text-properties officeooo:rsid="00276bba" officeooo:paragraph-rsid="00276bba"/>
    </style:style>
    <style:style style:name="P19" style:family="paragraph" style:parent-style-name="Text_20_body">
      <style:text-properties officeooo:rsid="00298f15" officeooo:paragraph-rsid="00298f15"/>
    </style:style>
    <style:style style:name="P20" style:family="paragraph" style:parent-style-name="Text_20_body" style:list-style-name="L1">
      <style:text-properties officeooo:rsid="00298f15" officeooo:paragraph-rsid="00298f15"/>
    </style:style>
    <style:style style:name="P21" style:family="paragraph" style:parent-style-name="Text_20_body" style:list-style-name="L1">
      <style:text-properties officeooo:rsid="002b2eed" officeooo:paragraph-rsid="002b2eed"/>
    </style:style>
    <style:style style:name="P22" style:family="paragraph" style:parent-style-name="Text_20_body" style:list-style-name="L1">
      <style:text-properties officeooo:rsid="002b7e05" officeooo:paragraph-rsid="002b7e05"/>
    </style:style>
    <style:style style:name="P23" style:family="paragraph" style:parent-style-name="Text_20_body">
      <style:text-properties officeooo:rsid="002b7e05" officeooo:paragraph-rsid="002b7e05"/>
    </style:style>
    <style:style style:name="T1" style:family="text">
      <style:text-properties officeooo:rsid="001f5383"/>
    </style:style>
    <style:style style:name="T2" style:family="text">
      <style:text-properties officeooo:rsid="00200628"/>
    </style:style>
    <style:style style:name="T3" style:family="text">
      <style:text-properties officeooo:rsid="0020e053"/>
    </style:style>
    <style:style style:name="T4" style:family="text">
      <style:text-properties officeooo:rsid="0022b225"/>
    </style:style>
    <style:style style:name="T5" style:family="text">
      <style:text-properties officeooo:rsid="00242e2c"/>
    </style:style>
    <style:style style:name="T6" style:family="text">
      <style:text-properties officeooo:rsid="001b445a"/>
    </style:style>
    <style:style style:name="T7" style:family="text">
      <style:text-properties officeooo:rsid="00254e46"/>
    </style:style>
    <style:style style:name="T8" style:family="text">
      <style:text-properties officeooo:rsid="0027002b"/>
    </style:style>
    <style:style style:name="T9" style:family="text">
      <style:text-properties officeooo:rsid="002845bc"/>
    </style:style>
    <style:style style:name="T10" style:family="text">
      <style:text-properties officeooo:rsid="002b7e0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Text_20_body"><text:span text:style-name="T1">In a previous thread, y</text:span>ou were helping me resolve some issues so I could deploy my app. <text:span text:style-name="T1">You asked me to post code </text:span><text:span text:style-name="T3">for supabase and the pricing page</text:span><text:span text:style-name="T1"> to analyze. Before I post the code and the errors I’m seeing, I need to explain what the correct process for new users is. New users need to create an account. Once they create an account, they should be given the choice of signing up for the free 14 day trial, or a paid subscription. If the new user pays for an account, they should be granted full access to the app until </text:span><text:span text:style-name="T2">they cancel and no longer pay. If the new user signs up for the free 14 day trial, they should be granted full access until</text:span><text:span text:style-name="T1"> the end of the 14 days. </text:span><text:span text:style-name="T2">The very next time the user logs into their account they should be directed to the lemon squeezy checkout page and their access should be blocked until they pay for the subscription. Any user who clicks on the free 14 day trial button should be checked to determine whether they already have an account, if yes they should be directed </text:span><text:span text:style-name="T3">to </text:span><text:span text:style-name="T2">log </text:span><text:span text:style-name="T3">in</text:span><text:span text:style-name="T2">, if no they should be directed to create an account. Once the user has the account created, they should follow the same process outlined above where they are give the choice of signing up for a free 14 day trail, or a paid subscription. </text:span><text:span text:style-name="T3">Returning users that already have an account and already signed up for a paid account should be granted full access until they cancel and no longer pay. Returning users that already have an account and already signed up for a free 14 day trial should be granted full access to the app until the end of the 14 days, then the next time they log in they should be directed to the lemon squeezy checkout page and their access to the app should be blocked until they pay for a subscription. You also had me create a table in supabase, I will post screenshots of it so you understand when changes are needed in the code.</text:span></text:p>
      <text:p text:style-name="Text_20_body"/>
      <text:p text:style-name="P5">Here is the cod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7">I currently already have app\api\webhooks\lemon\route.ts</text:p>
      <text:p text:style-name="P7"/>
      <text:p text:style-name="P7"><text:span text:style-name="T4">I don’t have middleware.ts, instead I have </text:span>proxy.ts</text:p>
      <text:p text:style-name="P6"/>
      <text:p text:style-name="P6"/>
      <text:p text:style-name="P6"/>
      <text:p text:style-name="P6"/>
      <text:p text:style-name="P6"/>
      <text:p text:style-name="P9">Here are my responses:</text:p>
      <text:p text:style-name="P9"/>
      <text:list xml:id="list4287122970" text:style-name="L1">
        <text:list-item>
          <text:p text:style-name="P10">“prox.ts” is in root, not app\api</text:p>
        </text:list-item>
      </text:list>
      <text:p text:style-name="P9"/>
      <text:list xml:id="list121850795766229" text:continue-numbering="true" text:style-name="L1">
        <text:list-item>
          <text:p text:style-name="P11">I do not have “middleware.ts” because there was some kind of issue associated with it and it caused things to break. I don’t remember the exact problem, but I think something about it was deprecated. In a previous thread you told me to create “proxy.ts” and this worked and resolved the issues I was having when trying to use “middleware.ts”. For some reason, every time I have to start a new thread, you always either want me to create “middleware.ts”, assume it’s already created, or you tell me to delete “proxy.ts” and replace it with “middleware.ts”. <text:span text:style-name="T5">At one point you had me create both </text:span>“middleware.ts” <text:span text:style-name="T5">and “proxy.ts”, but that broke the app because it needs one or the other and can’t use both.</text:span> <text:span text:style-name="T5">In one thread, You had me create </text:span>“middleware.ts”, <text:span text:style-name="T5">then delete it and create, “proxy.ts”, then delete it and create </text:span>“middleware.ts”, <text:span text:style-name="T5">then delete it and create “proxy.ts, then delete it and create </text:span>“middleware.ts”. <text:span text:style-name="T5">It was a loop I barely got out of. I don’t want to go through that again so what ever we do, can we please stick with “proxy.ts”?</text:span></text:p>
        </text:list-item>
        <text:list-item>
          <text:p text:style-name="P11"><text:span text:style-name="T5">In a previous thread you had me run “</text:span>npm run build” <text:span text:style-name="T5">and said if the build was successful, then the app could successfully deploy on Vercel. I ran “npm run build” and it was successful, but the deployment on Vercel still failed.</text:span></text:p>
        </text:list-item>
      </text:list>
      <text:p text:style-name="P13"/>
      <text:p text:style-name="P14">Now that you know this, what should I do next? </text:p>
      <text:p text:style-name="P8"/>
      <text:p text:style-name="P8"/>
      <text:p text:style-name="P8"/>
      <text:p text:style-name="P8"><text:soft-page-break/></text:p>
      <text:p text:style-name="P8"/>
      <text:p text:style-name="P8"/>
      <text:p text:style-name="P8"/>
      <text:p text:style-name="P8">Here is the output from the failed Vercel deployment: Running build in Washington, D.C., USA (East) – iad1 Build machine configuration: 4 cores, 8 GB Cloning github.com/sams91/ai-content-repurposer (Branch: main, Commit: 04b91c4) Previous build caches not available. Cloning completed: 915.000ms Running "vercel build" Vercel CLI 54.4.1 Installing dependencies... npm warn deprecated fluent-ffmpeg@2.1.3: Package no longer supported. Contact Support at https://www.npmjs.com/support for more info. added 473 packages in 15s 155 packages are looking for funding   run npm fund for details Detected Next.js version: 16.2.6 Running "npm run build"</text:p>
      <text:p text:style-name="P8"/>
      <text:p text:style-name="P8"/>
      <text:p text:style-name="P8"/>
      <text:p text:style-name="P15"><text:s/><text:span text:style-name="T6">I don’t have “</text:span>next.config.js” or “next.config.mjs”, <text:span text:style-name="T7">instead I have</text:span><text:span text:style-name="T6"> “net.config.ts, </text:span><text:span text:style-name="T7">could that be the issue?</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18">In a previous thread, you asked me to provide the information from the failed Vercel deployment, and the VS Code terminal from the successful build. After I provided this, you told me I needed to add the supabase environment keys, and the lemon squeezy webhook key to the Vercel envirenonment variables. I looked this up and the 2 supabase keys are already there (Screenshots provided). I can’t create the lemon squeezy webhook key until I deploy, but you were saying the reason the deployment failed is because I hadn’t provided this key. This create a chicken and egg problem that I don’t understand. You started to give me som<text:span text:style-name="T9">e</text:span> kind of work around by using a “place holder” URL to create the lemon squeezy webhook key, but it’s hard for me to believe that before I can deploy my app, Vercel would require me to provide something that I can’t create until after I deploy the app. <text:span text:style-name="T9">Please locate the real issue preventing me from deploying my app and help me resolve it.</text:span></text:p>
      <text:p text:style-name="P8"/>
      <text:p text:style-name="P16">Here is the error from the Vercel deployment:</text:p>
      <text:p text:style-name="P16"/>
      <text:p text:style-name="P1">[AI Config] Using provider: openai</text:p>
      <text:p text:style-name="P3">Error: supabaseKey is required.</text:p>
      <text:p text:style-name="P3">at module evaluation (.next/server/chunks/[root-of-the-server]__12jdrrt._.js:1:1812)</text:p>
      <text:p text:style-name="P3">at instantiateModule (.next/server/chunks/[turbopack]_runtime.js:853:9)</text:p>
      <text:p text:style-name="P3">at instantiateRuntimeModule (.next/server/chunks/[turbopack]_runtime.js:882:12)</text:p>
      <text:p text:style-name="P3">at getOrInstantiateRuntimeModule (.next/server/chunks/[turbopack]_runtime.js:895:12)</text:p>
      <text:p text:style-name="P3">at Object.m (.next/server/chunks/[turbopack]_runtime.js:898:18)</text:p>
      <text:p text:style-name="P3">at Object.&lt;anonymous&gt; (.next/server/app/api/amplify-audio/route.js:8:3)</text:p>
      <text:p text:style-name="P3">&gt; Build error occurred</text:p>
      <text:p text:style-name="P3">Error: Failed to collect page data for /api/amplify-audio</text:p>
      <text:p text:style-name="P3">at ignore-listed frames {</text:p>
      <text:p text:style-name="P3">type: 'Error'</text:p>
      <text:p text:style-name="P2">}</text:p>
      <text:p text:style-name="P3">Error: Command "npm run build" exited with 1</text:p>
      <text:p text:style-name="Standard"><text:line-break/></text:p>
      <text:p text:style-name="Standard"/>
      <text:p text:style-name="Standard"/>
      <text:p text:style-name="P4">Here is the output from the VS Code terminal:</text:p>
      <text:p text:style-name="P4"/>
      <text:p text:style-name="P4">PS D:\VS Code\ai-content-repurposer&gt; npm run build</text:p>
      <text:p text:style-name="P4"/>
      <text:p text:style-name="P4">&gt; ai-content-repurposer@0.1.0 build</text:p>
      <text:p text:style-name="P4">&gt; next build</text:p>
      <text:p text:style-name="P4"/>
      <text:p text:style-name="P4">▲ Next.js 16.2.6 (Turbopack)</text:p>
      <text:p text:style-name="P4">- Environments: .env.local</text:p>
      <text:p text:style-name="P4"><text:soft-page-break/>- Experiments (use with caution):</text:p>
      <text:p text:style-name="P4"><text:s text:c="2"/>· proxyClientMaxBodySize: "2gb"</text:p>
      <text:p text:style-name="P4"/>
      <text:p text:style-name="P4"><text:s text:c="2"/>Creating an optimized production build ...</text:p>
      <text:p text:style-name="P4">✓ Compiled successfully in 82s</text:p>
      <text:p text:style-name="P4">✓ Finished TypeScript in 31.1s <text:s text:c="3"/></text:p>
      <text:p text:style-name="P4"><text:s text:c="2"/>Collecting page data using 3 workers <text:s/>..[AI Config] Using provider: openai</text:p>
      <text:p text:style-name="P4">[AI Config] Using provider: openai</text:p>
      <text:p text:style-name="P4">✓ Collecting page data using 3 workers in 3.0s <text:s text:c="3"/></text:p>
      <text:p text:style-name="P4"><text:s text:c="2"/>Generating static pages using 3 workers (0/23) <text:s/>[ <text:s text:c="3"/>][AI Config] Using provider: openai</text:p>
      <text:p text:style-name="P4">✓ Generating static pages using 3 workers (23/23) in 802ms</text:p>
      <text:p text:style-name="P4">✓ Finalizing page optimization in 125ms <text:s text:c="3"/></text:p>
      <text:p text:style-name="P4"/>
      <text:p text:style-name="P4">Route (app)</text:p>
      <text:p text:style-name="P4">┌ ○ /</text:p>
      <text:p text:style-name="P4">├ ○ /_not-found</text:p>
      <text:p text:style-name="P4">├ ƒ /api/amplify-audio</text:p>
      <text:p text:style-name="P4">├ ƒ /api/amplify-video</text:p>
      <text:p text:style-name="P4">├ ƒ /api/burn-captions</text:p>
      <text:p text:style-name="P4">├ ƒ /api/generate-thumbnail</text:p>
      <text:p text:style-name="P4">├ ƒ /api/optimize-video</text:p>
      <text:p text:style-name="P4">├ ƒ /api/process-scheduled-posts</text:p>
      <text:p text:style-name="P4">├ ƒ /api/repurpose</text:p>
      <text:p text:style-name="P4">├ ƒ /api/smart-clip</text:p>
      <text:p text:style-name="P4">├ ƒ /api/webhooks/lemon</text:p>
      <text:p text:style-name="P4">├ ƒ /api/zernio/accounts</text:p>
      <text:p text:style-name="P4">├ ƒ /api/zernio/analytics</text:p>
      <text:p text:style-name="P4">├ ƒ /api/zernio/post</text:p>
      <text:p text:style-name="P4">├ ƒ /auth/callback</text:p>
      <text:p text:style-name="P4">├ ○ /auth/login</text:p>
      <text:p text:style-name="P4">├ ○ /calendar</text:p>
      <text:p text:style-name="P4">├ ○ /dashboard</text:p>
      <text:p text:style-name="P4">├ ○ /pricing</text:p>
      <text:p text:style-name="P4">├ ƒ /share/[id]</text:p>
      <text:p text:style-name="P4">├ ○ /terms</text:p>
      <text:p text:style-name="P4">└ ○ /why-amplify</text:p>
      <text:p text:style-name="P4"/>
      <text:p text:style-name="P4"/>
      <text:p text:style-name="P4">ƒ Proxy (Middleware)</text:p>
      <text:p text:style-name="P4"/>
      <text:p text:style-name="P4">○ <text:s/>(Static) <text:s text:c="2"/>prerendered as static content</text:p>
      <text:p text:style-name="P4">ƒ <text:s/>(Dynamic) <text:s/>server-rendered on demand</text:p>
      <text:p text:style-name="P4"/>
      <text:p text:style-name="P4">PS D:\VS Code\ai-content-repurposer&gt; </text:p>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17"><text:span text:style-name="T8">Both supabase keys seem to already be there, and I can’t create the “</text:span>LEMON_SQUEEZY_WEBHOOK_SECRET” <text:span text:style-name="T8">until after I deploy, so what exactly am I supposed to be doing here?</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text:a xlink:type="simple" xlink:href="https://ai-content-repurposer-aeu5cue3v-content-amplifier.vercel.app/auth/login?redirectTo=%2F" text:style-name="Internet_20_link" text:visited-style-name="Visited_20_Internet_20_Link">Create Next App</text:a> </text:p>
      <text:p text:style-name="P8"/>
      <text:p text:style-name="P8"><text:s/></text:p>
      <text:p text:style-name="P8"><text:a xlink:type="simple" xlink:href="https://ai-content-repurposer-aeu5cue3v-content-amplifier.vercel.app/auth/login?redirectTo=%2F" text:style-name="Internet_20_link" text:visited-style-name="Visited_20_Internet_20_Link">Create Next App</text:a></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19">The deployment worked, but it looks like there are a few things we need to address:</text:p>
      <text:p text:style-name="P19"/>
      <text:list xml:id="list121851604134067" text:continue-numbering="true" text:style-name="L1">
        <text:list-item>
          <text:p text:style-name="P12">I do not have “middleware.ts” because there was some kind of issue associated with it and it caused things to break. I don’t remember the exact problem, but I think something about it was deprecated. In a previous thread you told me to create “proxy.ts” and this worked and resolved the issues I was having when trying to use “middleware.ts”. For some reason, every time I have to start a new thread, you always either want me to create “middleware.ts”, assume it’s already created, or you tell me to delete “proxy.ts” and replace it with “middleware.ts”. <text:span text:style-name="T5">At one point you had me create both </text:span>“middleware.ts” <text:span text:style-name="T5">and “proxy.ts”, but that broke the app because it needs one or the other and can’t use both.</text:span> <text:span text:style-name="T5">In one thread, You had me create </text:span>“middleware.ts”, <text:span text:style-name="T5">then delete it and create, “proxy.ts”, then delete it and create </text:span>“middleware.ts”, <text:span text:style-name="T5">then delete it and create “proxy.ts, then delete it and create </text:span>“middleware.ts”. <text:span text:style-name="T5">It was a loop I barely got out of. I don’t want to go through that again so what ever we do, can we please stick with “proxy.ts”?</text:span></text:p>
        </text:list-item>
        <text:list-item>
          <text:p text:style-name="P20">I am signed in to the live production version of the app. I tried to Amplify a video, but I received an error saying I needed to be signed in to amplify videos.</text:p>
        </text:list-item>
        <text:list-item>
          <text:p text:style-name="P21">History is empty. I had text, videos, and audio files in history before I deployed. Is history empty now because I am in the live prod environment, or is there an issue with supabase?</text:p>
        </text:list-item>
        <text:list-item>
          <text:p text:style-name="P21">The content history on the calendar page has everything that was in it before I deployed to the live prod environment. Why would this have everything, but history be empty?</text:p>
        </text:list-item>
        <text:list-item>
          <text:p text:style-name="P21">I tested amplifying a text document. It worked, and I didn’t receive an error, but the wheel on the “Amplifying” button never stopped spinning. Shouldn’t it stop spinning after the amplify process is finished? The “post with Zernio” function works for text!</text:p>
        </text:list-item>
        <text:list-item>
          <text:p text:style-name="P21"><text:s/><text:span text:style-name="T10">I tried to amplify an audio file I had uploaded and I received a “Please log in” error.</text:span></text:p>
        </text:list-item>
        <text:list-item>
          <text:p text:style-name="P22">Clicking on the “terms” link on the sign in page just takes me to the pricing page. It’s supposed to take me to the page with the terms of use posted.</text:p>
        </text:list-item>
        <text:list-item>
          <text:p text:style-name="P22">When I click on the free 14 day trial button, it just takes me to the home page. Is that because I already have an account?</text:p>
        </text:list-item>
      </text:list>
      <text:p text:style-name="P8"/>
      <text:p text:style-name="P23">I think everything else is working correctly.</text:p>
      <text:p text:style-name="P8"/>
      <text:p text:style-name="P8"/>
      <text:p text:style-name="P8"/>
      <text:p text:style-name="P8"/>
      <text:p text:style-name="P8"><text:soft-page-break/></text:p>
      <text:p text:style-name="P8"/>
      <text:p text:style-name="P8"/>
      <text:p text:style-name="P8"/>
      <text:p text:style-name="P8"/>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eist" svg:font-family="Geist, Arial, 'Apple Color Emoji', 'Segoe UI Emoji', 'Segoe UI Symbo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eistMonoFont" svg:font-family="geistMonoFont, ui-monospace, SFMono-Regular, 'Roboto Mono', Menlo, Monaco, 'Liberation Mono', 'DejaVu Sans Mono', 'Courier New', monospace, 'Apple Color Emoji', 'Segoe UI Emoji', 'Segoe UI Symbol', ui-monospace, SFMono-Regular, Menlo, Monaco, Consolas, 'Liberation Mono', 'Courier New',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5-30T12:26:47.068000000</meta:creation-date>
    <dc:date>2026-05-31T12:18:50.301000000</dc:date>
    <meta:editing-duration>PT11M14S</meta:editing-duration>
    <meta:editing-cycles>1</meta:editing-cycles>
    <meta:document-statistic meta:table-count="0" meta:image-count="0" meta:object-count="0" meta:page-count="9" meta:paragraph-count="86" meta:word-count="1610" meta:character-count="9604" meta:non-whitespace-character-count="8049"/>
    <meta:generator>LibreOffice/7.3.2.2$Windows_X86_64 LibreOffice_project/49f2b1bff42cfccbd8f788c8dc32c1c309559be0</meta:generator>
  </office:meta>
</office:document-meta>
</file>
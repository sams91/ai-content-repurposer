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23524" officeooo:paragraph-rsid="00023524"/>
    </style:style>
    <style:style style:name="P2" style:family="paragraph" style:parent-style-name="Standard" style:list-style-name="L2">
      <style:text-properties officeooo:rsid="00023524" officeooo:paragraph-rsid="00023524"/>
    </style:style>
    <style:style style:name="P3" style:family="paragraph" style:parent-style-name="Standard" style:list-style-name="L2">
      <style:text-properties officeooo:rsid="0003ad50" officeooo:paragraph-rsid="0003ad50"/>
    </style:style>
    <style:style style:name="P4" style:family="paragraph" style:parent-style-name="Standard">
      <style:text-properties officeooo:rsid="0003ad50" officeooo:paragraph-rsid="0003ad50"/>
    </style:style>
    <style:style style:name="P5" style:family="paragraph" style:parent-style-name="Standard" style:list-style-name="L2">
      <style:text-properties officeooo:paragraph-rsid="0003ad50"/>
    </style:style>
    <style:style style:name="P6" style:family="paragraph" style:parent-style-name="Standard" style:list-style-name="L2">
      <style:text-properties officeooo:paragraph-rsid="0006b236"/>
    </style:style>
    <style:style style:name="P7" style:family="paragraph" style:parent-style-name="Standard" style:list-style-name="L2">
      <style:text-properties officeooo:paragraph-rsid="00078392"/>
    </style:style>
    <style:style style:name="P8" style:family="paragraph" style:parent-style-name="Standard" style:list-style-name="L2">
      <style:text-properties officeooo:paragraph-rsid="0008f25a"/>
    </style:style>
    <style:style style:name="P9" style:family="paragraph" style:parent-style-name="Standard">
      <style:text-properties officeooo:paragraph-rsid="0003ad50"/>
    </style:style>
    <style:style style:name="P10" style:family="paragraph" style:parent-style-name="Standard" style:list-style-name="L2">
      <style:text-properties officeooo:rsid="00048e68" officeooo:paragraph-rsid="00048e68"/>
    </style:style>
    <style:style style:name="P11" style:family="paragraph" style:parent-style-name="Standard">
      <style:text-properties officeooo:rsid="00048e68" officeooo:paragraph-rsid="00048e68"/>
    </style:style>
    <style:style style:name="P12" style:family="paragraph" style:parent-style-name="Standard" style:list-style-name="L2">
      <style:text-properties officeooo:rsid="000513b1" officeooo:paragraph-rsid="000513b1"/>
    </style:style>
    <style:style style:name="P13" style:family="paragraph" style:parent-style-name="Standard">
      <style:text-properties officeooo:rsid="000513b1" officeooo:paragraph-rsid="000513b1"/>
    </style:style>
    <style:style style:name="P14" style:family="paragraph" style:parent-style-name="Standard" style:list-style-name="L2">
      <style:text-properties officeooo:rsid="0006b236" officeooo:paragraph-rsid="0006b236"/>
    </style:style>
    <style:style style:name="P15" style:family="paragraph" style:parent-style-name="Standard">
      <style:text-properties officeooo:rsid="0006b236" officeooo:paragraph-rsid="0006b236"/>
    </style:style>
    <style:style style:name="P16" style:family="paragraph" style:parent-style-name="Standard">
      <style:text-properties officeooo:paragraph-rsid="00078392"/>
    </style:style>
    <style:style style:name="P17" style:family="paragraph" style:parent-style-name="Standard" style:list-style-name="L2">
      <style:text-properties officeooo:rsid="0008f25a" officeooo:paragraph-rsid="0008f25a"/>
    </style:style>
    <style:style style:name="P18" style:family="paragraph" style:parent-style-name="Standard">
      <style:text-properties officeooo:rsid="0008f25a" officeooo:paragraph-rsid="0008f25a"/>
    </style:style>
    <style:style style:name="P19" style:family="paragraph" style:parent-style-name="Standard">
      <style:text-properties officeooo:paragraph-rsid="0008f25a"/>
    </style:style>
    <style:style style:name="P20" style:family="paragraph" style:parent-style-name="Text_20_body" style:list-style-name="L2">
      <style:text-properties officeooo:paragraph-rsid="00078392"/>
    </style:style>
    <style:style style:name="P21" style:family="paragraph" style:parent-style-name="Text_20_body" style:list-style-name="L2">
      <style:text-properties officeooo:paragraph-rsid="0008f25a"/>
    </style:style>
    <style:style style:name="P22" style:family="paragraph" style:parent-style-name="Text_20_body" style:list-style-name="L2">
      <style:text-properties officeooo:paragraph-rsid="000a2834"/>
    </style:style>
    <style:style style:name="P23" style:family="paragraph" style:parent-style-name="Text_20_body">
      <style:text-properties officeooo:paragraph-rsid="0008f25a"/>
    </style:style>
    <style:style style:name="P24" style:family="paragraph" style:parent-style-name="Text_20_body" style:list-style-name="L2">
      <style:text-properties officeooo:rsid="00096f02" officeooo:paragraph-rsid="00096f02"/>
    </style:style>
    <style:style style:name="P25" style:family="paragraph" style:parent-style-name="Text_20_body">
      <style:text-properties officeooo:rsid="00096f02" officeooo:paragraph-rsid="00096f02"/>
    </style:style>
    <style:style style:name="P26" style:family="paragraph" style:parent-style-name="Text_20_body" style:list-style-name="L2">
      <style:text-properties officeooo:rsid="000a2834" officeooo:paragraph-rsid="000a2834"/>
    </style:style>
    <style:style style:name="P27" style:family="paragraph" style:parent-style-name="Text_20_body">
      <style:text-properties officeooo:rsid="000a2834" officeooo:paragraph-rsid="000a2834"/>
    </style:style>
    <style:style style:name="P28" style:family="paragraph" style:parent-style-name="Text_20_body">
      <style:text-properties officeooo:paragraph-rsid="000a2834"/>
    </style:style>
    <style:style style:name="P29" style:family="paragraph" style:parent-style-name="Text_20_body">
      <style:text-properties officeooo:rsid="000b9c3f" officeooo:paragraph-rsid="000b9c3f"/>
    </style:style>
    <style:style style:name="P30" style:family="paragraph" style:parent-style-name="Text_20_body" style:list-style-name="L3">
      <style:text-properties officeooo:rsid="000b9c3f" officeooo:paragraph-rsid="000b9c3f"/>
    </style:style>
    <style:style style:name="P31" style:family="paragraph" style:parent-style-name="Text_20_body" style:list-style-name="L3">
      <style:text-properties officeooo:paragraph-rsid="000cdd19"/>
    </style:style>
    <style:style style:name="P32" style:family="paragraph" style:parent-style-name="Text_20_body">
      <style:text-properties officeooo:paragraph-rsid="000cdd19"/>
    </style:style>
    <style:style style:name="T1" style:family="text">
      <style:text-properties officeooo:rsid="0003ad50"/>
    </style:style>
    <style:style style:name="T2" style:family="text">
      <style:text-properties officeooo:rsid="00048e68"/>
    </style:style>
    <style:style style:name="T3" style:family="text">
      <style:text-properties officeooo:rsid="000513b1"/>
    </style:style>
    <style:style style:name="T4" style:family="text">
      <style:text-properties officeooo:rsid="0006b236"/>
    </style:style>
    <style:style style:name="T5" style:family="text">
      <style:text-properties officeooo:rsid="00078392"/>
    </style:style>
    <style:style style:name="T6" style:family="text">
      <style:text-properties officeooo:rsid="0008f25a"/>
    </style:style>
    <style:style style:name="T7" style:family="text">
      <style:text-properties officeooo:rsid="00096f02"/>
    </style:style>
    <style:style style:name="T8" style:family="text">
      <style:text-properties officeooo:rsid="000a2834"/>
    </style:style>
    <style:style style:name="T9" style:family="text">
      <style:text-properties officeooo:rsid="000cdd19"/>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Ok, <text:span text:style-name="T2">I’d like to keep the current list, and </text:span>here are some <text:span text:style-name="T2">other</text:span> things I’m thinking about:</text:p>
      <text:p text:style-name="P1"/>
      <text:list xml:id="list1432384188" text:style-name="L2">
        <text:list-item>
          <text:p text:style-name="P2">Right now we have text and video for social media. What if we made the entire app “multi-modal”? What I mean is users can toggle between different modes or personas. One for social media, one for music/bands/writers, one for research/school/academia (this is where we would have the auto formatting for APA, MLM, etc.)</text:p>
          <text:list>
            <text:list-item>
              <text:p text:style-name="P2">What kinds of features could we use to build out these other modes?</text:p>
            </text:list-item>
            <text:list-item>
              <text:p text:style-name="P3">Does it make sense to create different “modes”, or should all the features just be added together into one app?</text:p>
            </text:list-item>
            <text:list-item>
              <text:p text:style-name="P2">How big of a lift would this be?</text:p>
            </text:list-item>
            <text:list-item>
              <text:p text:style-name="P2">Would it be worth the effort, or would it just be adding unnecessary complexity?</text:p>
            </text:list-item>
          </text:list>
        </text:list-item>
      </text:list>
      <text:p text:style-name="P1"/>
      <text:p text:style-name="P1"/>
      <text:list xml:id="list45444367438210" text:continue-numbering="true" text:style-name="L2">
        <text:list-item>
          <text:p text:style-name="P5"><text:span text:style-name="T1">The </text:span>AI Thumbnail Generator <text:span text:style-name="T1">uses an upgraded version of open AI, something I don’t have access to at the moment. I’d like to keep this on the phase 2 list to be implemented in the future, but it isn’t something I think we should worry about now. </text:span></text:p>
        </text:list-item>
      </text:list>
      <text:p text:style-name="P9"/>
      <text:p text:style-name="P9"/>
      <text:list xml:id="list45445570380680" text:continue-numbering="true" text:style-name="L2">
        <text:list-item>
          <text:p text:style-name="P3">I’d like to explore options for audio only, what kind of features could we add to this app that would appeal to podcasters, musicians, etc?</text:p>
        </text:list-item>
      </text:list>
      <text:p text:style-name="P4"/>
      <text:p text:style-name="P4"/>
      <text:list xml:id="list45445392681428" text:continue-numbering="true" text:style-name="L2">
        <text:list-item>
          <text:p text:style-name="P3">In a previous thread, we discussed adding some kind of “usage dashboard”. I think the idea was to give users the ability to track metrics concerning the content they use my app to create and distribute.</text:p>
          <text:list>
            <text:list-item>
              <text:p text:style-name="P3">I’d like to map out what metrics we could track and how we could get that information.</text:p>
            </text:list-item>
            <text:list-item>
              <text:p text:style-name="P3">We should list out what information users would want to see, then figure out how to provide it.</text:p>
            </text:list-item>
          </text:list>
        </text:list-item>
      </text:list>
      <text:p text:style-name="P4"/>
      <text:p text:style-name="P4"/>
      <text:list xml:id="list45444103596092" text:continue-numbering="true" text:style-name="L2">
        <text:list-item>
          <text:p text:style-name="P10">The video part of the app formats the video based on platform, and it also generates text based on platform. When the app pushes to a platform using Zernio, what is it sending? Is it only sending the video, or is it sending both the video and the text that was generate for that platform? If it’s only sending the video, we need to fix that. When a user pushes a video, the text that is generated from the video should go with it. </text:p>
        </text:list-item>
      </text:list>
      <text:p text:style-name="P11"/>
      <text:p text:style-name="P11"/>
      <text:list xml:id="list45445587560456" text:continue-numbering="true" text:style-name="L2">
        <text:list-item>
          <text:p text:style-name="P10">Is the app set up to also push text to selected social media platforms using Zernio, or is it only set up to push video?</text:p>
        </text:list-item>
      </text:list>
      <text:p text:style-name="P11"/>
      <text:p text:style-name="P11"/>
      <text:p text:style-name="P11"/>
      <text:list xml:id="list45444131683374" text:continue-numbering="true" text:style-name="L2">
        <text:list-item>
          <text:p text:style-name="P10">In the history section, I see 4 buttons under each video. There is one to download for TikTok/Reels, YouTube, Instagram, and LinkedIn. <text:span text:style-name="T3">When a user clicks on one of those buttons, is the app formatting the video for the platform the user clicked on? I’m wondering if, rather than only having 4 options, there should be a full drop down menu, just as in the main UI? </text:span><text:soft-page-break/><text:span text:style-name="T3">What are your thoughts? The history section is looking pretty good as is, I don’t want to break it.</text:span></text:p>
        </text:list-item>
      </text:list>
      <text:p text:style-name="P11"/>
      <text:p text:style-name="P11"/>
      <text:p text:style-name="P11"/>
      <text:list xml:id="list45444749417864" text:continue-numbering="true" text:style-name="L2">
        <text:list-item>
          <text:p text:style-name="P12">For the text part of the app, could we clean it up a bit by combining the input box and the drop box? In Microsoft Teams, users can drop docs directly into the chat bar, could we do that?</text:p>
        </text:list-item>
      </text:list>
      <text:p text:style-name="P13"/>
      <text:p text:style-name="P13"/>
      <text:p text:style-name="P13"/>
      <text:list xml:id="list45444681029639" text:continue-numbering="true" text:style-name="L2">
        <text:list-item>
          <text:p text:style-name="P12">I think we should have a section that explains what Zernio is, what it does, and how it benefits users. Talk it up by pointing out the first 2 accounts a user sets up are free for life.</text:p>
          <text:list>
            <text:list-item>
              <text:p text:style-name="P12">I’m thinking this information should be incorporated into the “why amplify” page since it would be a selling point, then add a “set up Zernio” button somewhere along with this information where it looks like a good place to be. <text:span text:style-name="T4">We could transfer the functionality of the Zernio tab to that button, then remove the Zernio tab. What are your thoughts?</text:span></text:p>
            </text:list-item>
          </text:list>
        </text:list-item>
      </text:list>
      <text:p text:style-name="P13"/>
      <text:p text:style-name="P13"/>
      <text:p text:style-name="P13"/>
      <text:list xml:id="list45444750109702" text:continue-numbering="true" text:style-name="L2">
        <text:list-item>
          <text:p text:style-name="P6"><text:span text:style-name="T4">I’d like to discuss adding a </text:span>Content Calendar. </text:p>
          <text:list>
            <text:list-item>
              <text:p text:style-name="P14">What functionality would this include?</text:p>
            </text:list-item>
            <text:list-item>
              <text:p text:style-name="P14">Would this need to be a static calendar, or could we give users the ability to schedule things like content pushes? </text:p>
              <text:list>
                <text:list-item>
                  <text:p text:style-name="P14">Is this what you mean by “auto posting”?</text:p>
                </text:list-item>
              </text:list>
            </text:list-item>
            <text:list-item>
              <text:p text:style-name="P14">I think this would look nice in a separate tab, or combine it with the dashboard. What are your thoughts?</text:p>
            </text:list-item>
          </text:list>
        </text:list-item>
      </text:list>
      <text:p text:style-name="P15"/>
      <text:p text:style-name="P15"/>
      <text:p text:style-name="P15"/>
      <text:list xml:id="list45445538729078" text:continue-numbering="true" text:style-name="L2">
        <text:list-item>
          <text:p text:style-name="P6"><text:span text:style-name="T4">Once I feel like the app is ready for production, how difficult would it be to create a </text:span>Mobile app <text:span text:style-name="T4">version? Would it be a complete rewrite, or would it be easy with a lot of copy and paste?</text:span></text:p>
          <text:list>
            <text:list-item>
              <text:p text:style-name="P14">What platform would we post this on? </text:p>
            </text:list-item>
            <text:list-item>
              <text:p text:style-name="P14">How difficult would it be to make it work on both apple and Android?</text:p>
            </text:list-item>
          </text:list>
        </text:list-item>
      </text:list>
      <text:p text:style-name="P15"/>
      <text:p text:style-name="P15"/>
      <text:p text:style-name="P15"/>
      <text:list xml:id="list45443894155383" text:continue-numbering="true" text:style-name="L2">
        <text:list-item>
          <text:p text:style-name="P14">What do we need to do to ensure the web version of the app works on all major browsers?</text:p>
          <text:list>
            <text:list-item>
              <text:p text:style-name="P14">I think most use Chromium, and I’m using Edge to build it, does that cover most browsers if it works on Edge? There will likely be edge cases between browsers, but I’d like to minimize that as much as possible.</text:p>
            </text:list-item>
            <text:list-item>
              <text:p text:style-name="P14">I’d like it to work on Edge, Chrome, and Firefox for sure. What do we need to do to make that happen? Are there other browsers you recommend? </text:p>
            </text:list-item>
          </text:list>
        </text:list-item>
      </text:list>
      <text:p text:style-name="P15"/>
      <text:p text:style-name="P15"/>
      <text:list xml:id="list45445722509600" text:continue-numbering="true" text:style-name="L2">
        <text:list-item>
          <text:p text:style-name="P7"><text:span text:style-name="T5">Help me understand what you mean by “</text:span>Export packages (ZIP with all assets)”, <text:span text:style-name="T5">what functionality would this be?</text:span></text:p>
        </text:list-item>
      </text:list>
      <text:p text:style-name="P16"/>
      <text:p text:style-name="P16"/>
      <text:p text:style-name="P16"/>
      <text:p text:style-name="P16"><text:soft-page-break/></text:p>
      <text:p text:style-name="P16"/>
      <text:p text:style-name="P16"/>
      <text:list xml:id="list45443892110068" text:continue-numbering="true" text:style-name="L2">
        <text:list-item>
          <text:p text:style-name="P20">Multi-modal “personas”</text:p>
          <text:list>
            <text:list-item>
              <text:p text:style-name="P8"><text:span text:style-name="T6">I’d like to add the </text:span>Music/Band/Writers persona <text:span text:style-name="T6">first, I see this being a bigger selling point than the research part.</text:span></text:p>
            </text:list-item>
            <text:list-item>
              <text:p text:style-name="P17">I think the podcast part could be added to the social media section. Right now we have a toggle for text and video, we can just add a third for audio.</text:p>
            </text:list-item>
            <text:list-item>
              <text:p text:style-name="P17">I think we need to come up with good names for these 2 sections. </text:p>
            </text:list-item>
            <text:list-item>
              <text:p text:style-name="P17">For the music section, what if we added some functionality that translated music notes into tableture, or the other way around?</text:p>
              <text:list>
                <text:list-item>
                  <text:p text:style-name="P17">We’ll need to think like a musician to build this out in a way a musician would find useful.</text:p>
                </text:list-item>
              </text:list>
            </text:list-item>
            <text:list-item>
              <text:p text:style-name="P17">I’m really not sure what functionality we could provide writers that they couldn’t just get for free on the internet or using AI. What are your thoughts?</text:p>
            </text:list-item>
          </text:list>
        </text:list-item>
      </text:list>
      <text:p text:style-name="P18"/>
      <text:p text:style-name="P19"/>
      <text:p text:style-name="P19"/>
      <text:list xml:id="list45444073997244" text:continue-numbering="true" text:style-name="L2">
        <text:list-item>
          <text:p text:style-name="P21">Usage Dashboard</text:p>
          <text:list>
            <text:list-item>
              <text:p text:style-name="P21">Let's nail down what <text:span text:style-name="T7">information Zernio will provide. I think things like “</text:span>Top performing content” <text:span text:style-name="T7">is the kind of data that would make implementing a dashboard worth the effort.</text:span></text:p>
            </text:list-item>
          </text:list>
        </text:list-item>
      </text:list>
      <text:p text:style-name="P23"/>
      <text:p text:style-name="P23"/>
      <text:list xml:id="list45445257952410" text:continue-numbering="true" text:style-name="L2">
        <text:list-item>
          <text:p text:style-name="P21">History section download buttons</text:p>
          <text:list>
            <text:list-item>
              <text:p text:style-name="P24">Let’s add this to our to-do list. I think changing to a drop down menu is a good idea.</text:p>
            </text:list-item>
          </text:list>
        </text:list-item>
      </text:list>
      <text:p text:style-name="P25"/>
      <text:p text:style-name="P25"/>
      <text:list xml:id="list45444183267002" text:continue-numbering="true" text:style-name="L2">
        <text:list-item>
          <text:p text:style-name="P24">Text input cleanup</text:p>
          <text:list>
            <text:list-item>
              <text:p text:style-name="P24">This is good news! Please also add this to our to-do list</text:p>
            </text:list-item>
          </text:list>
        </text:list-item>
      </text:list>
      <text:p text:style-name="P25"/>
      <text:p text:style-name="P25"/>
      <text:list xml:id="list45444508411189" text:continue-numbering="true" text:style-name="L2">
        <text:list-item>
          <text:p text:style-name="P24">Zernio explanation section</text:p>
          <text:list>
            <text:list-item>
              <text:p text:style-name="P24">I don’t think this should be on the main page. Instead, I think it would be a good idea to rewrite the “why amplify” page and add the Zernio content. What are your thoughts?</text:p>
            </text:list-item>
            <text:list-item>
              <text:p text:style-name="P24">Please also add this to the to do list</text:p>
            </text:list-item>
          </text:list>
        </text:list-item>
      </text:list>
      <text:p text:style-name="P25"/>
      <text:p text:style-name="P25"/>
      <text:p text:style-name="P25"><text:soft-page-break/></text:p>
      <text:list xml:id="list45445521300923" text:continue-numbering="true" text:style-name="L2">
        <text:list-item>
          <text:p text:style-name="P24">Content Calendar</text:p>
          <text:list>
            <text:list-item>
              <text:p text:style-name="P24">I’m kind of torn between this being on a separate tab, and being combined with the dashboard. I can see the merits of both. What are your thoughts?</text:p>
            </text:list-item>
            <text:list-item>
              <text:p text:style-name="P24">Please add this to the to do list</text:p>
            </text:list-item>
          </text:list>
        </text:list-item>
      </text:list>
      <text:p text:style-name="P25"/>
      <text:p text:style-name="P25"/>
      <text:list xml:id="list45444165124049" text:continue-numbering="true" text:style-name="L2">
        <text:list-item>
          <text:p text:style-name="P24">Mobile app version</text:p>
          <text:list>
            <text:list-item>
              <text:p text:style-name="P26">By PWA, does that mean the app basically just operates in a mobile web browser?</text:p>
            </text:list-item>
            <text:list-item>
              <text:p text:style-name="P26">If that is the case, I think putting in the effort to build the native app would be a better idea.</text:p>
            </text:list-item>
            <text:list-item>
              <text:p text:style-name="P26">This will require further discussion, but we need to finished the web app first. Please put this on our phase 2 list.</text:p>
            </text:list-item>
          </text:list>
        </text:list-item>
      </text:list>
      <text:p text:style-name="P27"/>
      <text:p text:style-name="P27"/>
      <text:list xml:id="list45444853000033" text:continue-numbering="true" text:style-name="L2">
        <text:list-item>
          <text:p text:style-name="P26">Browser compatibility</text:p>
          <text:list>
            <text:list-item>
              <text:p text:style-name="P26">I like your idea for making it work on Safari</text:p>
            </text:list-item>
            <text:list-item>
              <text:p text:style-name="P26">Please put this on the to do list</text:p>
            </text:list-item>
          </text:list>
        </text:list-item>
      </text:list>
      <text:p text:style-name="P27"/>
      <text:p text:style-name="P27"/>
      <text:list xml:id="list45444985748768" text:continue-numbering="true" text:style-name="L2">
        <text:list-item>
          <text:p text:style-name="P26">Export packages (ZIP with all assets)</text:p>
          <text:list>
            <text:list-item>
              <text:p text:style-name="P26">I can see this being a selling point.</text:p>
            </text:list-item>
            <text:list-item>
              <text:p text:style-name="P26">Please put this on our to do list</text:p>
            </text:list-item>
          </text:list>
        </text:list-item>
      </text:list>
      <text:p text:style-name="P27"/>
      <text:p text:style-name="P27"/>
      <text:p text:style-name="P27"/>
      <text:list xml:id="list45445671184920" text:continue-numbering="true" text:style-name="L2">
        <text:list-item>
          <text:p text:style-name="P22"><text:span text:style-name="T8">I like the order you have the to do list in, but I’d like to put </text:span>Export ZIP packages <text:span text:style-name="T8">as number 8 and worry about safari comparability later.</text:span></text:p>
        </text:list-item>
      </text:list>
      <text:p text:style-name="P28"/>
      <text:p text:style-name="P28"/>
      <text:p text:style-name="P28"/>
      <text:p text:style-name="P28"/>
      <text:p text:style-name="P28"><text:soft-page-break/></text:p>
      <text:p text:style-name="P28"/>
      <text:p text:style-name="P28"/>
      <text:p text:style-name="P28"/>
      <text:p text:style-name="P28"/>
      <text:p text:style-name="P29">I see a couple of issues:</text:p>
      <text:p text:style-name="P29"/>
      <text:list xml:id="list2506543404" text:style-name="L3">
        <text:list-item>
          <text:p text:style-name="P30">The “Why Amplify” tab at the top should probably say “Why Amplify with Zernio”. I think that would give users a heads up that if they have no idea what a Zernio is, they may find information about it there. What do you think?</text:p>
        </text:list-item>
        <text:list-item>
          <text:p text:style-name="P30">The original Zernio tab came with instructions explaining how to sign up for an account, get the API key, and what to do with it. <text:span text:style-name="T9">The “Connect Zernio” pop up box in the why amplify section doesn’t have the “how to set up” button at the top, like it does in the Zernio tab. This should be added.</text:span></text:p>
        </text:list-item>
        <text:list-item>
          <text:p text:style-name="P31"><text:span text:style-name="T9">When you provided the </text:span>app/page.tsx <text:span text:style-name="T9">code, you broke the rule and truncated, you bad boy:</text:span></text:p>
        </text:list-item>
      </text:list>
      <text:p text:style-name="P32"/>
      <text:p text:style-name="P3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5-18T00:05:33.063000000</meta:creation-date>
    <dc:date>2026-05-18T04:54:38.180000000</dc:date>
    <meta:editing-duration>PT2H20M40S</meta:editing-duration>
    <meta:editing-cycles>3</meta:editing-cycles>
    <meta:generator>LibreOffice/7.3.2.2$Windows_X86_64 LibreOffice_project/49f2b1bff42cfccbd8f788c8dc32c1c309559be0</meta:generator>
    <meta:document-statistic meta:table-count="0" meta:image-count="0" meta:object-count="0" meta:page-count="5" meta:paragraph-count="63" meta:word-count="1430" meta:character-count="7283" meta:non-whitespace-character-count="5970"/>
  </office:meta>
</office:document-meta>
</file>